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8000000032DFE0ADB2728F502A9.png" manifest:media-type="image/png"/>
  <manifest:file-entry manifest:full-path="Pictures/1000020100000190000000DA8B2BFF0266AEC8D9.png" manifest:media-type="image/png"/>
  <manifest:file-entry manifest:full-path="Pictures/100002010000040000000400A2C57A2F2A1F919C.png" manifest:media-type="image/png"/>
  <manifest:file-entry manifest:full-path="Pictures/10000201000000B4000000B46027ED32C11D68DD.png" manifest:media-type="image/png"/>
  <manifest:file-entry manifest:full-path="Pictures/10000201000003200000023860C20D2FC9AB98B8.png" manifest:media-type="image/png"/>
  <manifest:file-entry manifest:full-path="Pictures/1000020100000084000000841A7D57659B0061C4.png" manifest:media-type="image/png"/>
  <manifest:file-entry manifest:full-path="Pictures/100000000000080000000069EE072DBA673A3BD1.png" manifest:media-type="image/png"/>
  <manifest:file-entry manifest:full-path="Pictures/1000000000000800000001D6C595A9F19B7E01F5.png" manifest:media-type="image/png"/>
  <manifest:file-entry manifest:full-path="Pictures/10000201000001900000012CE2A20F5209AEEEE6.png" manifest:media-type="image/png"/>
  <manifest:file-entry manifest:full-path="Pictures/1000020100000438000004385DCD94D9D292316F.png" manifest:media-type="image/png"/>
  <manifest:file-entry manifest:full-path="Pictures/100002010000020000000200E34C0A2E787C9B97.png" manifest:media-type="image/png"/>
  <manifest:file-entry manifest:full-path="Pictures/100002010000020000000200F43894A2E5981DCE.png" manifest:media-type="image/png"/>
  <manifest:file-entry manifest:full-path="Pictures/100002010000020000000200C380900152203F0B.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entury Gothic" svg:font-family="'Century Gothic'"/>
    <style:font-face style:name="Courier Prime" svg:font-family="'Courier Prime'"/>
    <style:font-face style:name="JetBrains Mono" svg:font-family="'JetBrains Mon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SECTION_5f_HEADER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SECTION_5f_HEADER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_5f_2_5f_3-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 style:family="presentation" style:parent-style-name="TITLE_5f_AND_5f_BODY_5f_2_5f_3-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_5f_2_5f_3-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_5f_2_5f_4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_5f_2_5f_4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_5f_2_5f_4_5f_1-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_5f_2_5f_3-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_5f_2-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5f_AND_5f_BODY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2" style:family="presentation" style:parent-style-name="TITLE_5f_AND_5f_BODY_5f_2-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_5f_2_5f_3-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_5f_2_5f_2-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5" style:family="presentation" style:parent-style-name="TITLE_5f_AND_5f_BODY_5f_2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6" style:family="presentation" style:parent-style-name="TITLE_5f_AND_5f_BODY_5f_2_5f_2-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_5f_2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8" style:family="presentation" style:parent-style-name="TITLE_5f_AND_5f_BODY_5f_2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9" style:family="presentation" style:parent-style-name="TITLE_5f_AND_5f_BODY_5f_2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_5f_2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1" style:family="presentation" style:parent-style-name="TITLE_5f_AND_5f_BODY_5f_2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2" style:family="presentation" style:parent-style-name="TITLE_5f_AND_5f_BODY_5f_2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_5f_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_5f_2-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_5f_2_5f_2-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_5f_2-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_5f_2_5f_2-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_5f_2-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_5f_2-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_5f_2_5f_4_5f_1-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31pt"/>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agraph-properties fo:margin-left="0cm" fo:margin-right="0cm" fo:margin-top="0cm" fo:margin-bottom="0cm" fo:line-height="115%" fo:text-align="start" fo:text-indent="0cm" style:writing-mode="lr-tb"/>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start" fo:text-indent="0cm" style:writing-mode="lr-tb"/>
    </style:style>
    <style:style style:name="T1" style:family="text">
      <style:text-properties fo:font-variant="normal" fo:text-transform="none" fo:color="#000000" style:text-line-through-style="none" style:text-line-through-type="none" style:text-position="0% 100%" style:font-name="Century Gothic" fo:font-size="36pt" fo:letter-spacing="normal" fo:font-style="normal" style:text-underline-style="none" fo:font-weight="bold" style:font-name-asian="Century Gothic" style:font-size-asian="36pt" style:font-style-asian="normal" style:font-weight-asian="bold" style:font-name-complex="Century Gothic" style:font-size-complex="36pt" style:font-style-complex="normal" style:font-weight-complex="bold"/>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4" style:family="text">
      <style:text-properties fo:font-variant="normal" fo:text-transform="none" fo:color="#000000" style:text-line-through-style="none" style:text-line-through-type="none" style:text-position="0% 100%" style:font-name="Century Gothic" fo:font-size="16pt" fo:letter-spacing="normal" fo:font-style="normal" style:text-underline-style="none" fo:font-weight="normal" style:font-name-asian="Century Gothic" style:font-size-asian="16pt" style:font-style-asian="normal" style:font-weight-asian="normal" style:font-name-complex="Century Gothic"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entury Gothic" fo:font-size="16pt" fo:letter-spacing="normal" fo:font-style="italic" style:text-underline-style="none" fo:font-weight="normal" style:font-name-asian="Century Gothic" style:font-size-asian="16pt" style:font-style-asian="italic" style:font-weight-asian="normal" style:font-name-complex="Century Gothic" style:font-size-complex="16pt" style:font-style-complex="italic" style:font-weight-complex="normal"/>
    </style:style>
    <style:style style:name="T6" style:family="text">
      <style:text-properties fo:font-variant="normal" fo:text-transform="none" fo:color="#000000"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normal" style:font-name-asian="Century Gothic" style:font-size-asian="18pt" style:font-style-asian="normal" style:font-weight-asian="normal" style:font-name-complex="Century Gothic"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entury Gothic" fo:font-size="26.5pt" fo:letter-spacing="normal" fo:font-style="normal" style:text-underline-style="none" fo:font-weight="normal" style:font-name-asian="Century Gothic" style:font-size-asian="26.5pt" style:font-style-asian="normal" style:font-weight-asian="normal" style:font-name-complex="Century Gothic" style:font-size-complex="26.5pt" style:font-style-complex="normal" style:font-weight-complex="normal"/>
    </style:style>
    <style:style style:name="T9" style:family="text">
      <style:text-properties fo:font-variant="normal" fo:text-transform="none" fo:color="#0097a7" style:text-line-through-style="none" style:text-line-through-type="none" style:text-position="0% 100%" style:font-name="Century Gothic" fo:font-size="16pt" fo:letter-spacing="normal" fo:font-style="normal" style:text-underline-style="solid" style:text-underline-width="auto" style:text-underline-color="font-color" fo:font-weight="normal" style:font-name-asian="Century Gothic" style:font-size-asian="16pt" style:font-style-asian="normal" style:font-weight-asian="normal" style:font-name-complex="Century Gothic"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Prime" fo:font-size="16pt" fo:letter-spacing="normal" fo:font-style="normal" style:text-underline-style="none" fo:font-weight="normal" style:font-name-asian="Courier Prime" style:font-size-asian="16pt" style:font-style-asian="normal" style:font-weight-asian="normal" style:font-name-complex="Courier Prime"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entury Gothic" fo:font-size="16pt" fo:letter-spacing="normal" fo:font-style="italic" style:text-underline-style="none" fo:font-weight="bold" style:font-name-asian="Century Gothic" style:font-size-asian="16pt" style:font-style-asian="italic" style:font-weight-asian="bold" style:font-name-complex="Century Gothic" style:font-size-complex="16pt" style:font-style-complex="italic" style:font-weight-complex="bold"/>
    </style:style>
    <style:style style:name="T12" style:family="text">
      <style:text-properties fo:font-variant="normal" fo:text-transform="none" style:text-line-through-style="none" style:text-line-through-type="none" style:text-position="0% 100%" style:font-name="Courier Prime" fo:font-size="11pt" fo:letter-spacing="normal" fo:font-style="normal" style:text-underline-style="none" fo:font-weight="bold" style:font-name-asian="Courier Prime" style:font-size-asian="11pt" style:font-style-asian="normal" style:font-weight-asian="bold" style:font-name-complex="Courier Prime" style:font-size-complex="11pt" style:font-style-complex="normal" style:font-weight-complex="bold"/>
    </style:style>
    <style:style style:name="T13" style:family="text">
      <style:text-properties fo:font-variant="normal" fo:text-transform="none" style:text-line-through-style="none" style:text-line-through-type="none" style:text-position="0% 100%" style:font-name="Courier Prime" fo:font-size="11pt" fo:letter-spacing="normal" fo:font-style="italic" style:text-underline-style="none" fo:font-weight="normal" style:font-name-asian="Courier Prime" style:font-size-asian="11pt" style:font-style-asian="italic" style:font-weight-asian="normal" style:font-name-complex="Courier Prime" style:font-size-complex="11pt" style:font-style-complex="italic" style:font-weight-complex="normal"/>
    </style:style>
    <style:style style:name="T14" style:family="text">
      <style:text-properties fo:font-variant="normal" fo:text-transform="none" style:text-line-through-style="none" style:text-line-through-type="none" style:text-position="0% 100%" style:font-name="Courier Prime" fo:font-size="11pt" fo:letter-spacing="normal" fo:font-style="normal" style:text-underline-style="none" fo:font-weight="normal" style:font-name-asian="Courier Prime" style:font-size-asian="11pt" style:font-style-asian="normal" style:font-weight-asian="normal" style:font-name-complex="Courier Prime"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entury Gothic" fo:font-size="16pt" fo:letter-spacing="normal" fo:font-style="normal" style:text-underline-style="none" fo:font-weight="bold" style:font-name-asian="Century Gothic" style:font-size-asian="16pt" style:font-style-asian="normal" style:font-weight-asian="bold" style:font-name-complex="Century Gothic" style:font-size-complex="16pt" style:font-style-complex="normal" style:font-weight-complex="bold"/>
    </style:style>
    <style:style style:name="T16" style:family="text">
      <style:text-properties fo:font-variant="normal" fo:text-transform="none" fo:color="#000000" style:text-line-through-style="none" style:text-line-through-type="none" style:text-position="0% 100%" style:font-name="JetBrains Mono" fo:font-size="22pt" fo:letter-spacing="normal" fo:font-style="normal" style:text-underline-style="none" fo:font-weight="normal" style:font-name-asian="JetBrains Mono" style:font-size-asian="22pt" style:font-style-asian="normal" style:font-weight-asian="normal" style:font-name-complex="JetBrains Mono" style:font-size-complex="22pt" style:font-style-complex="normal" style:font-weight-complex="normal"/>
    </style:style>
    <style:style style:name="T17"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8" style:family="text">
      <style:text-properties fo:font-variant="normal" fo:text-transform="none" fo:color="#555555" style:text-line-through-style="none" style:text-line-through-type="none" style:text-position="0% 100%" style:font-name="Courier Prime" fo:font-size="16pt" fo:letter-spacing="normal" fo:font-style="normal" style:text-underline-style="none" fo:font-weight="normal" style:font-name-asian="Courier Prime" style:font-size-asian="16pt" style:font-style-asian="normal" style:font-weight-asian="normal" style:font-name-complex="Courier Prime" style:font-size-complex="1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JetBrains Mono" fo:font-size="26.5pt" fo:letter-spacing="normal" fo:font-style="italic" style:text-underline-style="none" fo:font-weight="normal" style:font-name-asian="JetBrains Mono" style:font-size-asian="26.5pt" style:font-style-asian="italic" style:font-weight-asian="normal" style:font-name-complex="JetBrains Mono" style:font-size-complex="26.5pt" style:font-style-complex="italic" style:font-weight-complex="normal"/>
    </style:style>
    <style:style style:name="T20" style:family="text">
      <style:text-properties fo:font-variant="normal" fo:text-transform="none" fo:color="#555555" style:text-line-through-style="none" style:text-line-through-type="none" style:text-position="0% 100%" style:font-name="Courier Prime" fo:font-size="11pt" fo:letter-spacing="normal" fo:font-style="normal" style:text-underline-style="none" fo:font-weight="bold" style:font-name-asian="Courier Prime" style:font-size-asian="11pt" style:font-style-asian="normal" style:font-weight-asian="bold" style:font-name-complex="Courier Prime" style:font-size-complex="11pt" style:font-style-complex="normal" style:font-weight-complex="bold"/>
    </style:style>
    <style:style style:name="T21" style:family="text">
      <style:text-properties fo:font-variant="normal" fo:text-transform="none" fo:color="#000000" style:text-line-through-style="none" style:text-line-through-type="none" style:text-position="0% 100%" style:font-name="Courier Prime" fo:font-size="11pt" fo:letter-spacing="normal" fo:font-style="normal" style:text-underline-style="solid" style:text-underline-width="auto" style:text-underline-color="font-color" fo:font-weight="bold" style:font-name-asian="Courier Prime" style:font-size-asian="11pt" style:font-style-asian="normal" style:font-weight-asian="bold" style:font-name-complex="Courier Prime" style:font-size-complex="11pt" style:font-style-complex="normal" style:font-weight-complex="bold"/>
    </style:style>
    <style:style style:name="T22" style:family="text">
      <style:text-properties fo:font-variant="normal" fo:text-transform="none" fo:color="#000000" style:text-line-through-style="none" style:text-line-through-type="none" style:text-position="0% 100%" style:font-name="Courier Prime" fo:font-size="11pt" fo:letter-spacing="normal" fo:font-style="normal" style:text-underline-style="none" fo:font-weight="bold" style:font-name-asian="Courier Prime" style:font-size-asian="11pt" style:font-style-asian="normal" style:font-weight-asian="bold" style:font-name-complex="Courier Prime" style:font-size-complex="11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urier Prime" fo:font-size="11pt" fo:letter-spacing="normal" fo:font-style="italic" style:text-underline-style="none" fo:font-weight="normal" style:font-name-asian="Courier Prime" style:font-size-asian="11pt" style:font-style-asian="italic" style:font-weight-asian="normal" style:font-name-complex="Courier Prime" style:font-size-complex="11pt" style:font-style-complex="italic" style:font-weight-complex="normal"/>
    </style:style>
    <style:style style:name="T24" style:family="text">
      <style:text-properties fo:font-variant="normal" fo:text-transform="none" fo:color="#555555" style:text-line-through-style="none" style:text-line-through-type="none" style:text-position="0% 100%" style:font-name="Courier Prime" fo:font-size="11pt" fo:letter-spacing="normal" fo:font-style="italic" style:text-underline-style="none" fo:font-weight="normal" style:font-name-asian="Courier Prime" style:font-size-asian="11pt" style:font-style-asian="italic" style:font-weight-asian="normal" style:font-name-complex="Courier Prime" style:font-size-complex="11pt" style:font-style-complex="italic" style:font-weight-complex="normal"/>
    </style:style>
    <style:style style:name="T25" style:family="text">
      <style:text-properties fo:font-variant="normal" fo:text-transform="none" fo:color="#555555" style:text-line-through-style="none" style:text-line-through-type="none" style:text-position="0% 100%" style:font-name="JetBrains Mono" fo:font-size="11pt" fo:letter-spacing="normal" fo:font-style="italic" style:text-underline-style="none" fo:font-weight="normal" style:font-name-asian="JetBrains Mono" style:font-size-asian="11pt" style:font-style-asian="italic" style:font-weight-asian="normal" style:font-name-complex="JetBrains Mono" style:font-size-complex="11pt" style:font-style-complex="italic" style:font-weight-complex="normal"/>
    </style:style>
    <style:style style:name="T26" style:family="text">
      <style:text-properties fo:font-variant="normal" fo:text-transform="none" fo:color="#555555" style:text-line-through-style="none" style:text-line-through-type="none" style:text-position="0% 100%" style:font-name="Courier Prime" fo:font-size="11pt" fo:letter-spacing="normal" fo:font-style="normal" style:text-underline-style="none" fo:font-weight="normal" style:font-name-asian="Courier Prime" style:font-size-asian="11pt" style:font-style-asian="normal" style:font-weight-asian="normal" style:font-name-complex="Courier Prime" style:font-size-complex="11pt" style:font-style-complex="normal" style:font-weight-complex="normal"/>
    </style:style>
    <style:style style:name="T27" style:family="text">
      <style:text-properties fo:font-variant="normal" fo:text-transform="none" fo:color="#555555" style:text-line-through-style="none" style:text-line-through-type="none" style:text-position="0% 100%" style:font-name="Courier Prime" fo:font-size="11pt" fo:letter-spacing="normal" fo:font-style="italic" style:text-underline-style="none" fo:font-weight="bold" style:font-name-asian="Courier Prime" style:font-size-asian="11pt" style:font-style-asian="italic" style:font-weight-asian="bold" style:font-name-complex="Courier Prime" style:font-size-complex="11pt" style:font-style-complex="italic" style:font-weight-complex="bold"/>
    </style:style>
    <style:style style:name="T28" style:family="text">
      <style:text-properties fo:font-variant="normal" fo:text-transform="none" fo:color="#000000" style:text-line-through-style="none" style:text-line-through-type="none" style:text-position="0% 100%" style:font-name="Century Gothic" fo:font-size="15pt" fo:letter-spacing="normal" fo:font-style="normal" style:text-underline-style="none" fo:font-weight="normal" style:font-name-asian="Century Gothic" style:font-size-asian="15pt" style:font-style-asian="normal" style:font-weight-asian="normal" style:font-name-complex="Century Gothic" style:font-size-complex="15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JetBrains Mono" fo:font-size="15pt" fo:letter-spacing="normal" fo:font-style="italic" style:text-underline-style="none" fo:font-weight="normal" style:font-name-asian="JetBrains Mono" style:font-size-asian="15pt" style:font-style-asian="italic" style:font-weight-asian="normal" style:font-name-complex="JetBrains Mono" style:font-size-complex="15pt" style:font-style-complex="italic" style:font-weight-complex="normal"/>
    </style:style>
    <style:style style:name="T30" style:family="text">
      <style:text-properties fo:font-variant="normal" fo:text-transform="none" fo:color="#000000" style:text-line-through-style="none" style:text-line-through-type="none" style:text-position="0% 100%" style:font-name="Century Gothic" fo:font-size="15pt" fo:letter-spacing="normal" fo:font-style="italic" style:text-underline-style="none" fo:font-weight="bold" style:font-name-asian="Century Gothic" style:font-size-asian="15pt" style:font-style-asian="italic" style:font-weight-asian="bold" style:font-name-complex="Century Gothic" style:font-size-complex="15pt" style:font-style-complex="italic" style:font-weight-complex="bold"/>
    </style:style>
    <style:style style:name="T31" style:family="text">
      <style:text-properties fo:font-variant="normal" fo:text-transform="none" fo:color="#000000" style:text-line-through-style="none" style:text-line-through-type="none" style:text-position="0% 100%" style:font-name="JetBrains Mono" fo:font-size="16pt" fo:letter-spacing="normal" fo:font-style="italic" style:text-underline-style="none" fo:font-weight="normal" style:font-name-asian="JetBrains Mono" style:font-size-asian="16pt" style:font-style-asian="italic" style:font-weight-asian="normal" style:font-name-complex="JetBrains Mono" style:font-size-complex="16pt" style:font-style-complex="italic" style:font-weight-complex="normal"/>
    </style:style>
    <style:style style:name="T32" style:family="text">
      <style:text-properties fo:font-variant="normal" fo:text-transform="none" fo:color="#000000" style:text-line-through-style="none" style:text-line-through-type="none" style:text-position="30% 58%" style:font-name="JetBrains Mono" fo:font-size="16pt" fo:letter-spacing="normal" fo:font-style="normal" style:text-underline-style="none" fo:font-weight="normal" style:font-name-asian="JetBrains Mono" style:font-size-asian="16pt" style:font-style-asian="normal" style:font-weight-asian="normal" style:font-name-complex="JetBrains Mono" style:font-size-complex="16pt" style:font-style-complex="normal" style:font-weight-complex="normal"/>
    </style:style>
    <style:style style:name="T33" style:family="text">
      <style:text-properties fo:font-variant="normal" fo:text-transform="none" style:text-line-through-style="none" style:text-line-through-type="none" style:text-position="0% 100%" style:font-name="JetBrains Mono" fo:font-size="11pt" fo:letter-spacing="normal" fo:font-style="italic" style:text-underline-style="none" fo:font-weight="bold" style:font-name-asian="JetBrains Mono" style:font-size-asian="11pt" style:font-style-asian="italic" style:font-weight-asian="bold" style:font-name-complex="JetBrains Mono" style:font-size-complex="11pt" style:font-style-complex="italic" style:font-weight-complex="bold"/>
    </style:style>
    <style:style style:name="T34" style:family="text">
      <style:text-properties fo:font-variant="normal" fo:text-transform="none" style:text-line-through-style="none" style:text-line-through-type="none" style:text-position="0% 100%" style:font-name="JetBrains Mono" fo:font-size="11pt" fo:letter-spacing="normal" fo:font-style="normal" style:text-underline-style="none" fo:font-weight="bold" style:font-name-asian="JetBrains Mono" style:font-size-asian="11pt" style:font-style-asian="normal" style:font-weight-asian="bold" style:font-name-complex="JetBrains Mono" style:font-size-complex="11pt" style:font-style-complex="normal" style:font-weight-complex="bold"/>
    </style:style>
    <style:style style:name="T35" style:family="text">
      <style:text-properties fo:font-variant="normal" fo:text-transform="none" style:text-line-through-style="none" style:text-line-through-type="none" style:text-position="30% 58%" style:font-name="JetBrains Mono" fo:font-size="11pt" fo:letter-spacing="normal" fo:font-style="normal" style:text-underline-style="none" fo:font-weight="bold" style:font-name-asian="JetBrains Mono" style:font-size-asian="11pt" style:font-style-asian="normal" style:font-weight-asian="bold" style:font-name-complex="JetBrains Mono" style:font-size-complex="11pt" style:font-style-complex="normal" style:font-weight-complex="bold"/>
    </style:style>
    <style:style style:name="T36" style:family="text">
      <style:text-properties fo:font-variant="normal" fo:text-transform="none" style:text-line-through-style="none" style:text-line-through-type="none" style:text-position="0% 100%" style:font-name="JetBrains Mono" fo:font-size="11pt" fo:letter-spacing="normal" fo:font-style="italic" style:text-underline-style="none" fo:font-weight="normal" style:font-name-asian="JetBrains Mono" style:font-size-asian="11pt" style:font-style-asian="italic" style:font-weight-asian="normal" style:font-name-complex="JetBrains Mono" style:font-size-complex="11pt" style:font-style-complex="italic" style:font-weight-complex="normal"/>
    </style:style>
    <style:style style:name="T37" style:family="text">
      <style:text-properties fo:font-variant="normal" fo:text-transform="none" style:text-line-through-style="none" style:text-line-through-type="none" style:text-position="30% 58%" style:font-name="JetBrains Mono" fo:font-size="11pt" fo:letter-spacing="normal" fo:font-style="italic" style:text-underline-style="none" fo:font-weight="normal" style:font-name-asian="JetBrains Mono" style:font-size-asian="11pt" style:font-style-asian="italic" style:font-weight-asian="normal" style:font-name-complex="JetBrains Mono" style:font-size-complex="11pt" style:font-style-complex="italic" style:font-weight-complex="normal"/>
    </style:style>
    <style:style style:name="T38" style:family="text">
      <style:text-properties fo:font-variant="normal" fo:text-transform="none" style:text-line-through-style="none" style:text-line-through-type="none" style:text-position="0% 100%" style:font-name="Courier Prime" fo:font-size="11pt" fo:letter-spacing="normal" fo:font-style="italic" style:text-underline-style="none" fo:font-weight="bold" style:font-name-asian="Courier Prime" style:font-size-asian="11pt" style:font-style-asian="italic" style:font-weight-asian="bold" style:font-name-complex="Courier Prime" style:font-size-complex="11pt" style:font-style-complex="italic" style:font-weight-complex="bold"/>
    </style:style>
    <style:style style:name="T39" style:family="text">
      <style:text-properties fo:font-variant="normal" fo:text-transform="none" fo:color="#000000" style:text-line-through-style="none" style:text-line-through-type="none" style:text-position="0% 100%" style:font-name="Century Gothic" fo:font-size="15.5pt" fo:letter-spacing="normal" fo:font-style="italic" style:text-underline-style="none" fo:font-weight="bold" style:font-name-asian="Century Gothic" style:font-size-asian="15.5pt" style:font-style-asian="italic" style:font-weight-asian="bold" style:font-name-complex="Century Gothic" style:font-size-complex="15.5pt" style:font-style-complex="italic" style:font-weight-complex="bold"/>
    </style:style>
    <style:style style:name="T40" style:family="text">
      <style:text-properties fo:font-variant="normal" fo:text-transform="none" fo:color="#000000" style:text-line-through-style="none" style:text-line-through-type="none" style:text-position="0% 100%" style:font-name="Century Gothic" fo:font-size="15.5pt" fo:letter-spacing="normal" fo:font-style="normal" style:text-underline-style="none" fo:font-weight="normal" style:font-name-asian="Century Gothic" style:font-size-asian="15.5pt" style:font-style-asian="normal" style:font-weight-asian="normal" style:font-name-complex="Century Gothic" style:font-size-complex="15.5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entury Gothic" fo:font-size="15.5pt" fo:letter-spacing="normal" fo:font-style="italic" style:text-underline-style="none" fo:font-weight="normal" style:font-name-asian="Century Gothic" style:font-size-asian="15.5pt" style:font-style-asian="italic" style:font-weight-asian="normal" style:font-name-complex="Century Gothic" style:font-size-complex="15.5pt" style:font-style-complex="italic" style:font-weight-complex="normal"/>
    </style:style>
    <style:style style:name="T42" style:family="text">
      <style:text-properties fo:font-variant="normal" fo:text-transform="none" fo:color="#000000" style:text-line-through-style="none" style:text-line-through-type="none" style:text-position="0% 100%" style:font-name="Century Gothic" fo:font-size="15.5pt" fo:letter-spacing="normal" fo:font-style="normal" style:text-underline-style="none" fo:font-weight="bold" style:font-name-asian="Century Gothic" style:font-size-asian="15.5pt" style:font-style-asian="normal" style:font-weight-asian="bold" style:font-name-complex="Century Gothic" style:font-size-complex="15.5pt" style:font-style-complex="normal" style:font-weight-complex="bold"/>
    </style:style>
    <style:style style:name="T43" style:family="text">
      <style:text-properties fo:font-variant="normal" fo:text-transform="none" fo:color="#0097a7" style:text-line-through-style="none" style:text-line-through-type="none" style:text-position="0% 100%" style:font-name="Century Gothic" fo:font-size="16pt" fo:letter-spacing="normal" fo:font-style="italic" style:text-underline-style="solid" style:text-underline-width="auto" style:text-underline-color="font-color" fo:font-weight="normal" style:font-name-asian="Century Gothic" style:font-size-asian="16pt" style:font-style-asian="italic" style:font-weight-asian="normal" style:font-name-complex="Century Gothic" style:font-size-complex="16pt" style:font-style-complex="italic" style:font-weight-complex="normal"/>
    </style:style>
    <style:style style:name="T44" style:family="text">
      <style:text-properties fo:font-variant="normal" fo:text-transform="none" style:text-line-through-style="none" style:text-line-through-type="none" style:text-position="0% 100%" style:font-name="JetBrains Mono" fo:font-size="11pt" fo:letter-spacing="normal" fo:font-style="normal" style:text-underline-style="none" fo:font-weight="normal" style:font-name-asian="JetBrains Mono" style:font-size-asian="11pt" style:font-style-asian="normal" style:font-weight-asian="normal" style:font-name-complex="JetBrains Mono" style:font-size-complex="11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urier Prime" fo:font-size="11pt" fo:letter-spacing="normal" fo:font-style="normal" style:text-underline-style="solid" style:text-underline-width="auto" style:text-underline-color="font-color" fo:font-weight="normal" style:font-name-asian="Courier Prime" style:font-size-asian="11pt" style:font-style-asian="normal" style:font-weight-asian="normal" style:font-name-complex="Courier Prime" style:font-size-complex="11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urier Prime" fo:font-size="11pt" fo:letter-spacing="normal" fo:font-style="normal" style:text-underline-style="none" fo:font-weight="normal" style:font-name-asian="Courier Prime" style:font-size-asian="11pt" style:font-style-asian="normal" style:font-weight-asian="normal" style:font-name-complex="Courier Prime" style:font-size-complex="11pt" style:font-style-complex="normal" style:font-weight-complex="normal"/>
    </style:style>
    <style:style style:name="T47" style:family="text">
      <style:text-properties fo:font-variant="normal" fo:text-transform="none" style:text-line-through-style="none" style:text-line-through-type="none" style:text-position="30% 58%" style:font-name="JetBrains Mono" fo:font-size="11pt" fo:letter-spacing="normal" fo:font-style="normal" style:text-underline-style="none" fo:font-weight="normal" style:font-name-asian="JetBrains Mono" style:font-size-asian="11pt" style:font-style-asian="normal" style:font-weight-asian="normal" style:font-name-complex="JetBrains Mono" style:font-size-complex="11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JetBrains Mono" fo:font-size="11pt" fo:letter-spacing="normal" fo:font-style="normal" style:text-underline-style="solid" style:text-underline-width="auto" style:text-underline-color="font-color" fo:font-weight="normal" style:font-name-asian="JetBrains Mono" style:font-size-asian="11pt" style:font-style-asian="normal" style:font-weight-asian="normal" style:font-name-complex="JetBrains Mono" style:font-size-complex="11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JetBrains Mono" fo:font-size="11pt" fo:letter-spacing="normal" fo:font-style="normal" style:text-underline-style="solid" style:text-underline-width="auto" style:text-underline-color="font-color" fo:font-weight="bold" style:font-name-asian="JetBrains Mono" style:font-size-asian="11pt" style:font-style-asian="normal" style:font-weight-asian="bold" style:font-name-complex="JetBrains Mono" style:font-size-complex="11pt" style:font-style-complex="normal" style:font-weight-complex="bold"/>
    </style:style>
    <style:style style:name="T50" style:family="text">
      <style:text-properties fo:font-variant="normal" fo:text-transform="none" fo:color="#000000" style:text-line-through-style="none" style:text-line-through-type="none" style:text-position="0% 100%" style:font-name="JetBrains Mono" fo:font-size="11pt" fo:letter-spacing="normal" fo:font-style="normal" style:text-underline-style="none" fo:font-weight="normal" style:font-name-asian="JetBrains Mono" style:font-size-asian="11pt" style:font-style-asian="normal" style:font-weight-asian="normal" style:font-name-complex="JetBrains Mono" style:font-size-complex="11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JetBrains Mono" fo:font-size="11pt" fo:letter-spacing="normal" fo:font-style="italic" style:text-underline-style="none" fo:font-weight="normal" style:font-name-asian="JetBrains Mono" style:font-size-asian="11pt" style:font-style-asian="italic" style:font-weight-asian="normal" style:font-name-complex="JetBrains Mono" style:font-size-complex="11pt" style:font-style-complex="italic" style:font-weight-complex="normal"/>
    </style:style>
    <style:style style:name="T52" style:family="text">
      <style:text-properties fo:font-variant="normal" fo:text-transform="none" style:text-line-through-style="none" style:text-line-through-type="none" style:text-position="0% 100%" fo:font-size="11pt" fo:letter-spacing="normal" fo:font-style="italic" style:text-underline-style="none" fo:font-weight="bold" style:font-size-asian="11pt" style:font-style-asian="italic" style:font-weight-asian="bold" style:font-size-complex="11pt" style:font-style-complex="italic" style:font-weight-complex="bold"/>
    </style:style>
    <style:style style:name="T53"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5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style:font-name="Century Gothic"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54cm" text:min-label-width="0.916cm"/>
        <style:text-properties style:font-name="Century Gothic" fo:color="#000000" fo:font-size="100%"/>
      </text:list-level-style-bullet>
      <text:list-level-style-bullet text:level="2" text:bullet-char="○">
        <style:list-level-properties text:space-before="1.624cm" text:min-label-width="0.916cm"/>
        <style:text-properties style:font-name="Century Gothic"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624cm" text:min-label-width="0.916cm"/>
        <style:text-properties style:font-name="Century Gothic"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71cm" text:min-label-width="0.899cm"/>
        <style:text-properties style:font-name="Century Gothic"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71cm" text:min-label-width="0.8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63cm" text:min-label-width="0.907cm"/>
        <style:text-properties style:font-name="Century Gothic"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63cm" text:min-label-width="0.907cm"/>
        <style:text-properties style:font-name="Century Gothic" fo:color="#000000" fo:font-size="100%"/>
      </text:list-level-style-bullet>
      <text:list-level-style-bullet text:level="2" text:bullet-char="○">
        <style:list-level-properties text:space-before="1.633cm" text:min-label-width="0.907cm"/>
        <style:text-properties style:font-name="Century Gothic"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63cm" text:min-label-width="0.907cm"/>
        <style:text-properties fo:color="#000000" fo:font-size="100%"/>
      </text:list-level-style-number>
      <text:list-level-style-bullet text:level="2" text:bullet-char="○">
        <style:list-level-properties text:space-before="1.633cm" text:min-label-width="0.907cm"/>
        <style:text-properties style:font-name="Century Gothic"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itting Models" draw:style-name="dp1" draw:master-page-name="SECTION_5f_HEADER_5f_1_5f_1">
        <draw:frame draw:name="Google Shape;290;p51" presentation:style-name="pr1" draw:text-style-name="P2" draw:layer="layout" svg:width="23.667cm" svg:height="2.003cm" svg:x="0.866cm" svg:y="0.428cm" presentation:class="title" presentation:user-transformed="true">
          <draw:text-box>
            <text:p text:style-name="P1"><text:span text:style-name="T1">Fitting Models</text:span></text:p>
          </draw:text-box>
        </draw:frame>
        <presentation:notes draw:style-name="dp2">
          <draw:page-thumbnail draw:name="Google Shape;287;1fa7fbc0-4fdf-11f1-b989-559790d196ef:notes" draw:style-name="gr1" draw:layer="layout" svg:width="16.932cm" svg:height="9.524cm" svg:x="1.059cm" svg:y="1.905cm" draw:page-number="1" presentation:class="page"/>
          <draw:frame draw:name="Google Shape;288;1fa7fbc0-4fdf-11f1-b989-559790d196ef:notes" presentation:style-name="pr2" draw:text-style-name="P4" draw:layer="layout" svg:width="15.239cm" svg:height="11.429cm" svg:x="1.905cm" svg:y="12.065cm" presentation:class="notes" presentation:user-transformed="true">
            <draw:text-box>
              <text:p text:style-name="P3"><text:span text:style-name="T2">This is the </text:span><text:span text:style-name="T3">pyret</text:span><text:span text:style-name="T2"> version of this lesson. Make sure you are using the right software tool (WeScheme, Pyret, CODAP, etc...</text:span></text:p>
              <text:p text:style-name="P3"><text:span text:style-name="T2">To learn more about how to use PearDeck, and how to view the embedded links on these slides without going into present mode visit https://help.peardeck.com/en</text:span></text:p>
              <text:p text:style-name="P3"><text:span text:style-name="T2"/></text:p>
            </draw:text-box>
          </draw:frame>
        </presentation:notes>
      </draw:page>
      <draw:page draw:name="Seeing Patterns, Building Models" draw:style-name="dp1" draw:master-page-name="TITLE_5f_AND_5f_BODY_5f_2_5f_3">
        <draw:frame draw:name="Google Shape;295;p52" presentation:style-name="pr3" draw:text-style-name="P8" draw:layer="layout" svg:width="20.914cm" svg:height="9.489cm" svg:x="3.508cm" svg:y="2.668cm" presentation:class="outline" presentation:user-transformed="true">
          <draw:text-box>
            <text:p text:style-name="P5"><text:span text:style-name="T4">Pyret has a function for making scatter plots, which has </text:span><text:span text:style-name="T5">four</text:span><text:span text:style-name="T4"> things in its Domain:</text:span></text:p>
            <text:list text:style-name="L4">
              <text:list-item>
                <text:p text:style-name="P6"><text:span text:style-name="T4">The table containing all the data</text:span></text:p>
              </text:list-item>
              <text:list-item>
                <text:p text:style-name="P5"><text:span text:style-name="T4">The name of the column to use for labels</text:span></text:p>
              </text:list-item>
              <text:list-item>
                <text:p text:style-name="P5"><text:span text:style-name="T4">The name of the column to use for the x-coordinates (xs)</text:span></text:p>
              </text:list-item>
              <text:list-item>
                <text:p text:style-name="P5"><text:span text:style-name="T4">The name of the column to use for the y-coordinates (ys)</text:span></text:p>
              </text:list-item>
            </text:list>
            <text:p text:style-name="P6"><text:span text:style-name="T4">Here's the Contract:</text:span></text:p>
            <text:p text:style-name="P6"><text:span text:style-name="T6"># scatter-plot :: (table-name :: Table, labels :: String, xs :: String, ys :: String) -&gt; Image</text:span><text:span text:style-name="T4"> Let's look at some data on lizards from an animal shelter...</text:span></text:p>
            <text:p text:style-name="P7"><text:span text:style-name="T7"/></text:p>
          </draw:text-box>
        </draw:frame>
        <draw:frame draw:name="Google Shape;296;p52" presentation:style-name="pr4" draw:text-style-name="P10" draw:layer="layout" svg:width="21.908cm" svg:height="1.59cm" svg:x="3.356cm" svg:y="0.178cm" presentation:class="title" presentation:user-transformed="true">
          <draw:text-box>
            <text:p text:style-name="P9"><text:span text:style-name="T8">Seeing Patterns, Building Models</text:span></text:p>
          </draw:text-box>
        </draw:frame>
        <presentation:notes draw:style-name="dp2">
          <draw:page-thumbnail draw:name="Google Shape;292;1fa7fbc1-4fdf-11f1-b989-559790d196ef:notes" draw:style-name="gr1" draw:layer="layout" svg:width="16.932cm" svg:height="9.524cm" svg:x="1.059cm" svg:y="1.905cm" draw:page-number="2" presentation:class="page"/>
          <draw:frame draw:name="Google Shape;293;1fa7fbc1-4fdf-11f1-b989-559790d196ef:notes" presentation:style-name="pr5" draw:text-style-name="P11" draw:layer="layout" svg:width="15.239cm" svg:height="11.429cm" svg:x="1.905cm" svg:y="12.065cm" presentation:class="notes" presentation:placeholder="true" presentation:user-transformed="true">
            <draw:text-box/>
          </draw:frame>
        </presentation:notes>
      </draw:page>
      <draw:page draw:name="Seeing Patterns, Building Models" draw:style-name="dp1" draw:master-page-name="TITLE_5f_AND_5f_BODY_5f_2_5f_4_5f_1">
        <draw:frame draw:name="Google Shape;301;p53" presentation:style-name="pr6" draw:text-style-name="P8" draw:layer="layout" svg:width="21.132cm" svg:height="9.489cm" svg:x="3.519cm" svg:y="2.786cm" presentation:class="outline" presentation:user-transformed="true">
          <draw:text-box>
            <text:list text:style-name="L7">
              <text:list-item>
                <text:p text:style-name="P12"><text:span text:style-name="T4">Open the </text:span><text:span text:style-name="T9"><text:a xlink:href="https://pyret.bootstrapworld.org/editor#shareurl=https://raw.githubusercontent.com/bootstrapworld/starter-files/fall2026/data-science/Lizard%20Sample%20Starter%20File.arr" xlink:type="simple">Lizard Sample Starter File</text:a></text:span><text:span text:style-name="T4"><text:s/>and click "Run".</text:span></text:p>
              </text:list-item>
              <text:list-item>
                <text:p text:style-name="P12"><text:span text:style-name="T4">Type </text:span><text:span text:style-name="T10">lizard-sample</text:span><text:span text:style-name="T4"> into the Interactions Area. What columns are in this table?</text:span></text:p>
              </text:list-item>
              <text:list-item>
                <text:p text:style-name="P12"><text:span text:style-name="T4">Make a scatter plot, using the following columns:</text:span></text:p>
              </text:list-item>
            </text:list>
            <text:list text:style-name="L8">
              <text:list-item>
                <text:list>
                  <text:list-item>
                    <text:p text:style-name="P12"><text:span text:style-name="T4">labels - the lizard's </text:span><text:span text:style-name="T10">name</text:span></text:p>
                  </text:list-item>
                  <text:list-item>
                    <text:p text:style-name="P12"><text:span text:style-name="T11">explanatory variable</text:span><text:span text:style-name="T4"> (x-axis) - weight in </text:span><text:span text:style-name="T10">pounds</text:span></text:p>
                  </text:list-item>
                  <text:list-item>
                    <text:p text:style-name="P12"><text:span text:style-name="T11">response variable</text:span><text:span text:style-name="T4"> (y-axis) - </text:span><text:span text:style-name="T10">weeks</text:span><text:span text:style-name="T4"> to be adoption.</text:span></text:p>
                  </text:list-item>
                </text:list>
              </text:list-item>
            </text:list>
            <text:p text:style-name="P6"><text:span text:style-name="T6"># scatter-plot :: (table-name :: Table, labels :: String, xs :: String, ys :: String) -&gt; Image</text:span></text:p>
            <text:p text:style-name="P7"><text:span text:style-name="T7"/></text:p>
          </draw:text-box>
        </draw:frame>
        <draw:frame draw:name="Google Shape;302;p53" presentation:style-name="pr7" draw:text-style-name="P10" draw:layer="layout" svg:width="21.908cm" svg:height="1.59cm" svg:x="3.356cm" svg:y="0.178cm" presentation:class="title" presentation:user-transformed="true">
          <draw:text-box>
            <text:p text:style-name="P9"><text:span text:style-name="T8">Seeing Patterns, Building Models</text:span></text:p>
          </draw:text-box>
        </draw:frame>
        <presentation:notes draw:style-name="dp2">
          <draw:page-thumbnail draw:name="Google Shape;298;1fa7fbc2-4fdf-11f1-b989-559790d196ef:notes" draw:style-name="gr1" draw:layer="layout" svg:width="16.932cm" svg:height="9.524cm" svg:x="1.059cm" svg:y="1.905cm" draw:page-number="3" presentation:class="page"/>
          <draw:frame draw:name="Google Shape;299;1fa7fbc2-4fdf-11f1-b989-559790d196ef:notes" presentation:style-name="pr8" draw:text-style-name="P11" draw:layer="layout" svg:width="15.239cm" svg:height="11.429cm" svg:x="1.905cm" svg:y="12.065cm" presentation:class="notes" presentation:placeholder="true" presentation:user-transformed="true">
            <draw:text-box/>
          </draw:frame>
        </presentation:notes>
      </draw:page>
      <draw:page draw:name="Seeing Patterns, Building Models" draw:style-name="dp1" draw:master-page-name="TITLE_5f_AND_5f_BODY_5f_2_5f_3">
        <draw:frame draw:name="Google Shape;307;p54" presentation:style-name="pr3" draw:text-style-name="P8" draw:layer="layout" svg:width="20.914cm" svg:height="9.489cm" svg:x="3.508cm" svg:y="2.668cm" presentation:class="outline" presentation:user-transformed="true">
          <draw:text-box>
            <text:list text:style-name="L7">
              <text:list-item>
                <text:p text:style-name="P12"><text:span text:style-name="T4">Do you see a pattern here, that relates </text:span><text:span text:style-name="T10">weeks</text:span><text:span text:style-name="T4"> to </text:span><text:span text:style-name="T10">pounds</text:span><text:span text:style-name="T4">? If so, how would you describe it?</text:span></text:p>
              </text:list-item>
              <text:list-item>
                <text:p text:style-name="P12"><text:span text:style-name="T4">If a new lizard appeared that weighed 2 pounds, how long would you predict it would take to be adopted?</text:span></text:p>
              </text:list-item>
              <text:list-item>
                <text:p text:style-name="P12"><text:span text:style-name="T4">How did you make your prediction?</text:span></text:p>
              </text:list-item>
            </text:list>
            <text:p text:style-name="P7"><text:span text:style-name="T7"/></text:p>
          </draw:text-box>
        </draw:frame>
        <draw:frame draw:name="Google Shape;308;p54" presentation:style-name="pr4" draw:text-style-name="P10" draw:layer="layout" svg:width="21.908cm" svg:height="1.59cm" svg:x="3.356cm" svg:y="0.178cm" presentation:class="title" presentation:user-transformed="true">
          <draw:text-box>
            <text:p text:style-name="P9"><text:span text:style-name="T8">Seeing Patterns, Building Models</text:span></text:p>
          </draw:text-box>
        </draw:frame>
        <draw:frame draw:name="Google Shape;309;p54" draw:style-name="gr2" draw:text-style-name="P13" draw:layer="layout" svg:width="21.908cm" svg:height="5.022cm" svg:x="2.327cm" svg:y="7.483cm">
          <draw:image xlink:href="Pictures/1000000000000800000001D6C595A9F19B7E01F5.png" xlink:type="simple" xlink:show="embed" xlink:actuate="onLoad">
            <text:p/>
          </draw:image>
        </draw:frame>
        <presentation:notes draw:style-name="dp2">
          <draw:page-thumbnail draw:name="Google Shape;304;1fa7fbc3-4fdf-11f1-b989-559790d196ef:notes" draw:style-name="gr1" draw:layer="layout" svg:width="16.932cm" svg:height="9.524cm" svg:x="1.059cm" svg:y="1.905cm" draw:page-number="4" presentation:class="page"/>
          <draw:frame draw:name="Google Shape;305;1fa7fbc3-4fdf-11f1-b989-559790d196ef:notes" presentation:style-name="pr9" draw:text-style-name="P4" draw:layer="layout" svg:width="15.239cm" svg:height="11.429cm" svg:x="1.905cm" svg:y="12.065cm" presentation:class="notes" presentation:user-transformed="true">
            <draw:text-box>
              <text:list text:style-name="L10">
                <text:list-item>
                  <text:p text:style-name="P14"><text:span text:style-name="T3">Do you see a pattern here, that relates </text:span><text:span text:style-name="T12">weeks to pounds? If so, how would you describe it?</text:span></text:p>
                </text:list-item>
                <text:list-item>
                  <text:p text:style-name="P14"><text:span text:style-name="T13">The goal is to draw out student-generated notions, that may or may not include formal language, e.g.</text:span></text:p>
                </text:list-item>
                <text:list-item>
                  <text:p text:style-name="P14"><text:span text:style-name="T14">"It looks like weeks to adoption generally decreases as the lizards get heavier."</text:span></text:p>
                </text:list-item>
                <text:list-item>
                  <text:p text:style-name="P14"><text:span text:style-name="T14">"I see a shape in the points the looks like this (motions with arms)."</text:span></text:p>
                </text:list-item>
                <text:list-item>
                  <text:p text:style-name="P14"><text:span text:style-name="T14">"The points seem to be clustering around a diagonal line with a negative slope."</text:span></text:p>
                </text:list-item>
                <text:list-item>
                  <text:p text:style-name="P14"><text:span text:style-name="T12">If a new lizard appeared that weighed 2 pounds, how long would you predict it would take to be adopted?</text:span></text:p>
                </text:list-item>
                <text:list-item>
                  <text:p text:style-name="P14"><text:span text:style-name="T13">I'm not 100% sure, but I would expect it would probably take between 7 and 10 weeks, and it would certainly be surprising if it took less than 6 weeks to be adopted.</text:span></text:p>
                </text:list-item>
                <text:list-item>
                  <text:p text:style-name="P14"><text:span text:style-name="T12">How did you make your prediction?</text:span></text:p>
                </text:list-item>
                <text:list-item>
                  <text:p text:style-name="P14"><text:span text:style-name="T13">I pictured a line.</text:span></text:p>
                </text:list-item>
                <text:list-item>
                  <text:p text:style-name="P14"><text:span text:style-name="T13">I pictured a wide paint brush going backwards through the points starting from the right until I got to 2.</text:span></text:p>
                </text:list-item>
                <text:list-item>
                  <text:p text:style-name="P14"><text:span text:style-name="T13">I thought about what point might come between (1,6) and (3,8)... which was (2,7) and then decided that based on the other points on the graph that point would probably be a little higher.</text:span></text:p>
                </text:list-item>
              </text:list>
              <text:p text:style-name="P3"><text:span text:style-name="T12">Teaching Tip</text:span></text:p>
              <text:p text:style-name="P3"><text:span text:style-name="T14">Project the scatter plot at the front of the room, and have students come up to point out their patterns.</text:span></text:p>
              <text:p text:style-name="P3"><text:span text:style-name="T14"/></text:p>
            </draw:text-box>
          </draw:frame>
        </presentation:notes>
      </draw:page>
      <draw:page draw:name="Seeing Patterns, Building Models" draw:style-name="dp1" draw:master-page-name="TITLE_5f_AND_5f_BODY_5f_2">
        <draw:frame draw:name="Google Shape;314;p55" presentation:style-name="pr10" draw:text-style-name="P8" draw:layer="layout" svg:width="20.699cm" svg:height="9.489cm" svg:x="3.578cm" svg:y="2.786cm" presentation:class="outline" presentation:user-transformed="true">
          <draw:text-box>
            <text:list text:style-name="L7">
              <text:list-item>
                <text:p text:style-name="P12"><text:span text:style-name="T4">Turn to the first section of </text:span><text:span text:style-name="T9"><text:a xlink:href="https://bootstrapworld.org/materials/fall2026/en-us/lessons/fitting-models/pages/how-could-we-measure-good-fit-lizard.html" xlink:type="simple">How could we Measure Whether a Model is a Good Fit? (Lizards)</text:a></text:span><text:span text:style-name="T4"><text:s/>and use a straightedge to draw a line that summarizes the trend you see in the data.</text:span></text:p>
              </text:list-item>
              <text:list-item>
                <text:p text:style-name="P12"><text:span text:style-name="T4">Think about how you would describe the line:</text:span></text:p>
              </text:list-item>
            </text:list>
            <text:list text:style-name="L8">
              <text:list-item>
                <text:list>
                  <text:list-item>
                    <text:p text:style-name="P12"><text:span text:style-name="T4">Can you name two points that it would pass through?</text:span></text:p>
                  </text:list-item>
                  <text:list-item>
                    <text:p text:style-name="P12"><text:span text:style-name="T4">Can you identify its slope?</text:span></text:p>
                  </text:list-item>
                  <text:list-item>
                    <text:p text:style-name="P12"><text:span text:style-name="T4">Where do you picture it crossing the y-axis?</text:span></text:p>
                  </text:list-item>
                </text:list>
              </text:list-item>
            </text:list>
            <text:p text:style-name="P7"><text:span text:style-name="T7"/></text:p>
          </draw:text-box>
        </draw:frame>
        <draw:frame draw:name="Google Shape;315;p55" presentation:style-name="pr11" draw:text-style-name="P10" draw:layer="layout" svg:width="21.908cm" svg:height="1.59cm" svg:x="3.356cm" svg:y="0.178cm" presentation:class="title" presentation:user-transformed="true">
          <draw:text-box>
            <text:p text:style-name="P9"><text:span text:style-name="T8">Seeing Patterns, Building Models</text:span></text:p>
          </draw:text-box>
        </draw:frame>
        <presentation:notes draw:style-name="dp2">
          <draw:page-thumbnail draw:name="Google Shape;311;1fa7fbc4-4fdf-11f1-b989-559790d196ef:notes" draw:style-name="gr1" draw:layer="layout" svg:width="16.932cm" svg:height="9.524cm" svg:x="1.059cm" svg:y="1.905cm" draw:page-number="5" presentation:class="page"/>
          <draw:frame draw:name="Google Shape;312;1fa7fbc4-4fdf-11f1-b989-559790d196ef:notes" presentation:style-name="pr12" draw:text-style-name="P11" draw:layer="layout" svg:width="15.239cm" svg:height="11.429cm" svg:x="1.905cm" svg:y="12.065cm" presentation:class="notes" presentation:placeholder="true" presentation:user-transformed="true">
            <draw:text-box/>
          </draw:frame>
        </presentation:notes>
      </draw:page>
      <draw:page draw:name="Seeing Patterns, Building Models" draw:style-name="dp1" draw:master-page-name="TITLE_5f_AND_5f_BODY_5f_2_5f_3">
        <draw:frame draw:name="Google Shape;320;p56" presentation:style-name="pr3" draw:text-style-name="P8" draw:layer="layout" svg:width="20.914cm" svg:height="9.489cm" svg:x="3.508cm" svg:y="2.668cm" presentation:class="outline" presentation:user-transformed="true">
          <draw:text-box>
            <text:p text:style-name="P5"><text:span text:style-name="T4">By drawing a line through our cloud of points, we are defining a </text:span><text:span text:style-name="T11">Model</text:span><text:span text:style-name="T4">: a summary of the relationship between two variables in a dataset. This model allows us to </text:span><text:span text:style-name="T15">make predictions</text:span><text:span text:style-name="T4"> about how long a new animal will stay at the shelter.</text:span></text:p>
            <text:p text:style-name="P6"><text:span text:style-name="T16">Data <text:s/>= <text:s/>Model <text:s/>+ <text:s/>Error</text:span></text:p>
            <text:p text:style-name="P6"><text:span text:style-name="T4">No line will touch every dot, so </text:span><text:span text:style-name="T5">every model will have some error</text:span><text:span text:style-name="T4">, compared to the original data! But if the line is close enough to enough of the dots, the model can still help us reason about adoption time.</text:span></text:p>
            <text:p text:style-name="P7"><text:span text:style-name="T7"/></text:p>
          </draw:text-box>
        </draw:frame>
        <draw:frame draw:name="Google Shape;321;p56" presentation:style-name="pr4" draw:text-style-name="P10" draw:layer="layout" svg:width="21.908cm" svg:height="1.59cm" svg:x="3.356cm" svg:y="0.178cm" presentation:class="title" presentation:user-transformed="true">
          <draw:text-box>
            <text:p text:style-name="P9"><text:span text:style-name="T8">Seeing Patterns, Building Models</text:span></text:p>
          </draw:text-box>
        </draw:frame>
        <presentation:notes draw:style-name="dp2">
          <draw:page-thumbnail draw:name="Google Shape;317;1fa7fbc5-4fdf-11f1-b989-559790d196ef:notes" draw:style-name="gr1" draw:layer="layout" svg:width="16.932cm" svg:height="9.524cm" svg:x="1.059cm" svg:y="1.905cm" draw:page-number="6" presentation:class="page"/>
          <draw:frame draw:name="Google Shape;318;1fa7fbc5-4fdf-11f1-b989-559790d196ef:notes" presentation:style-name="pr13" draw:text-style-name="P11" draw:layer="layout" svg:width="15.239cm" svg:height="11.429cm" svg:x="1.905cm" svg:y="12.065cm" presentation:class="notes" presentation:placeholder="true" presentation:user-transformed="true">
            <draw:text-box/>
          </draw:frame>
        </presentation:notes>
      </draw:page>
      <draw:page draw:name="Seeing Patterns, Building Models" draw:style-name="dp1" draw:master-page-name="TITLE_5f_AND_5f_BODY_5f_2_5f_2">
        <draw:frame draw:name="Google Shape;326;p57" presentation:style-name="pr14" draw:text-style-name="P8" draw:layer="layout" svg:width="13.531cm" svg:height="9.489cm" svg:x="1.193cm" svg:y="4.199cm" presentation:class="outline" presentation:user-transformed="true">
          <draw:text-box>
            <text:p text:style-name="P5"><text:span text:style-name="T4"><text:s/></text:span><text:span text:style-name="T4">The line that is </text:span><text:span text:style-name="T5">closest</text:span><text:span text:style-name="T4"> to all the other points is known as the </text:span><text:span text:style-name="T11">line of best fit</text:span><text:span text:style-name="T4">, meaning it is the </text:span><text:span text:style-name="T5">best possible summary</text:span><text:span text:style-name="T4"> of the relationship and therefore the </text:span><text:span text:style-name="T5">best possible model</text:span><text:span text:style-name="T4">.</text:span></text:p>
            <text:p text:style-name="P7"><text:span text:style-name="T7"/></text:p>
          </draw:text-box>
        </draw:frame>
        <draw:frame draw:name="Google Shape;327;p57" presentation:style-name="pr15" draw:text-style-name="P10" draw:layer="layout" svg:width="21.908cm" svg:height="1.59cm" svg:x="3.356cm" svg:y="0.178cm" presentation:class="title" presentation:user-transformed="true">
          <draw:text-box>
            <text:p text:style-name="P9"><text:span text:style-name="T8">Seeing Patterns, Building Models</text:span></text:p>
          </draw:text-box>
        </draw:frame>
        <draw:frame draw:name="Google Shape;328;p57" draw:style-name="gr2" draw:text-style-name="P13" draw:layer="layout" svg:width="9.64cm" svg:height="6.844cm" svg:x="15.099cm" svg:y="4.365cm">
          <draw:image xlink:href="Pictures/10000201000003200000023860C20D2FC9AB98B8.png" xlink:type="simple" xlink:show="embed" xlink:actuate="onLoad">
            <text:p/>
          </draw:image>
        </draw:frame>
        <presentation:notes draw:style-name="dp2">
          <draw:page-thumbnail draw:name="Google Shape;323;1fa822d0-4fdf-11f1-b989-559790d196ef:notes" draw:style-name="gr1" draw:layer="layout" svg:width="16.932cm" svg:height="9.524cm" svg:x="1.059cm" svg:y="1.905cm" draw:page-number="7" presentation:class="page"/>
          <draw:frame draw:name="Google Shape;324;1fa822d0-4fdf-11f1-b989-559790d196ef:notes" presentation:style-name="pr16" draw:text-style-name="P11" draw:layer="layout" svg:width="15.239cm" svg:height="11.429cm" svg:x="1.905cm" svg:y="12.065cm" presentation:class="notes" presentation:placeholder="true" presentation:user-transformed="true">
            <draw:text-box/>
          </draw:frame>
        </presentation:notes>
      </draw:page>
      <draw:page draw:name="Seeing Patterns, Building Models" draw:style-name="dp1" draw:master-page-name="TITLE_5f_AND_5f_BODY_5f_2_5f_1">
        <draw:frame draw:name="Google Shape;333;p58" presentation:style-name="pr17" draw:text-style-name="P10" draw:layer="layout" svg:width="21.908cm" svg:height="1.59cm" svg:x="3.356cm" svg:y="0.178cm" presentation:class="title" presentation:user-transformed="true">
          <draw:text-box>
            <text:p text:style-name="P9"><text:span text:style-name="T8">Seeing Patterns, Building Models</text:span></text:p>
          </draw:text-box>
        </draw:frame>
        <draw:frame draw:name="Google Shape;334;p58" presentation:style-name="pr18" draw:text-style-name="P8" draw:layer="layout" svg:width="21.032cm" svg:height="9.489cm" svg:x="3.602cm" svg:y="2.707cm" presentation:class="outline" presentation:user-transformed="true">
          <draw:text-box>
            <text:p text:style-name="P5"><text:span text:style-name="T4">While most of us might have pictured similar lines (models!), it's likely that different people see slightly </text:span><text:span text:style-name="T5">different</text:span><text:span text:style-name="T4"> lines. How do we know which model is best? </text:span><text:span text:style-name="T5">How do we know whose </text:span><text:span text:style-name="T11">model</text:span><text:span text:style-name="T5"> has the least error?</text:span></text:p>
            <text:list text:style-name="L7">
              <text:list-item>
                <text:p text:style-name="P6"><text:span text:style-name="T4">Turn to the second section of </text:span><text:span text:style-name="T9"><text:a xlink:href="https://bootstrapworld.org/materials/fall2026/en-us/lessons/fitting-models/pages/how-could-we-measure-good-fit-lizard.html" xlink:type="simple">How could we Measure Whether a Model is a Good Fit? (Lizards)</text:a></text:span><text:span text:style-name="T4">.</text:span></text:p>
              </text:list-item>
              <text:list-item>
                <text:p text:style-name="P5"><text:span text:style-name="T4">With your partner, discuss Cy and Jo's models and complete the questions on the page.</text:span></text:p>
              </text:list-item>
            </text:list>
            <text:p text:style-name="P7"><text:span text:style-name="T7"/></text:p>
          </draw:text-box>
        </draw:frame>
        <presentation:notes draw:style-name="dp2">
          <draw:page-thumbnail draw:name="Google Shape;330;1fa822d1-4fdf-11f1-b989-559790d196ef:notes" draw:style-name="gr1" draw:layer="layout" svg:width="16.932cm" svg:height="9.524cm" svg:x="1.059cm" svg:y="1.905cm" draw:page-number="8" presentation:class="page"/>
          <draw:frame draw:name="Google Shape;331;1fa822d1-4fdf-11f1-b989-559790d196ef:notes" presentation:style-name="pr19" draw:text-style-name="P4" draw:layer="layout" svg:width="15.239cm" svg:height="11.429cm" svg:x="1.905cm" svg:y="12.065cm" presentation:class="notes" presentation:user-transformed="true">
            <draw:text-box>
              <text:p text:style-name="P3"><text:span text:style-name="T2">Students might come up with all kinds of ways to measure fitness! For example...</text:span></text:p>
              <text:list text:style-name="L10">
                <text:list-item>
                  <text:p text:style-name="P3"><text:span text:style-name="T2">Count the number of points that the line touches</text:span></text:p>
                </text:list-item>
                <text:list-item>
                  <text:p text:style-name="P3"><text:span text:style-name="T2">Measure the </text:span><text:span text:style-name="T17">horizontal</text:span><text:span text:style-name="T2"> distance between each point and the line, and </text:span><text:span text:style-name="T17">add</text:span><text:span text:style-name="T2"> those distances</text:span></text:p>
                </text:list-item>
                <text:list-item>
                  <text:p text:style-name="P3"><text:span text:style-name="T2">Measure the </text:span><text:span text:style-name="T17">vertical</text:span><text:span text:style-name="T2"> distance between each point and the line, and take the </text:span><text:span text:style-name="T17">mean</text:span><text:span text:style-name="T2"> of those distances</text:span></text:p>
                </text:list-item>
                <text:list-item>
                  <text:p text:style-name="P3"><text:span text:style-name="T2">Measure the </text:span><text:span text:style-name="T17">perpendicular</text:span><text:span text:style-name="T2"> distance between each point and the line, and take the </text:span><text:span text:style-name="T17">median</text:span><text:span text:style-name="T2"> of those distances</text:span></text:p>
                </text:list-item>
                <text:list-item>
                  <text:p text:style-name="P3"><text:span text:style-name="T2">Some combination of the above, or something else completely different!</text:span></text:p>
                </text:list-item>
              </text:list>
              <text:p text:style-name="P3"><text:span text:style-name="T2">Encourage them to share these ideas aloud.</text:span></text:p>
              <text:p text:style-name="P3"><text:span text:style-name="T2"/></text:p>
            </draw:text-box>
          </draw:frame>
        </presentation:notes>
      </draw:page>
      <draw:page draw:name="Seeing Patterns, Building Models" draw:style-name="dp1" draw:master-page-name="TITLE_5f_AND_5f_BODY_5f_2_5f_1_5f_1">
        <draw:frame draw:name="Google Shape;339;p59" presentation:style-name="pr20" draw:text-style-name="P10" draw:layer="layout" svg:width="21.908cm" svg:height="1.59cm" svg:x="3.356cm" svg:y="0.178cm" presentation:class="title" presentation:user-transformed="true">
          <draw:text-box>
            <text:p text:style-name="P9"><text:span text:style-name="T8">Seeing Patterns, Building Models</text:span></text:p>
          </draw:text-box>
        </draw:frame>
        <draw:frame draw:name="Google Shape;340;p59" presentation:style-name="pr21" draw:text-style-name="P8" draw:layer="layout" svg:width="21.327cm" svg:height="9.489cm" svg:x="3.26cm" svg:y="2.72cm" presentation:class="outline" presentation:user-transformed="true">
          <draw:text-box>
            <text:list text:style-name="L7">
              <text:list-item>
                <text:p text:style-name="P12"><text:span text:style-name="T4">What criteria did you come up with for how to assess whether or not a model is a good fit for the data?</text:span></text:p>
              </text:list-item>
              <text:list-item>
                <text:p text:style-name="P12"><text:span text:style-name="T4">How could we measure the distance between the data points and the linear model?</text:span></text:p>
              </text:list-item>
            </text:list>
            <text:p text:style-name="P7"><text:span text:style-name="T7"/></text:p>
          </draw:text-box>
        </draw:frame>
        <presentation:notes draw:style-name="dp2">
          <draw:page-thumbnail draw:name="Google Shape;336;1fa822d2-4fdf-11f1-b989-559790d196ef:notes" draw:style-name="gr1" draw:layer="layout" svg:width="16.932cm" svg:height="9.524cm" svg:x="1.059cm" svg:y="1.905cm" draw:page-number="9" presentation:class="page"/>
          <draw:frame draw:name="Google Shape;337;1fa822d2-4fdf-11f1-b989-559790d196ef:notes" presentation:style-name="pr22" draw:text-style-name="P4" draw:layer="layout" svg:width="15.239cm" svg:height="11.429cm" svg:x="1.905cm" svg:y="12.065cm" presentation:class="notes" presentation:user-transformed="true">
            <draw:text-box>
              <text:list text:style-name="L10">
                <text:list-item>
                  <text:p text:style-name="P14"><text:span text:style-name="T3">What criteria did you come up with for how to assess whether or not a model is a good fit for the data?</text:span></text:p>
                </text:list-item>
                <text:list-item>
                  <text:p text:style-name="P14"><text:span text:style-name="T17">Answers will vary. Ideas might include:</text:span></text:p>
                </text:list-item>
                <text:list-item>
                  <text:p text:style-name="P14"><text:span text:style-name="T17">The points should be as evenly distributed around the model as possible.</text:span></text:p>
                </text:list-item>
                <text:list-item>
                  <text:p text:style-name="P14"><text:span text:style-name="T2">We could see how the number of points above the line and below the line compare.</text:span></text:p>
                </text:list-item>
                <text:list-item>
                  <text:p text:style-name="P14"><text:span text:style-name="T2">We could measure the distance between the points and the line and try to make sure the average distance above is balanced with the average distance below.</text:span></text:p>
                </text:list-item>
                <text:list-item>
                  <text:p text:style-name="P14"><text:span text:style-name="T3">How could we measure the distance between the data points and the linear model?</text:span></text:p>
                </text:list-item>
                <text:list-item>
                  <text:p text:style-name="P14"><text:span text:style-name="T17">Answers will vary. Ideas might include:</text:span></text:p>
                </text:list-item>
                <text:list-item>
                  <text:p text:style-name="P14"><text:span text:style-name="T17">By drawing vertical lines connecting each data points to the linear model.</text:span></text:p>
                </text:list-item>
                <text:list-item>
                  <text:p text:style-name="P14"><text:span text:style-name="T17">By drawing horizontal lines connecting each data points to the linear model.</text:span></text:p>
                </text:list-item>
                <text:list-item>
                  <text:p text:style-name="P14"><text:span text:style-name="T17">By drawing diagonal lines connecting each data points to the linear model. Push students to recognize that in order for this measurement to be useful they would have to be perpendicular to the linear model!</text:span></text:p>
                </text:list-item>
                <text:list-item>
                  <text:p text:style-name="P14"><text:span text:style-name="T17">By drawing squares with one corner on the data point and the opposite corner on the linear model.</text:span></text:p>
                </text:list-item>
              </text:list>
              <text:p text:style-name="P3"><text:span text:style-name="T2"/></text:p>
            </draw:text-box>
          </draw:frame>
        </presentation:notes>
      </draw:page>
      <draw:page draw:name="Introducing S" draw:style-name="dp1" draw:master-page-name="TITLE_5f_AND_5f_BODY_5f_2">
        <draw:frame draw:name="Google Shape;345;p60" presentation:style-name="pr10" draw:text-style-name="P8" draw:layer="layout" svg:width="20.699cm" svg:height="9.489cm" svg:x="3.578cm" svg:y="2.786cm" presentation:class="outline" presentation:user-transformed="true">
          <draw:text-box>
            <text:p text:style-name="P5"><text:span text:style-name="T4">Pyret has a function called </text:span><text:span text:style-name="T18">fit-model</text:span><text:span text:style-name="T4">, that takes in a function and graphs it on top of a scatter plot.</text:span></text:p>
            <text:p text:style-name="P6"><text:span text:style-name="T4">Take a look at the contract for </text:span><text:span text:style-name="T18">fit-model</text:span><text:span text:style-name="T4"> in your </text:span><text:span text:style-name="T9"><text:a xlink:href="https://bootstrapworld.org/materials/fall2026/en-us/Contracts.shtml" xlink:type="simple">contracts page</text:a></text:span><text:span text:style-name="T4">. What is its Domain?</text:span></text:p>
            <text:p text:style-name="P7"><text:span text:style-name="T7"/></text:p>
          </draw:text-box>
        </draw:frame>
        <draw:frame draw:name="Google Shape;346;p60" presentation:style-name="pr11"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presentation:notes draw:style-name="dp2">
          <draw:page-thumbnail draw:name="Google Shape;342;1fa822d3-4fdf-11f1-b989-559790d196ef:notes" draw:style-name="gr1" draw:layer="layout" svg:width="16.932cm" svg:height="9.524cm" svg:x="1.059cm" svg:y="1.905cm" draw:page-number="10" presentation:class="page"/>
          <draw:frame draw:name="Google Shape;343;1fa822d3-4fdf-11f1-b989-559790d196ef:notes" presentation:style-name="pr23" draw:text-style-name="P4" draw:layer="layout" svg:width="15.239cm" svg:height="11.429cm" svg:x="1.905cm" svg:y="12.065cm" presentation:class="notes" presentation:user-transformed="true">
            <draw:text-box>
              <text:list text:style-name="L10">
                <text:list-item>
                  <text:p text:style-name="P14"><text:span text:style-name="T3">Take a look at the contract for </text:span><text:span text:style-name="T20">fit-model in your </text:span><text:span text:style-name="T21"><text:a xlink:href="https://bootstrapworld.org/materials/fall2026/en-us/Contracts.shtml" xlink:type="simple">contracts page</text:a></text:span><text:span text:style-name="T22">. What is its Domain?</text:span></text:p>
                </text:list-item>
                <text:list-item>
                  <text:p text:style-name="P14"><text:span text:style-name="T23">Like </text:span><text:span text:style-name="T24">scatter-plot, it consumes columns for our labels, our </text:span><text:span text:style-name="T25">xs, our ys...</text:span></text:p>
                </text:list-item>
                <text:list-item>
                  <text:p text:style-name="P14"><text:span text:style-name="T25">Unlike </text:span><text:span text:style-name="T24">scatter-plot, it consumes a function!</text:span></text:p>
                </text:list-item>
              </text:list>
              <text:p text:style-name="P3"><text:span text:style-name="T26"/></text:p>
            </draw:text-box>
          </draw:frame>
        </presentation:notes>
      </draw:page>
      <draw:page draw:name="Introducing S" draw:style-name="dp1" draw:master-page-name="TITLE_5f_AND_5f_BODY_5f_2">
        <draw:frame draw:name="Google Shape;351;p61" presentation:style-name="pr10" draw:text-style-name="P8" draw:layer="layout" svg:width="20.699cm" svg:height="9.489cm" svg:x="3.578cm" svg:y="2.786cm" presentation:class="outline" presentation:user-transformed="true">
          <draw:text-box>
            <text:list text:style-name="L7">
              <text:list-item>
                <text:p text:style-name="P12"><text:span text:style-name="T4">Take a few minutes to consider the code and data visualizations on </text:span><text:span text:style-name="T9"><text:a xlink:href="https://bootstrapworld.org/materials/fall2026/en-us/lessons/fitting-models/pages/intro-fit-model.html" xlink:type="simple">Introducing fit-model</text:a></text:span><text:span text:style-name="T4">.</text:span></text:p>
              </text:list-item>
              <text:list-item>
                <text:p text:style-name="P12"><text:span text:style-name="T4">Record your observations and be ready to share them with the class.</text:span></text:p>
              </text:list-item>
            </text:list>
            <text:p text:style-name="P7"><text:span text:style-name="T7"/></text:p>
          </draw:text-box>
        </draw:frame>
        <draw:frame draw:name="Google Shape;352;p61" presentation:style-name="pr11"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presentation:notes draw:style-name="dp2">
          <draw:page-thumbnail draw:name="Google Shape;348;1fa822d4-4fdf-11f1-b989-559790d196ef:notes" draw:style-name="gr1" draw:layer="layout" svg:width="16.932cm" svg:height="9.524cm" svg:x="1.059cm" svg:y="1.905cm" draw:page-number="11" presentation:class="page"/>
          <draw:frame draw:name="Google Shape;349;1fa822d4-4fdf-11f1-b989-559790d196ef:notes" presentation:style-name="pr24" draw:text-style-name="P11" draw:layer="layout" svg:width="15.239cm" svg:height="11.429cm" svg:x="1.905cm" svg:y="12.065cm" presentation:class="notes" presentation:placeholder="true" presentation:user-transformed="true">
            <draw:text-box/>
          </draw:frame>
        </presentation:notes>
      </draw:page>
      <draw:page draw:name="Introducing S" draw:style-name="dp1" draw:master-page-name="TITLE_5f_AND_5f_BODY_5f_2">
        <draw:frame draw:name="Google Shape;357;p62" presentation:style-name="pr10" draw:text-style-name="P8" draw:layer="layout" svg:width="20.699cm" svg:height="9.489cm" svg:x="3.578cm" svg:y="2.786cm" presentation:class="outline" presentation:user-transformed="true">
          <draw:text-box>
            <text:p text:style-name="P5"><text:span text:style-name="T4">What do you Notice and Wonder about the code?</text:span></text:p>
            <text:p text:style-name="P7"><text:span text:style-name="T7"/></text:p>
          </draw:text-box>
        </draw:frame>
        <draw:frame draw:name="Google Shape;358;p62" presentation:style-name="pr11"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draw:frame draw:name="Google Shape;359;p62" draw:style-name="gr2" draw:text-style-name="P13" draw:layer="layout" svg:width="24.018cm" svg:height="1.234cm" svg:x="1.002cm" svg:y="5.372cm">
          <draw:image xlink:href="Pictures/100000000000080000000069EE072DBA673A3BD1.png" xlink:type="simple" xlink:show="embed" xlink:actuate="onLoad">
            <text:p/>
          </draw:image>
        </draw:frame>
        <presentation:notes draw:style-name="dp2">
          <draw:page-thumbnail draw:name="Google Shape;354;1fa822d5-4fdf-11f1-b989-559790d196ef:notes" draw:style-name="gr1" draw:layer="layout" svg:width="16.932cm" svg:height="9.524cm" svg:x="1.059cm" svg:y="1.905cm" draw:page-number="12" presentation:class="page"/>
          <draw:frame draw:name="Google Shape;355;1fa822d5-4fdf-11f1-b989-559790d196ef:notes" presentation:style-name="pr23" draw:text-style-name="P4" draw:layer="layout" svg:width="15.239cm" svg:height="11.429cm" svg:x="1.905cm" svg:y="12.065cm" presentation:class="notes" presentation:user-transformed="true">
            <draw:text-box>
              <text:list text:style-name="L10">
                <text:list-item>
                  <text:p text:style-name="P14"><text:span text:style-name="T3">What do you Notice and Wonder about the code?</text:span></text:p>
                </text:list-item>
              </text:list>
              <text:p text:style-name="P3"><text:span text:style-name="T2"/></text:p>
            </draw:text-box>
          </draw:frame>
        </presentation:notes>
      </draw:page>
      <draw:page draw:name="Introducing S" draw:style-name="dp1" draw:master-page-name="TITLE_5f_AND_5f_BODY_5f_2">
        <draw:frame draw:name="Google Shape;364;p63" presentation:style-name="pr10" draw:text-style-name="P8" draw:layer="layout" svg:width="20.699cm" svg:height="9.489cm" svg:x="3.578cm" svg:y="2.786cm" presentation:class="outline" presentation:user-transformed="true">
          <draw:text-box>
            <text:list text:style-name="L7">
              <text:list-item>
                <text:p text:style-name="P12"><text:span text:style-name="T4">What do you Notice?</text:span></text:p>
              </text:list-item>
              <text:list-item>
                <text:p text:style-name="P12"><text:span text:style-name="T4">What do you Wonder?</text:span></text:p>
              </text:list-item>
              <text:list-item>
                <text:p text:style-name="P12"><text:span text:style-name="T4">Compare the </text:span><text:span text:style-name="T18">fit-model</text:span><text:span text:style-name="T4"> display for </text:span><text:span text:style-name="T10">cy</text:span><text:span text:style-name="T4"> to the </text:span><text:span text:style-name="T18">fit-model</text:span><text:span text:style-name="T4"> display for </text:span><text:span text:style-name="T10">jo</text:span><text:span text:style-name="T4">. How are they </text:span><text:span text:style-name="T5">similar?</text:span><text:span text:style-name="T4"> How are they </text:span><text:span text:style-name="T5">different?</text:span></text:p>
              </text:list-item>
            </text:list>
            <text:p text:style-name="P7"><text:span text:style-name="T7"/></text:p>
          </draw:text-box>
        </draw:frame>
        <draw:frame draw:name="Google Shape;365;p63" presentation:style-name="pr11"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draw:frame draw:name="Google Shape;366;p63" draw:style-name="gr2" draw:text-style-name="P13" draw:layer="layout" svg:width="18.505cm" svg:height="7.349cm" svg:x="3.578cm" svg:y="6.37cm">
          <draw:image xlink:href="Pictures/10000000000008000000032DFE0ADB2728F502A9.png" xlink:type="simple" xlink:show="embed" xlink:actuate="onLoad">
            <text:p/>
          </draw:image>
        </draw:frame>
        <presentation:notes draw:style-name="dp2">
          <draw:page-thumbnail draw:name="Google Shape;361;1fa822d6-4fdf-11f1-b989-559790d196ef:notes" draw:style-name="gr1" draw:layer="layout" svg:width="16.932cm" svg:height="9.524cm" svg:x="1.059cm" svg:y="1.905cm" draw:page-number="13" presentation:class="page"/>
          <draw:frame draw:name="Google Shape;362;1fa822d6-4fdf-11f1-b989-559790d196ef:notes" presentation:style-name="pr23" draw:text-style-name="P4" draw:layer="layout" svg:width="15.239cm" svg:height="11.429cm" svg:x="1.905cm" svg:y="12.065cm" presentation:class="notes" presentation:user-transformed="true">
            <draw:text-box>
              <text:list text:style-name="L10">
                <text:list-item>
                  <text:p text:style-name="P14"><text:span text:style-name="T3">What do you Notice?</text:span></text:p>
                </text:list-item>
                <text:list-item>
                  <text:p text:style-name="P14"><text:span text:style-name="T3">What do you Wonder?</text:span></text:p>
                </text:list-item>
                <text:list-item>
                  <text:p text:style-name="P14"><text:span text:style-name="T3">Compare the </text:span><text:span text:style-name="T20">fit-model display for cy to the fit-model display for jo. How are they </text:span><text:span text:style-name="T27">similar?</text:span><text:span text:style-name="T20"> How are they </text:span><text:span text:style-name="T27">different?</text:span><text:span text:style-name="T20"> </text:span></text:p>
                </text:list-item>
                <text:list-item>
                  <text:p text:style-name="P14"><text:span text:style-name="T24">Both models have a blue line and red dots.</text:span></text:p>
                </text:list-item>
                <text:list-item>
                  <text:p text:style-name="P14"><text:span text:style-name="T24">The x-axis goes from 0 to 8 for both of them.</text:span></text:p>
                </text:list-item>
                <text:list-item>
                  <text:p text:style-name="P14"><text:span text:style-name="T24">The y-axis for cy is numbered 0 to 20. It goes from 3 to 9 for jo.</text:span></text:p>
                </text:list-item>
                <text:list-item>
                  <text:p text:style-name="P14"><text:span text:style-name="T24">jo has more red dots below the blue line than above it.</text:span></text:p>
                </text:list-item>
                <text:list-item>
                  <text:p text:style-name="P14"><text:span text:style-name="T24">The data points for jo more or less fill the vertical space of the display, whereas for cy there are only data points in the bottom half of the display.</text:span></text:p>
                </text:list-item>
              </text:list>
              <text:p text:style-name="P3"><text:span text:style-name="T26"/></text:p>
            </draw:text-box>
          </draw:frame>
        </presentation:notes>
      </draw:page>
      <draw:page draw:name="Introducing S" draw:style-name="dp1" draw:master-page-name="TITLE_5f_AND_5f_BODY_5f_2_5f_2">
        <draw:frame draw:name="Google Shape;371;p64" presentation:style-name="pr14" draw:text-style-name="P8" draw:layer="layout" svg:width="14.436cm" svg:height="9.489cm" svg:x="1.193cm" svg:y="4.199cm" presentation:class="outline" presentation:user-transformed="true">
          <draw:text-box>
            <text:p text:style-name="P5"><text:span text:style-name="T28">When we graph a model in Pyret, we can see that:</text:span></text:p>
            <text:list text:style-name="L12">
              <text:list-item>
                <text:p text:style-name="P6"><text:span text:style-name="T28">some of the points are close to the line ("real" </text:span><text:span text:style-name="T29">y</text:span><text:span text:style-name="T28"> is close to "predicted" </text:span><text:span text:style-name="T29">y</text:span><text:span text:style-name="T28">)</text:span></text:p>
              </text:list-item>
              <text:list-item>
                <text:p text:style-name="P5"><text:span text:style-name="T28">some points are quite far away ("real" </text:span><text:span text:style-name="T29">y</text:span><text:span text:style-name="T28"> is far from "predicted" </text:span><text:span text:style-name="T29">y</text:span><text:span text:style-name="T28">)</text:span></text:p>
              </text:list-item>
            </text:list>
            <text:p text:style-name="P6"><text:span text:style-name="T28">The difference between any real </text:span><text:span text:style-name="T29">y</text:span><text:span text:style-name="T28"> and predicted </text:span><text:span text:style-name="T29">y</text:span><text:span text:style-name="T28"> is called the </text:span><text:span text:style-name="T30">residual</text:span><text:span text:style-name="T28">, and it measures how far off that one point in the model is from the actual data. The smaller the residuals, the better a model fits!</text:span></text:p>
            <text:p text:style-name="P7"><text:span text:style-name="T7"/></text:p>
          </draw:text-box>
        </draw:frame>
        <draw:frame draw:name="Google Shape;372;p64" presentation:style-name="pr15"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draw:frame draw:name="Google Shape;373;p64" draw:style-name="gr2" draw:text-style-name="P13" draw:layer="layout" svg:width="9.328cm" svg:height="5.083cm" svg:x="15.629cm" svg:y="5.277cm">
          <draw:image xlink:href="Pictures/1000020100000190000000DA8B2BFF0266AEC8D9.png" xlink:type="simple" xlink:show="embed" xlink:actuate="onLoad">
            <text:p/>
          </draw:image>
        </draw:frame>
        <presentation:notes draw:style-name="dp2">
          <draw:page-thumbnail draw:name="Google Shape;368;1fa822d7-4fdf-11f1-b989-559790d196ef:notes" draw:style-name="gr1" draw:layer="layout" svg:width="16.932cm" svg:height="9.524cm" svg:x="1.059cm" svg:y="1.905cm" draw:page-number="14" presentation:class="page"/>
          <draw:frame draw:name="Google Shape;369;1fa822d7-4fdf-11f1-b989-559790d196ef:notes" presentation:style-name="pr25" draw:text-style-name="P11" draw:layer="layout" svg:width="15.239cm" svg:height="11.429cm" svg:x="1.905cm" svg:y="12.065cm" presentation:class="notes" presentation:placeholder="true" presentation:user-transformed="true">
            <draw:text-box/>
          </draw:frame>
        </presentation:notes>
      </draw:page>
      <draw:page draw:name="Introducing S" draw:style-name="dp1" draw:master-page-name="TITLE_5f_AND_5f_BODY_5f_2">
        <draw:frame draw:name="Google Shape;378;p65" presentation:style-name="pr10" draw:text-style-name="P8" draw:layer="layout" svg:width="20.699cm" svg:height="9.489cm" svg:x="3.578cm" svg:y="2.786cm" presentation:class="outline" presentation:user-transformed="true">
          <draw:text-box>
            <text:p text:style-name="P5"><text:span text:style-name="T4">There are three terms in the legend at the bottom. What do they refer to?</text:span></text:p>
            <text:p text:style-name="P7"><text:span text:style-name="T7"/></text:p>
          </draw:text-box>
        </draw:frame>
        <draw:frame draw:name="Google Shape;379;p65" presentation:style-name="pr11"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presentation:notes draw:style-name="dp2">
          <draw:page-thumbnail draw:name="Google Shape;375;1fa822d8-4fdf-11f1-b989-559790d196ef:notes" draw:style-name="gr1" draw:layer="layout" svg:width="16.932cm" svg:height="9.524cm" svg:x="1.059cm" svg:y="1.905cm" draw:page-number="15" presentation:class="page"/>
          <draw:frame draw:name="Google Shape;376;1fa822d8-4fdf-11f1-b989-559790d196ef:notes" presentation:style-name="pr23" draw:text-style-name="P4" draw:layer="layout" svg:width="15.239cm" svg:height="11.429cm" svg:x="1.905cm" svg:y="12.065cm" presentation:class="notes" presentation:user-transformed="true">
            <draw:text-box>
              <text:list text:style-name="L10">
                <text:list-item>
                  <text:p text:style-name="P14"><text:span text:style-name="T3">There are three terms in the legend at the bottom. What do they refer to?</text:span></text:p>
                </text:list-item>
                <text:list-item>
                  <text:p text:style-name="P14"><text:span text:style-name="T17">The blue line is the model.</text:span></text:p>
                </text:list-item>
                <text:list-item>
                  <text:p text:style-name="P14"><text:span text:style-name="T17">The red dots are the data from the data set.</text:span></text:p>
                </text:list-item>
                <text:list-item>
                  <text:p text:style-name="P14"><text:span text:style-name="T17">Residuals refer to the vertical black lines connecting the data points to the model, representing the distance between the data and the value the model predicts. They vary in length depending on how far above or below the model the data is situated.</text:span></text:p>
                </text:list-item>
              </text:list>
              <text:p text:style-name="P3"><text:span text:style-name="T2"/></text:p>
            </draw:text-box>
          </draw:frame>
        </presentation:notes>
      </draw:page>
      <draw:page draw:name="Introducing S" draw:style-name="dp1" draw:master-page-name="TITLE_5f_AND_5f_BODY_5f_2">
        <draw:frame draw:name="Google Shape;384;p66" presentation:style-name="pr10" draw:text-style-name="P8" draw:layer="layout" svg:width="20.699cm" svg:height="9.489cm" svg:x="3.578cm" svg:y="2.786cm" presentation:class="outline" presentation:user-transformed="true">
          <draw:text-box>
            <text:list text:style-name="L7">
              <text:list-item>
                <text:p text:style-name="P12"><text:span text:style-name="T4">How do </text:span><text:span text:style-name="T31">S</text:span><text:span text:style-name="T4"> and </text:span><text:span text:style-name="T31">R</text:span><text:span text:style-name="T32">2</text:span><text:span text:style-name="T4"> compare for the two models?</text:span></text:p>
              </text:list-item>
              <text:list-item>
                <text:p text:style-name="P12"><text:span text:style-name="T4">Based on the </text:span><text:span text:style-name="T11">S</text:span><text:span text:style-name="T4"> values of the plots you created on this page, what do you think </text:span><text:span text:style-name="T11">S</text:span><text:span text:style-name="T4"> means?</text:span></text:p>
              </text:list-item>
            </text:list>
            <text:p text:style-name="P7"><text:span text:style-name="T7"/></text:p>
          </draw:text-box>
        </draw:frame>
        <draw:frame draw:name="Google Shape;385;p66" presentation:style-name="pr11"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presentation:notes draw:style-name="dp2">
          <draw:page-thumbnail draw:name="Google Shape;381;1fa822d9-4fdf-11f1-b989-559790d196ef:notes" draw:style-name="gr1" draw:layer="layout" svg:width="16.932cm" svg:height="9.524cm" svg:x="1.059cm" svg:y="1.905cm" draw:page-number="16" presentation:class="page"/>
          <draw:frame draw:name="Google Shape;382;1fa822d9-4fdf-11f1-b989-559790d196ef:notes" presentation:style-name="pr23" draw:text-style-name="P4" draw:layer="layout" svg:width="15.239cm" svg:height="11.429cm" svg:x="1.905cm" svg:y="12.065cm" presentation:class="notes" presentation:user-transformed="true">
            <draw:text-box>
              <text:list text:style-name="L10">
                <text:list-item>
                  <text:p text:style-name="P14"><text:span text:style-name="T3">How do </text:span><text:span text:style-name="T33">S</text:span><text:span text:style-name="T34"> and </text:span><text:span text:style-name="T33">R</text:span><text:span text:style-name="T35">2</text:span><text:span text:style-name="T34"> compare for the two models?</text:span></text:p>
                </text:list-item>
                <text:list-item>
                  <text:p text:style-name="P14"><text:span text:style-name="T36">The values are positive for both models and both S and R</text:span><text:span text:style-name="T37">2</text:span><text:span text:style-name="T36"> values are smaller for </text:span><text:span text:style-name="T13">jo than they are for cy.</text:span></text:p>
                </text:list-item>
                <text:list-item>
                  <text:p text:style-name="P14"><text:span text:style-name="T12">Based on the </text:span><text:span text:style-name="T38">S</text:span><text:span text:style-name="T12"> values of the plots you created on this page, what do you think </text:span><text:span text:style-name="T38">S</text:span><text:span text:style-name="T12"> means?</text:span></text:p>
                </text:list-item>
                <text:list-item>
                  <text:p text:style-name="P14"><text:span text:style-name="T13">Answers will vary, but students should have some sense of the idea that if one model has a lower </text:span><text:span text:style-name="T38">S</text:span><text:span text:style-name="T13"> value than another model of the same data it indicates a better fit.</text:span></text:p>
                </text:list-item>
              </text:list>
              <text:p text:style-name="P3"><text:span text:style-name="T14"/></text:p>
            </draw:text-box>
          </draw:frame>
        </presentation:notes>
      </draw:page>
      <draw:page draw:name="Introducing S" draw:style-name="dp1" draw:master-page-name="TITLE_5f_AND_5f_BODY_5f_2">
        <draw:frame draw:name="Google Shape;390;p67" presentation:style-name="pr10" draw:text-style-name="P8" draw:layer="layout" svg:width="20.699cm" svg:height="9.489cm" svg:x="3.578cm" svg:y="2.786cm" presentation:class="outline" presentation:user-transformed="true">
          <draw:text-box>
            <text:p text:style-name="P5"><text:span text:style-name="T4">Just as there are different tools for finding the center or spread of a dataset, there are many different tools to calculate the fitness of a model, including </text:span><text:span text:style-name="T31">S</text:span><text:span text:style-name="T4"> and </text:span><text:span text:style-name="T31">R</text:span><text:span text:style-name="T32">2</text:span><text:span text:style-name="T4">, which you just saw when fitting the models in Pyret.</text:span></text:p>
            <text:p text:style-name="P6"><text:span text:style-name="T4">Statisticians and Data Scientists are careful to use the right tool for the job!</text:span></text:p>
            <text:list text:style-name="L7">
              <text:list-item>
                <text:p text:style-name="P6"><text:span text:style-name="T4">We want a measure that takes the values from </text:span><text:span text:style-name="T5">every</text:span><text:span text:style-name="T4"> data point into account.</text:span></text:p>
              </text:list-item>
              <text:list-item>
                <text:p text:style-name="P5"><text:span text:style-name="T4">We want a measure of </text:span><text:span text:style-name="T5">error</text:span><text:span text:style-name="T4">, so the measure should be zero for a perfect model fits every point (i.e. has no residuals).</text:span></text:p>
              </text:list-item>
              <text:list-item>
                <text:p text:style-name="P5"><text:span text:style-name="T4">We want a measure that's concrete, and easy to understand.</text:span></text:p>
              </text:list-item>
            </text:list>
            <text:p text:style-name="P7"><text:span text:style-name="T7"/></text:p>
          </draw:text-box>
        </draw:frame>
        <draw:frame draw:name="Google Shape;391;p67" presentation:style-name="pr11"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presentation:notes draw:style-name="dp2">
          <draw:page-thumbnail draw:name="Google Shape;387;1fa822da-4fdf-11f1-b989-559790d196ef:notes" draw:style-name="gr1" draw:layer="layout" svg:width="16.932cm" svg:height="9.524cm" svg:x="1.059cm" svg:y="1.905cm" draw:page-number="17" presentation:class="page"/>
          <draw:frame draw:name="Google Shape;388;1fa822da-4fdf-11f1-b989-559790d196ef:notes" presentation:style-name="pr26" draw:text-style-name="P11" draw:layer="layout" svg:width="15.239cm" svg:height="11.429cm" svg:x="1.905cm" svg:y="12.065cm" presentation:class="notes" presentation:placeholder="true" presentation:user-transformed="true">
            <draw:text-box/>
          </draw:frame>
        </presentation:notes>
      </draw:page>
      <draw:page draw:name="Introducing S" draw:style-name="dp1" draw:master-page-name="TITLE_5f_AND_5f_BODY_5f_2_5f_2">
        <draw:frame draw:name="Google Shape;396;p68" presentation:style-name="pr14" draw:text-style-name="P8" draw:layer="layout" svg:width="14.592cm" svg:height="9.489cm" svg:x="1.193cm" svg:y="4.199cm" presentation:class="outline" presentation:user-transformed="true">
          <draw:text-box>
            <text:p text:style-name="P5"><text:span text:style-name="T39">S</text:span><text:span text:style-name="T40"> is a measure of fitness, which refers to the </text:span><text:span text:style-name="T39">Standard Deviation of the Residuals</text:span><text:span text:style-name="T40">.</text:span></text:p>
            <text:list text:style-name="L14">
              <text:list-item>
                <text:p text:style-name="P6"><text:span text:style-name="T40">The closer the data points are to the model, the smaller the residuals are.</text:span></text:p>
              </text:list-item>
              <text:list-item>
                <text:p text:style-name="P5"><text:span text:style-name="T40">In a </text:span><text:span text:style-name="T41">perfect fit</text:span><text:span text:style-name="T40"> to the data, </text:span><text:span text:style-name="T39">S</text:span><text:span text:style-name="T40"> would be 0.</text:span></text:p>
              </text:list-item>
              <text:list-item>
                <text:p text:style-name="P5"><text:span text:style-name="T39">S</text:span><text:span text:style-name="T40"> is expressed in terms of </text:span><text:span text:style-name="T41">units of the response variable</text:span><text:span text:style-name="T40"> (the y-axis), which makes it easy to understand.</text:span></text:p>
              </text:list-item>
            </text:list>
            <text:list text:style-name="L15">
              <text:list-item>
                <text:list>
                  <text:list-item>
                    <text:p text:style-name="P5"><text:span text:style-name="T40">When fitting a model to this dataset, an </text:span><text:span text:style-name="T39">S</text:span><text:span text:style-name="T40"> of 5 means "the standard deviation of the residuals is </text:span><text:span text:style-name="T42">5 weeks to adoption</text:span><text:span text:style-name="T40">."</text:span></text:p>
                  </text:list-item>
                </text:list>
              </text:list-item>
            </text:list>
            <text:p text:style-name="P7"><text:span text:style-name="T7"/></text:p>
          </draw:text-box>
        </draw:frame>
        <draw:frame draw:name="Google Shape;397;p68" presentation:style-name="pr15"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draw:frame draw:name="Google Shape;398;p68" draw:style-name="gr2" draw:text-style-name="P13" draw:layer="layout" svg:width="9.078cm" svg:height="4.947cm" svg:x="16.186cm" svg:y="5.345cm">
          <draw:image xlink:href="Pictures/1000020100000190000000DA8B2BFF0266AEC8D9.png" xlink:type="simple" xlink:show="embed" xlink:actuate="onLoad">
            <text:p/>
          </draw:image>
        </draw:frame>
        <presentation:notes draw:style-name="dp2">
          <draw:page-thumbnail draw:name="Google Shape;393;1fa822db-4fdf-11f1-b989-559790d196ef:notes" draw:style-name="gr1" draw:layer="layout" svg:width="16.932cm" svg:height="9.524cm" svg:x="1.059cm" svg:y="1.905cm" draw:page-number="18" presentation:class="page"/>
          <draw:frame draw:name="Google Shape;394;1fa822db-4fdf-11f1-b989-559790d196ef:notes" presentation:style-name="pr27" draw:text-style-name="P11" draw:layer="layout" svg:width="15.239cm" svg:height="11.429cm" svg:x="1.905cm" svg:y="12.065cm" presentation:class="notes" presentation:placeholder="true" presentation:user-transformed="true">
            <draw:text-box/>
          </draw:frame>
        </presentation:notes>
      </draw:page>
      <draw:page draw:name="Introducing S" draw:style-name="dp1" draw:master-page-name="TITLE_5f_AND_5f_BODY_5f_2">
        <draw:frame draw:name="Google Shape;403;p69" presentation:style-name="pr10" draw:text-style-name="P8" draw:layer="layout" svg:width="20.699cm" svg:height="9.489cm" svg:x="3.578cm" svg:y="2.786cm" presentation:class="outline" presentation:user-transformed="true">
          <draw:text-box>
            <text:list text:style-name="L7">
              <text:list-item>
                <text:p text:style-name="P12"><text:span text:style-name="T4">When comparing two models for the same dataset, the model with the smaller </text:span><text:span text:style-name="T11">S</text:span><text:span text:style-name="T4"> is the better model!</text:span></text:p>
              </text:list-item>
              <text:list-item>
                <text:p text:style-name="P12"><text:span text:style-name="T4">It doesn't make sense to compare </text:span><text:span text:style-name="T11">S</text:span><text:span text:style-name="T4"> for models that describe different datasets.</text:span></text:p>
              </text:list-item>
            </text:list>
            <text:p text:style-name="P7"><text:span text:style-name="T7"/></text:p>
          </draw:text-box>
        </draw:frame>
        <draw:frame draw:name="Google Shape;404;p69" presentation:style-name="pr11"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presentation:notes draw:style-name="dp2">
          <draw:page-thumbnail draw:name="Google Shape;400;1fa822dc-4fdf-11f1-b989-559790d196ef:notes" draw:style-name="gr1" draw:layer="layout" svg:width="16.932cm" svg:height="9.524cm" svg:x="1.059cm" svg:y="1.905cm" draw:page-number="19" presentation:class="page"/>
          <draw:frame draw:name="Google Shape;401;1fa822dc-4fdf-11f1-b989-559790d196ef:notes" presentation:style-name="pr28" draw:text-style-name="P11" draw:layer="layout" svg:width="15.239cm" svg:height="11.429cm" svg:x="1.905cm" svg:y="12.065cm" presentation:class="notes" presentation:placeholder="true" presentation:user-transformed="true">
            <draw:text-box/>
          </draw:frame>
        </presentation:notes>
      </draw:page>
      <draw:page draw:name="Introducing S" draw:style-name="dp1" draw:master-page-name="TITLE_5f_AND_5f_BODY_5f_2">
        <draw:frame draw:name="Google Shape;409;p70" presentation:style-name="pr10" draw:text-style-name="P8" draw:layer="layout" svg:width="20.699cm" svg:height="9.489cm" svg:x="3.578cm" svg:y="2.786cm" presentation:class="outline" presentation:user-transformed="true">
          <draw:text-box>
            <text:p text:style-name="P5"><text:span text:style-name="T4">📌 </text:span><text:span text:style-name="T4">The </text:span><text:span text:style-name="T31">S</text:span><text:span text:style-name="T4">-value always has to be considered in the context of the range of values that the model is predicting!</text:span></text:p>
            <text:list text:style-name="L7">
              <text:list-item>
                <text:p text:style-name="P6"><text:span text:style-name="T4">Turn to </text:span><text:span text:style-name="T9"><text:a xlink:href="https://bootstrapworld.org/materials/fall2026/en-us/lessons/fitting-models/pages/s-tells-us.html" xlink:type="simple">Considering </text:a></text:span><text:span text:style-name="T43"><text:a xlink:href="https://bootstrapworld.org/materials/fall2026/en-us/lessons/fitting-models/pages/s-tells-us.html" xlink:type="simple">S</text:a></text:span><text:span text:style-name="T9"><text:a xlink:href="https://bootstrapworld.org/materials/fall2026/en-us/lessons/fitting-models/pages/s-tells-us.html" xlink:type="simple"> in Context</text:a></text:span><text:span text:style-name="T4">.</text:span></text:p>
              </text:list-item>
              <text:list-item>
                <text:p text:style-name="P5"><text:span text:style-name="T4">Consider the </text:span><text:span text:style-name="T31">S</text:span><text:span text:style-name="T4">-value of each model in the context of the range of the data described.</text:span></text:p>
              </text:list-item>
              <text:list-item>
                <text:p text:style-name="P5"><text:span text:style-name="T4">Decide how well the model is likely to predict values.</text:span></text:p>
              </text:list-item>
            </text:list>
            <text:p text:style-name="P7"><text:span text:style-name="T7"/></text:p>
          </draw:text-box>
        </draw:frame>
        <draw:frame draw:name="Google Shape;410;p70" presentation:style-name="pr11"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presentation:notes draw:style-name="dp2">
          <draw:page-thumbnail draw:name="Google Shape;406;1fa822dd-4fdf-11f1-b989-559790d196ef:notes" draw:style-name="gr1" draw:layer="layout" svg:width="16.932cm" svg:height="9.524cm" svg:x="1.059cm" svg:y="1.905cm" draw:page-number="20" presentation:class="page"/>
          <draw:frame draw:name="Google Shape;407;1fa822dd-4fdf-11f1-b989-559790d196ef:notes" presentation:style-name="pr29" draw:text-style-name="P11" draw:layer="layout" svg:width="15.239cm" svg:height="11.429cm" svg:x="1.905cm" svg:y="12.065cm" presentation:class="notes" presentation:placeholder="true" presentation:user-transformed="true">
            <draw:text-box/>
          </draw:frame>
        </presentation:notes>
      </draw:page>
      <draw:page draw:name="Introducing S" draw:style-name="dp1" draw:master-page-name="TITLE_5f_AND_5f_BODY_5f_2">
        <draw:frame draw:name="Google Shape;415;p71" presentation:style-name="pr10" draw:text-style-name="P8" draw:layer="layout" svg:width="20.699cm" svg:height="9.489cm" svg:x="3.578cm" svg:y="2.786cm" presentation:class="outline" presentation:user-transformed="true">
          <draw:text-box>
            <text:list text:style-name="L7">
              <text:list-item>
                <text:p text:style-name="P12"><text:span text:style-name="T4">Did you strongly agree that any of the models described were a good fit? Why?</text:span></text:p>
              </text:list-item>
              <text:list-item>
                <text:p text:style-name="P12"><text:span text:style-name="T4">Did you strongly disagree that any of the models were a good fit? Why?</text:span></text:p>
              </text:list-item>
            </text:list>
            <text:p text:style-name="P7"><text:span text:style-name="T7"/></text:p>
          </draw:text-box>
        </draw:frame>
        <draw:frame draw:name="Google Shape;416;p71" presentation:style-name="pr11"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presentation:notes draw:style-name="dp2">
          <draw:page-thumbnail draw:name="Google Shape;412;1fa822de-4fdf-11f1-b989-559790d196ef:notes" draw:style-name="gr1" draw:layer="layout" svg:width="16.932cm" svg:height="9.524cm" svg:x="1.059cm" svg:y="1.905cm" draw:page-number="21" presentation:class="page"/>
          <draw:frame draw:name="Google Shape;413;1fa822de-4fdf-11f1-b989-559790d196ef:notes" presentation:style-name="pr23" draw:text-style-name="P4" draw:layer="layout" svg:width="15.239cm" svg:height="11.429cm" svg:x="1.905cm" svg:y="12.065cm" presentation:class="notes" presentation:user-transformed="true">
            <draw:text-box>
              <text:list text:style-name="L10">
                <text:list-item>
                  <text:p text:style-name="P14"><text:span text:style-name="T3">Did you strongly agree that any of the models described were a good fit? Why?</text:span></text:p>
                </text:list-item>
                <text:list-item>
                  <text:p text:style-name="P14"><text:span text:style-name="T17">Both 2 and 8</text:span></text:p>
                </text:list-item>
                <text:list-item>
                  <text:p text:style-name="P14"><text:span text:style-name="T17">Because the numbers in the range were huge and the </text:span><text:span text:style-name="T36">S value was really small.</text:span></text:p>
                </text:list-item>
                <text:list-item>
                  <text:p text:style-name="P14"><text:span text:style-name="T34">Did you strongly disagree that any of the models were a good fit? Why?</text:span></text:p>
                </text:list-item>
                <text:list-item>
                  <text:p text:style-name="P14"><text:span text:style-name="T36">Both 1 and 6</text:span></text:p>
                </text:list-item>
                <text:list-item>
                  <text:p text:style-name="P14"><text:span text:style-name="T36">Because the S-value was big in comparison to the range.</text:span></text:p>
                </text:list-item>
                <text:list-item>
                  <text:p text:style-name="P14"><text:span text:style-name="T36">For the first scenario the S-value was 300, which was the majority of the range between 0 and 400.</text:span></text:p>
                </text:list-item>
                <text:list-item>
                  <text:p text:style-name="P14"><text:span text:style-name="T36">For the sixth scenario, even though the S-value was only 1, it was much bigger than any of the numbers in the range, which maxed out at two hundredths.</text:span></text:p>
                </text:list-item>
              </text:list>
              <text:p text:style-name="P3"><text:span text:style-name="T44"/></text:p>
            </draw:text-box>
          </draw:frame>
        </presentation:notes>
      </draw:page>
      <draw:page draw:name="Introducing S" draw:style-name="dp1" draw:master-page-name="TITLE_5f_AND_5f_BODY_5f_2_5f_4_5f_1">
        <draw:frame draw:name="Google Shape;421;p72" presentation:style-name="pr6" draw:text-style-name="P8" draw:layer="layout" svg:width="21.132cm" svg:height="9.489cm" svg:x="3.519cm" svg:y="2.786cm" presentation:class="outline" presentation:user-transformed="true">
          <draw:text-box>
            <text:p text:style-name="P5"><text:span text:style-name="T4">Now that we have a basic sense of what </text:span><text:span text:style-name="T18">fit-model</text:span><text:span text:style-name="T4"> does, let's see it work live in Pyret!</text:span></text:p>
            <text:list text:style-name="L7">
              <text:list-item>
                <text:p text:style-name="P6"><text:span text:style-name="T4">Return to the </text:span><text:span text:style-name="T9"><text:a xlink:href="https://pyret.bootstrapworld.org/editor#shareurl=https://raw.githubusercontent.com/bootstrapworld/starter-files/fall2026/data-science/Lizard%20Sample%20Starter%20File.arr" xlink:type="simple">Lizard Sample Starter File</text:a></text:span><text:span text:style-name="T4">.</text:span></text:p>
              </text:list-item>
            </text:list>
            <text:list text:style-name="L8">
              <text:list-item>
                <text:list>
                  <text:list-item>
                    <text:p text:style-name="P5"><text:span text:style-name="T4">Notice that the functions you were just looking at are defined on lines 16 and 17 of the Definitions Area.</text:span></text:p>
                  </text:list-item>
                  <text:list-item>
                    <text:p text:style-name="P5"><text:span text:style-name="T4">Following this you will see two </text:span><text:span text:style-name="T18">fit-model</text:span><text:span text:style-name="T4"> expressions: one takes in the function for </text:span><text:span text:style-name="T10">cy</text:span><text:span text:style-name="T4"> and the other takes in the function for </text:span><text:span text:style-name="T10">jo</text:span><text:span text:style-name="T4">.</text:span></text:p>
                  </text:list-item>
                </text:list>
              </text:list-item>
              <text:list-item>
                <text:p text:style-name="P5"><text:span text:style-name="T4">Uncomment the last two lines of code and click "Run".</text:span></text:p>
              </text:list-item>
            </text:list>
            <text:p text:style-name="P7"><text:span text:style-name="T7"/></text:p>
          </draw:text-box>
        </draw:frame>
        <draw:frame draw:name="Google Shape;422;p72" presentation:style-name="pr7"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presentation:notes draw:style-name="dp2">
          <draw:page-thumbnail draw:name="Google Shape;418;1fa822df-4fdf-11f1-b989-559790d196ef:notes" draw:style-name="gr1" draw:layer="layout" svg:width="16.932cm" svg:height="9.524cm" svg:x="1.059cm" svg:y="1.905cm" draw:page-number="22" presentation:class="page"/>
          <draw:frame draw:name="Google Shape;419;1fa822df-4fdf-11f1-b989-559790d196ef:notes" presentation:style-name="pr30" draw:text-style-name="P11" draw:layer="layout" svg:width="15.239cm" svg:height="11.429cm" svg:x="1.905cm" svg:y="12.065cm" presentation:class="notes" presentation:placeholder="true" presentation:user-transformed="true">
            <draw:text-box/>
          </draw:frame>
        </presentation:notes>
      </draw:page>
      <draw:page draw:name="Introducing S" draw:style-name="dp1" draw:master-page-name="TITLE_5f_AND_5f_BODY_5f_2">
        <draw:frame draw:name="Google Shape;427;p73" presentation:style-name="pr10" draw:text-style-name="P8" draw:layer="layout" svg:width="20.699cm" svg:height="9.489cm" svg:x="3.578cm" svg:y="2.786cm" presentation:class="outline" presentation:user-transformed="true">
          <draw:text-box>
            <text:list text:style-name="L7">
              <text:list-item>
                <text:p text:style-name="P12"><text:span text:style-name="T4">How do we know that the first Interactive Chart that pops up is fitting Cy's model to the data?</text:span></text:p>
              </text:list-item>
              <text:list-item>
                <text:p text:style-name="P12"><text:span text:style-name="T4">Move your mouse along the line. What information can we learn from the "Model" pop up windows?</text:span></text:p>
              </text:list-item>
              <text:list-item>
                <text:p text:style-name="P12"><text:span text:style-name="T4">Move your mouse to a few different points and read the information contained in these pop ups. What can we learn from the "Data" pop up windows?</text:span></text:p>
              </text:list-item>
              <text:list-item>
                <text:p text:style-name="P12"><text:span text:style-name="T4">Find the "Residuals" pop up window by hovering your mouse near any of the data points. Find and read a few of these. What can we learn from the "Residuals" pop up windows?</text:span></text:p>
              </text:list-item>
            </text:list>
            <text:p text:style-name="P7"><text:span text:style-name="T7"/></text:p>
          </draw:text-box>
        </draw:frame>
        <draw:frame draw:name="Google Shape;428;p73" presentation:style-name="pr11"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presentation:notes draw:style-name="dp2">
          <draw:page-thumbnail draw:name="Google Shape;424;1fa822e0-4fdf-11f1-b989-559790d196ef:notes" draw:style-name="gr1" draw:layer="layout" svg:width="16.932cm" svg:height="9.524cm" svg:x="1.059cm" svg:y="1.905cm" draw:page-number="23" presentation:class="page"/>
          <draw:frame draw:name="Google Shape;425;1fa822e0-4fdf-11f1-b989-559790d196ef:notes" presentation:style-name="pr23" draw:text-style-name="P4" draw:layer="layout" svg:width="15.239cm" svg:height="11.429cm" svg:x="1.905cm" svg:y="12.065cm" presentation:class="notes" presentation:user-transformed="true">
            <draw:text-box>
              <text:list text:style-name="L10">
                <text:list-item>
                  <text:p text:style-name="P14"><text:span text:style-name="T3">How do we know that the first Interactive Chart that pops up is fitting Cy's model to the data?</text:span></text:p>
                </text:list-item>
                <text:list-item>
                  <text:p text:style-name="P14"><text:span text:style-name="T17">Because the first expression in the Definitions Area takes in </text:span><text:span text:style-name="T13">cy.</text:span></text:p>
                </text:list-item>
                <text:list-item>
                  <text:p text:style-name="P14"><text:span text:style-name="T12">Move your mouse along the line. What information can we learn from the "Model" pop up windows?</text:span></text:p>
                </text:list-item>
                <text:list-item>
                  <text:p text:style-name="P14"><text:span text:style-name="T13">The coordinates of any point in the model.</text:span></text:p>
                </text:list-item>
                <text:list-item>
                  <text:p text:style-name="P14"><text:span text:style-name="T12">Move your mouse to a few different points and read the information contained in these pop ups. What can we learn from the "Data" pop up windows?</text:span></text:p>
                </text:list-item>
                <text:list-item>
                  <text:p text:style-name="P14"><text:span text:style-name="T13">The x and y coordinates of each point in the data set, and the animals they are associated with.</text:span></text:p>
                </text:list-item>
                <text:list-item>
                  <text:p text:style-name="P14"><text:span text:style-name="T12">Find the "Residuals" pop up window by hovering your mouse near any of the data points. Find and read a few of these. What can we learn from the "Residuals" pop up windows?</text:span></text:p>
                </text:list-item>
                <text:list-item>
                  <text:p text:style-name="P14"><text:span text:style-name="T13">The x and y coordinates of a data point</text:span></text:p>
                </text:list-item>
                <text:list-item>
                  <text:p text:style-name="P14"><text:span text:style-name="T13">The predicted y-value (ŷ) for that x-value</text:span></text:p>
                </text:list-item>
                <text:list-item>
                  <text:p text:style-name="P14"><text:span text:style-name="T13">The "Residual": the difference between y and ŷ</text:span></text:p>
                </text:list-item>
              </text:list>
              <text:p text:style-name="P3"><text:span text:style-name="T14"/></text:p>
            </draw:text-box>
          </draw:frame>
        </presentation:notes>
      </draw:page>
      <draw:page draw:name="Introducing S" draw:style-name="dp1" draw:master-page-name="TITLE_5f_AND_5f_BODY_5f_2">
        <draw:frame draw:name="Google Shape;433;p74" presentation:style-name="pr10" draw:text-style-name="P8" draw:layer="layout" svg:width="20.699cm" svg:height="9.489cm" svg:x="3.578cm" svg:y="2.786cm" presentation:class="outline" presentation:user-transformed="true">
          <draw:text-box>
            <text:list text:style-name="L7">
              <text:list-item>
                <text:p text:style-name="P12"><text:span text:style-name="T4">We've been looking at how well </text:span><text:span text:style-name="T10">cy</text:span><text:span text:style-name="T4"> 's model fit the data. What do we need to do if we want to see how well </text:span><text:span text:style-name="T10">jo</text:span><text:span text:style-name="T4"> 's model fits the data.</text:span></text:p>
              </text:list-item>
              <text:list-item>
                <text:p text:style-name="P12"><text:span text:style-name="T4">What happens once we close the second interactive chart?</text:span></text:p>
              </text:list-item>
            </text:list>
            <text:p text:style-name="P7"><text:span text:style-name="T7"/></text:p>
          </draw:text-box>
        </draw:frame>
        <draw:frame draw:name="Google Shape;434;p74" presentation:style-name="pr11"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presentation:notes draw:style-name="dp2">
          <draw:page-thumbnail draw:name="Google Shape;430;1fa822e1-4fdf-11f1-b989-559790d196ef:notes" draw:style-name="gr1" draw:layer="layout" svg:width="16.932cm" svg:height="9.524cm" svg:x="1.059cm" svg:y="1.905cm" draw:page-number="24" presentation:class="page"/>
          <draw:frame draw:name="Google Shape;431;1fa822e1-4fdf-11f1-b989-559790d196ef:notes" presentation:style-name="pr23" draw:text-style-name="P4" draw:layer="layout" svg:width="15.239cm" svg:height="11.429cm" svg:x="1.905cm" svg:y="12.065cm" presentation:class="notes" presentation:user-transformed="true">
            <draw:text-box>
              <text:list text:style-name="L10">
                <text:list-item>
                  <text:p text:style-name="P14"><text:span text:style-name="T3">We've been looking at how well </text:span><text:span text:style-name="T12">cy 's model fit the data. What do we need to do if we want to see how well jo 's model fits the data.</text:span></text:p>
                </text:list-item>
                <text:list-item>
                  <text:p text:style-name="P14"><text:span text:style-name="T13">Close the window and another interactive chart will pop up.</text:span></text:p>
                </text:list-item>
                <text:list-item>
                  <text:p text:style-name="P14"><text:span text:style-name="T12">What happens once we close the second interactive chart?</text:span></text:p>
                </text:list-item>
                <text:list-item>
                  <text:p text:style-name="P14"><text:span text:style-name="T13">We see clickable thumbnail images of both charts in the Interactions Area.</text:span></text:p>
                </text:list-item>
              </text:list>
              <text:p text:style-name="P3"><text:span text:style-name="T12">Optional: Which Model is Best?</text:span></text:p>
              <text:p text:style-name="P3"><text:span text:style-name="T14">If students know how to compute the equation of a line that crosses between two points, use </text:span><text:span text:style-name="T45"><text:a xlink:href="https://bootstrapworld.org/materials/fall2026/en-us/lessons/fitting-models/pages/lines-to-functions.html" xlink:type="simple">From Lines to Functions</text:a></text:span><text:span text:style-name="T46"><text:s/>to have them define their models for age v. weeks in Pyret and use </text:span><text:span text:style-name="T26">fit-model to see which one is best.</text:span></text:p>
              <text:p text:style-name="P3"><text:span text:style-name="T26"/></text:p>
            </draw:text-box>
          </draw:frame>
        </presentation:notes>
      </draw:page>
      <draw:page draw:name="Introducing S" draw:style-name="dp1" draw:master-page-name="TITLE_5f_AND_5f_BODY_5f_2">
        <draw:frame draw:name="Google Shape;439;p75" presentation:style-name="pr10" draw:text-style-name="P8" draw:layer="layout" svg:width="20.699cm" svg:height="9.489cm" svg:x="3.578cm" svg:y="2.786cm" presentation:class="outline" presentation:user-transformed="true">
          <draw:text-box>
            <text:p text:style-name="P5"><text:span text:style-name="T4">Let's put everything we've learned together and interpret the models we've built and the statistics we've gathered about them.</text:span></text:p>
            <text:list text:style-name="L7">
              <text:list-item>
                <text:p text:style-name="P6"><text:span text:style-name="T4">Let's make sure we know what the models we've built and the statistics we've gathered about them mean.</text:span></text:p>
              </text:list-item>
              <text:list-item>
                <text:p text:style-name="P5"><text:span text:style-name="T4">Complete the first two sections of </text:span><text:span text:style-name="T9"><text:a xlink:href="https://bootstrapworld.org/materials/fall2026/en-us/lessons/fitting-models/pages/interpret-models.html" xlink:type="simple">Interpreting our Models</text:a></text:span><text:span text:style-name="T4"><text:s/>with your partner.</text:span></text:p>
              </text:list-item>
            </text:list>
            <text:p text:style-name="P7"><text:span text:style-name="T7"/></text:p>
          </draw:text-box>
        </draw:frame>
        <draw:frame draw:name="Google Shape;440;p75" presentation:style-name="pr11"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presentation:notes draw:style-name="dp2">
          <draw:page-thumbnail draw:name="Google Shape;436;1fa849e0-4fdf-11f1-b989-559790d196ef:notes" draw:style-name="gr1" draw:layer="layout" svg:width="16.932cm" svg:height="9.524cm" svg:x="1.059cm" svg:y="1.905cm" draw:page-number="25" presentation:class="page"/>
          <draw:frame draw:name="Google Shape;437;1fa849e0-4fdf-11f1-b989-559790d196ef:notes" presentation:style-name="pr23" draw:text-style-name="P4" draw:layer="layout" svg:width="15.239cm" svg:height="11.429cm" svg:x="1.905cm" svg:y="12.065cm" presentation:class="notes" presentation:user-transformed="true">
            <draw:text-box>
              <text:list text:style-name="L10">
                <text:list-item>
                  <text:p text:style-name="P14"><text:span text:style-name="T2">The information needed for the first section is most easily gathered by looking at the table (in Pyret) and using the </text:span><text:span text:style-name="T14">dot-plot and </text:span><text:span text:style-name="T26">box-plot functions.</text:span></text:p>
                </text:list-item>
                <text:list-item>
                  <text:p text:style-name="P14"><text:span text:style-name="T26">Confirm that your students are able to complete cy's model correctly.</text:span></text:p>
                </text:list-item>
                <text:list-item>
                  <text:p text:style-name="P14"><text:span text:style-name="T26">If your students did not complete </text:span><text:span text:style-name="T45"><text:a xlink:href="https://bootstrapworld.org/materials/fall2026/en-us/lessons/fitting-models/pages/lines-to-functions.html" xlink:type="simple">From Lines to Functions</text:a></text:span><text:span text:style-name="T46">, direct them to ignore the last section of the page they are about to complete.</text:span></text:p>
                </text:list-item>
              </text:list>
              <text:p text:style-name="P3"><text:span text:style-name="T46"/></text:p>
            </draw:text-box>
          </draw:frame>
        </presentation:notes>
      </draw:page>
      <draw:page draw:name="Introducing S" draw:style-name="dp1" draw:master-page-name="TITLE_5f_AND_5f_BODY_5f_2">
        <draw:frame draw:name="Google Shape;445;p76" presentation:style-name="pr10" draw:text-style-name="P8" draw:layer="layout" svg:width="20.699cm" svg:height="9.489cm" svg:x="3.578cm" svg:y="2.786cm" presentation:class="outline" presentation:user-transformed="true">
          <draw:text-box>
            <text:list text:style-name="L7">
              <text:list-item>
                <text:p text:style-name="P12"><text:span text:style-name="T4">Complete </text:span><text:span text:style-name="T9"><text:a xlink:href="https://bootstrapworld.org/materials/fall2026/en-us/lessons/fitting-models/pages/interpret-models.html" xlink:type="simple">Interpreting our Models</text:a></text:span><text:span text:style-name="T4">. </text:span><text:span text:style-name="T5">Heads up: You will be using percent change to make sense of how the expected errors in these models compare.</text:span></text:p>
              </text:list-item>
            </text:list>
            <text:p text:style-name="P7"><text:span text:style-name="T7"/></text:p>
          </draw:text-box>
        </draw:frame>
        <draw:frame draw:name="Google Shape;446;p76" presentation:style-name="pr11"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presentation:notes draw:style-name="dp2">
          <draw:page-thumbnail draw:name="Google Shape;442;1fa849e1-4fdf-11f1-b989-559790d196ef:notes" draw:style-name="gr1" draw:layer="layout" svg:width="16.932cm" svg:height="9.524cm" svg:x="1.059cm" svg:y="1.905cm" draw:page-number="26" presentation:class="page"/>
          <draw:frame draw:name="Google Shape;443;1fa849e1-4fdf-11f1-b989-559790d196ef:notes" presentation:style-name="pr23" draw:text-style-name="P4" draw:layer="layout" svg:width="15.239cm" svg:height="11.429cm" svg:x="1.905cm" svg:y="12.065cm" presentation:class="notes" presentation:user-transformed="true">
            <draw:text-box>
              <text:p text:style-name="P3"><text:span text:style-name="T3">How can </text:span><text:span text:style-name="T33">r</text:span><text:span text:style-name="T35">2</text:span><text:span text:style-name="T34"> be less than zero?</text:span></text:p>
              <text:p text:style-name="P3"><text:span text:style-name="T44">Sharp-eyed students might wonder how it's possible for an </text:span><text:span text:style-name="T36">r</text:span><text:span text:style-name="T47">2</text:span><text:span text:style-name="T44"> to be less than zero. That's supposed to be impossible, right?</text:span></text:p>
              <text:p text:style-name="P3"><text:span text:style-name="T44">It turns out that the </text:span><text:span text:style-name="T36">R</text:span><text:span text:style-name="T47">2</text:span><text:span text:style-name="T44"> of a model </text:span><text:span text:style-name="T48"><text:a xlink:href="https://stats.stackexchange.com/questions/627589/definition-of-text-r2-text" xlink:type="simple">is NOT computed by squaring </text:a></text:span><text:span text:style-name="T49"><text:a xlink:href="https://stats.stackexchange.com/questions/627589/definition-of-text-r2-text" xlink:type="simple">R</text:a></text:span><text:span text:style-name="T50">, and only actually equals </text:span><text:span text:style-name="T51">R</text:span><text:span text:style-name="T50"> × </text:span><text:span text:style-name="T51">R</text:span><text:span text:style-name="T50"> when the model is produced through linear regression. Remember: linear regression can only find the line of </text:span><text:span text:style-name="T51">best</text:span><text:span text:style-name="T50"> fit, so it will never produce something crazy like a negatively-sloping line for a dataset with a positive correlation!</text:span></text:p>
              <text:p text:style-name="P3"><text:span text:style-name="T50">When students are coming up with models on their own, they aren't bound by the algorithm for linear regression and can come up with lines whose fit is worse than </text:span><text:span text:style-name="T26">lr-plot could ever be!</text:span></text:p>
              <text:p text:style-name="P3"><text:span text:style-name="T26"/></text:p>
            </draw:text-box>
          </draw:frame>
        </presentation:notes>
      </draw:page>
      <draw:page draw:name="Introducing S" draw:style-name="dp1" draw:master-page-name="TITLE_5f_AND_5f_BODY_5f_2_5f_1_5f_1">
        <draw:frame draw:name="Google Shape;451;p77" presentation:style-name="pr20" draw:text-style-name="P10" draw:layer="layout" svg:width="21.908cm" svg:height="1.59cm" svg:x="3.356cm" svg:y="0.178cm" presentation:class="title" presentation:user-transformed="true">
          <draw:text-box>
            <text:p text:style-name="P9"><text:span text:style-name="T8">Introducing </text:span><text:span text:style-name="T19">S</text:span></text:p>
          </draw:text-box>
        </draw:frame>
        <draw:frame draw:name="Google Shape;452;p77" presentation:style-name="pr21" draw:text-style-name="P8" draw:layer="layout" svg:width="21.327cm" svg:height="9.489cm" svg:x="3.26cm" svg:y="2.72cm" presentation:class="outline" presentation:user-transformed="true">
          <draw:text-box>
            <text:list text:style-name="L7">
              <text:list-item>
                <text:p text:style-name="P12"><text:span text:style-name="T4">Why do we need to know the Range of the dataset in order to interpret an </text:span><text:span text:style-name="T11">S-value</text:span><text:span text:style-name="T4">?</text:span></text:p>
              </text:list-item>
              <text:list-item>
                <text:p text:style-name="P12"><text:span text:style-name="T4">Besides looking at the </text:span><text:span text:style-name="T11">S-value</text:span><text:span text:style-name="T4">, what might you look for to determine whether a linear model is a good fit for the data?</text:span></text:p>
              </text:list-item>
            </text:list>
            <text:p text:style-name="P7"><text:span text:style-name="T7"/></text:p>
          </draw:text-box>
        </draw:frame>
        <presentation:notes draw:style-name="dp2">
          <draw:page-thumbnail draw:name="Google Shape;448;1fa849e2-4fdf-11f1-b989-559790d196ef:notes" draw:style-name="gr1" draw:layer="layout" svg:width="16.932cm" svg:height="9.524cm" svg:x="1.059cm" svg:y="1.905cm" draw:page-number="27" presentation:class="page"/>
          <draw:frame draw:name="Google Shape;449;1fa849e2-4fdf-11f1-b989-559790d196ef:notes" presentation:style-name="pr22" draw:text-style-name="P4" draw:layer="layout" svg:width="15.239cm" svg:height="11.429cm" svg:x="1.905cm" svg:y="12.065cm" presentation:class="notes" presentation:user-transformed="true">
            <draw:text-box>
              <text:list text:style-name="L10">
                <text:list-item>
                  <text:p text:style-name="P14"><text:span text:style-name="T3">Why do we need to know the Range of the dataset in order to interpret an </text:span><text:span text:style-name="T52">S-value</text:span><text:span text:style-name="T3">?</text:span></text:p>
                </text:list-item>
                <text:list-item>
                  <text:p text:style-name="P14"><text:span text:style-name="T17">Because </text:span><text:span text:style-name="T52">S-values</text:span><text:span text:style-name="T17"> tell us the expected error in units of the variable on the y-axis. An error of $1000 could be huge or minuscule depending on the context.</text:span></text:p>
                </text:list-item>
                <text:list-item>
                  <text:p text:style-name="P14"><text:span text:style-name="T3">Besides looking at the </text:span><text:span text:style-name="T52">S-value</text:span><text:span text:style-name="T3">, what might you look for to determine whether a linear model is a good fit for the data?</text:span></text:p>
                </text:list-item>
                <text:list-item>
                  <text:p text:style-name="P14"><text:span text:style-name="T17">That the average distance of the points above the line appears to be about the same as the average distance of the points below the line.</text:span></text:p>
                </text:list-item>
              </text:list>
              <text:p text:style-name="P3"><text:span text:style-name="T3">What about Non-linear Models and Algebra 2?</text:span></text:p>
              <text:p text:style-name="P3"><text:span text:style-name="T2">There's no reason things have to stop at line of best fit! Algebra 2 and Integrated 3 teachers -- or Data Science teachers looking to count their course as an alternative to Algebra 2 -- can extend this modeling work using our </text:span><text:span text:style-name="T53"><text:a xlink:href="https://bootstrapworld.org/materials/fall2026/en-us/courses/algebra-2/index.shtml" xlink:type="simple">Algebra 2</text:a></text:span><text:span text:style-name="T54"><text:s/>materials, which covers quadratic, exponential, logarithmic, and periodic models!</text:span></text:p>
              <text:p text:style-name="P3"><text:span text:style-name="T5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entury Gothic" svg:font-family="'Century Gothic'"/>
    <style:font-face style:name="Courier Prime" svg:font-family="'Courier Prime'"/>
    <style:font-face style:name="JetBrains Mono" svg:font-family="'JetBrains Mon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5f_HEADER_5f_1_5f_1-background" style:display-name="SECTION_HEADER_1_1-background" style:family="presentation">
      <style:graphic-properties draw:stroke="none" draw:fill="solid" draw:fill-color="#ffffff"/>
      <style:text-properties style:letter-kerning="true"/>
    </style:style>
    <style:style style:name="SECTION_5f_HEADER_5f_1_5f_1-backgroundobjects" style:display-name="SECTION_HEADER_1_1-backgroundobjects" style:family="presentation">
      <style:graphic-properties draw:textarea-horizontal-align="justify" draw:shadow="hidden" draw:shadow-offset-x="0.2cm" draw:shadow-offset-y="0.2cm" draw:shadow-color="#808080"/>
      <style:text-properties style:letter-kerning="true"/>
    </style:style>
    <style:style style:name="SECTION_5f_HEADER_5f_1_5f_1-notes" style:display-name="SECTION_HEADER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1_5f_1-outline1" style:display-name="SECTION_HEADER_1_1-outline1" style:family="presentation">
      <style:graphic-properties draw:stroke="none" draw:fill="none" draw:auto-grow-height="false" draw:fit-to-size="shrink-to-fit" style:shrink-to-fit="true">
        <text:list-style style:name="SECTION_5f_HEADER_5f_1_5f_1-outline1" style:display-name="SECTION_HEADER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_5f_1-outline2" style:display-name="SECTION_HEADER_1_1-outline2" style:family="presentation" style:parent-style-name="SECTION_5f_HEADER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1-outline3" style:display-name="SECTION_HEADER_1_1-outline3" style:family="presentation" style:parent-style-name="SECTION_5f_HEADER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1-outline4" style:display-name="SECTION_HEADER_1_1-outline4" style:family="presentation" style:parent-style-name="SECTION_5f_HEADER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1-outline5" style:display-name="SECTION_HEADER_1_1-outline5" style:family="presentation" style:parent-style-name="SECTION_5f_HEADER_5f_1_5f_1-outline4">
      <style:paragraph-properties fo:margin-top="0.1cm" fo:margin-bottom="0cm"/>
      <style:text-properties fo:font-size="20pt" style:font-size-asian="20pt" style:font-size-complex="20pt"/>
    </style:style>
    <style:style style:name="SECTION_5f_HEADER_5f_1_5f_1-outline6" style:display-name="SECTION_HEADER_1_1-outline6" style:family="presentation" style:parent-style-name="SECTION_5f_HEADER_5f_1_5f_1-outline5">
      <style:paragraph-properties fo:margin-top="0.1cm" fo:margin-bottom="0cm"/>
      <style:text-properties fo:font-size="20pt" style:font-size-asian="20pt" style:font-size-complex="20pt"/>
    </style:style>
    <style:style style:name="SECTION_5f_HEADER_5f_1_5f_1-outline7" style:display-name="SECTION_HEADER_1_1-outline7" style:family="presentation" style:parent-style-name="SECTION_5f_HEADER_5f_1_5f_1-outline6">
      <style:paragraph-properties fo:margin-top="0.1cm" fo:margin-bottom="0cm"/>
      <style:text-properties fo:font-size="20pt" style:font-size-asian="20pt" style:font-size-complex="20pt"/>
    </style:style>
    <style:style style:name="SECTION_5f_HEADER_5f_1_5f_1-outline8" style:display-name="SECTION_HEADER_1_1-outline8" style:family="presentation" style:parent-style-name="SECTION_5f_HEADER_5f_1_5f_1-outline7">
      <style:paragraph-properties fo:margin-top="0.1cm" fo:margin-bottom="0cm"/>
      <style:text-properties fo:font-size="20pt" style:font-size-asian="20pt" style:font-size-complex="20pt"/>
    </style:style>
    <style:style style:name="SECTION_5f_HEADER_5f_1_5f_1-outline9" style:display-name="SECTION_HEADER_1_1-outline9" style:family="presentation" style:parent-style-name="SECTION_5f_HEADER_5f_1_5f_1-outline8">
      <style:paragraph-properties fo:margin-top="0.1cm" fo:margin-bottom="0cm"/>
      <style:text-properties fo:font-size="20pt" style:font-size-asian="20pt" style:font-size-complex="20pt"/>
    </style:style>
    <style:style style:name="SECTION_5f_HEADER_5f_1_5f_1-subtitle" style:display-name="SECTION_HEADER_1_1-subtitle" style:family="presentation">
      <style:graphic-properties draw:stroke="none" draw:fill="none" draw:textarea-vertical-align="middle">
        <text:list-style style:name="SECTION_5f_HEADER_5f_1_5f_1-subtitle" style:display-name="SECTION_HEADER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_5f_1-title" style:display-name="SECTION_HEADER_1_1-title" style:family="presentation">
      <style:graphic-properties draw:stroke="none" draw:fill="none" draw:textarea-vertical-align="middle">
        <text:list-style style:name="SECTION_5f_HEADER_5f_1_5f_1-title" style:display-name="SECTION_HEADER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3-background" style:display-name="TITLE_AND_BODY_2_3-background" style:family="presentation">
      <style:graphic-properties draw:stroke="none" draw:fill="solid" draw:fill-color="#ffffff"/>
      <style:text-properties style:letter-kerning="true"/>
    </style:style>
    <style:style style:name="TITLE_5f_AND_5f_BODY_5f_2_5f_3-backgroundobjects" style:display-name="TITLE_AND_BODY_2_3-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2_5f_3-notes" style:display-name="TITLE_AND_BODY_2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2_5f_3-outline1" style:display-name="TITLE_AND_BODY_2_3-outline1" style:family="presentation">
      <style:graphic-properties draw:stroke="none" draw:fill="none" draw:auto-grow-height="false" draw:fit-to-size="shrink-to-fit" style:shrink-to-fit="true">
        <text:list-style style:name="TITLE_5f_AND_5f_BODY_5f_2_5f_3-outline1" style:display-name="TITLE_AND_BODY_2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3-outline2" style:display-name="TITLE_AND_BODY_2_3-outline2" style:family="presentation" style:parent-style-name="TITLE_5f_AND_5f_BODY_5f_2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3-outline3" style:display-name="TITLE_AND_BODY_2_3-outline3" style:family="presentation" style:parent-style-name="TITLE_5f_AND_5f_BODY_5f_2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3-outline4" style:display-name="TITLE_AND_BODY_2_3-outline4" style:family="presentation" style:parent-style-name="TITLE_5f_AND_5f_BODY_5f_2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3-outline5" style:display-name="TITLE_AND_BODY_2_3-outline5" style:family="presentation" style:parent-style-name="TITLE_5f_AND_5f_BODY_5f_2_5f_3-outline4">
      <style:paragraph-properties fo:margin-top="0.1cm" fo:margin-bottom="0cm"/>
      <style:text-properties fo:font-size="20pt" style:font-size-asian="20pt" style:font-size-complex="20pt"/>
    </style:style>
    <style:style style:name="TITLE_5f_AND_5f_BODY_5f_2_5f_3-outline6" style:display-name="TITLE_AND_BODY_2_3-outline6" style:family="presentation" style:parent-style-name="TITLE_5f_AND_5f_BODY_5f_2_5f_3-outline5">
      <style:paragraph-properties fo:margin-top="0.1cm" fo:margin-bottom="0cm"/>
      <style:text-properties fo:font-size="20pt" style:font-size-asian="20pt" style:font-size-complex="20pt"/>
    </style:style>
    <style:style style:name="TITLE_5f_AND_5f_BODY_5f_2_5f_3-outline7" style:display-name="TITLE_AND_BODY_2_3-outline7" style:family="presentation" style:parent-style-name="TITLE_5f_AND_5f_BODY_5f_2_5f_3-outline6">
      <style:paragraph-properties fo:margin-top="0.1cm" fo:margin-bottom="0cm"/>
      <style:text-properties fo:font-size="20pt" style:font-size-asian="20pt" style:font-size-complex="20pt"/>
    </style:style>
    <style:style style:name="TITLE_5f_AND_5f_BODY_5f_2_5f_3-outline8" style:display-name="TITLE_AND_BODY_2_3-outline8" style:family="presentation" style:parent-style-name="TITLE_5f_AND_5f_BODY_5f_2_5f_3-outline7">
      <style:paragraph-properties fo:margin-top="0.1cm" fo:margin-bottom="0cm"/>
      <style:text-properties fo:font-size="20pt" style:font-size-asian="20pt" style:font-size-complex="20pt"/>
    </style:style>
    <style:style style:name="TITLE_5f_AND_5f_BODY_5f_2_5f_3-outline9" style:display-name="TITLE_AND_BODY_2_3-outline9" style:family="presentation" style:parent-style-name="TITLE_5f_AND_5f_BODY_5f_2_5f_3-outline8">
      <style:paragraph-properties fo:margin-top="0.1cm" fo:margin-bottom="0cm"/>
      <style:text-properties fo:font-size="20pt" style:font-size-asian="20pt" style:font-size-complex="20pt"/>
    </style:style>
    <style:style style:name="TITLE_5f_AND_5f_BODY_5f_2_5f_3-subtitle" style:display-name="TITLE_AND_BODY_2_3-subtitle" style:family="presentation">
      <style:graphic-properties draw:stroke="none" draw:fill="none" draw:textarea-vertical-align="middle">
        <text:list-style style:name="TITLE_5f_AND_5f_BODY_5f_2_5f_3-subtitle" style:display-name="TITLE_AND_BODY_2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2_5f_3-title" style:display-name="TITLE_AND_BODY_2_3-title" style:family="presentation">
      <style:graphic-properties draw:stroke="none" draw:fill="none" draw:textarea-vertical-align="middle">
        <text:list-style style:name="TITLE_5f_AND_5f_BODY_5f_2_5f_3-title" style:display-name="TITLE_AND_BODY_2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4_5f_1-background" style:display-name="TITLE_AND_BODY_2_4_1-background" style:family="presentation">
      <style:graphic-properties draw:stroke="none" draw:fill="solid" draw:fill-color="#ffffff"/>
      <style:text-properties style:letter-kerning="true"/>
    </style:style>
    <style:style style:name="TITLE_5f_AND_5f_BODY_5f_2_5f_4_5f_1-backgroundobjects" style:display-name="TITLE_AND_BODY_2_4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2_5f_4_5f_1-notes" style:display-name="TITLE_AND_BODY_2_4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2_5f_4_5f_1-outline1" style:display-name="TITLE_AND_BODY_2_4_1-outline1" style:family="presentation">
      <style:graphic-properties draw:stroke="none" draw:fill="none" draw:auto-grow-height="false" draw:fit-to-size="shrink-to-fit" style:shrink-to-fit="true">
        <text:list-style style:name="TITLE_5f_AND_5f_BODY_5f_2_5f_4_5f_1-outline1" style:display-name="TITLE_AND_BODY_2_4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4_5f_1-outline2" style:display-name="TITLE_AND_BODY_2_4_1-outline2" style:family="presentation" style:parent-style-name="TITLE_5f_AND_5f_BODY_5f_2_5f_4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4_5f_1-outline3" style:display-name="TITLE_AND_BODY_2_4_1-outline3" style:family="presentation" style:parent-style-name="TITLE_5f_AND_5f_BODY_5f_2_5f_4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4_5f_1-outline4" style:display-name="TITLE_AND_BODY_2_4_1-outline4" style:family="presentation" style:parent-style-name="TITLE_5f_AND_5f_BODY_5f_2_5f_4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4_5f_1-outline5" style:display-name="TITLE_AND_BODY_2_4_1-outline5" style:family="presentation" style:parent-style-name="TITLE_5f_AND_5f_BODY_5f_2_5f_4_5f_1-outline4">
      <style:paragraph-properties fo:margin-top="0.1cm" fo:margin-bottom="0cm"/>
      <style:text-properties fo:font-size="20pt" style:font-size-asian="20pt" style:font-size-complex="20pt"/>
    </style:style>
    <style:style style:name="TITLE_5f_AND_5f_BODY_5f_2_5f_4_5f_1-outline6" style:display-name="TITLE_AND_BODY_2_4_1-outline6" style:family="presentation" style:parent-style-name="TITLE_5f_AND_5f_BODY_5f_2_5f_4_5f_1-outline5">
      <style:paragraph-properties fo:margin-top="0.1cm" fo:margin-bottom="0cm"/>
      <style:text-properties fo:font-size="20pt" style:font-size-asian="20pt" style:font-size-complex="20pt"/>
    </style:style>
    <style:style style:name="TITLE_5f_AND_5f_BODY_5f_2_5f_4_5f_1-outline7" style:display-name="TITLE_AND_BODY_2_4_1-outline7" style:family="presentation" style:parent-style-name="TITLE_5f_AND_5f_BODY_5f_2_5f_4_5f_1-outline6">
      <style:paragraph-properties fo:margin-top="0.1cm" fo:margin-bottom="0cm"/>
      <style:text-properties fo:font-size="20pt" style:font-size-asian="20pt" style:font-size-complex="20pt"/>
    </style:style>
    <style:style style:name="TITLE_5f_AND_5f_BODY_5f_2_5f_4_5f_1-outline8" style:display-name="TITLE_AND_BODY_2_4_1-outline8" style:family="presentation" style:parent-style-name="TITLE_5f_AND_5f_BODY_5f_2_5f_4_5f_1-outline7">
      <style:paragraph-properties fo:margin-top="0.1cm" fo:margin-bottom="0cm"/>
      <style:text-properties fo:font-size="20pt" style:font-size-asian="20pt" style:font-size-complex="20pt"/>
    </style:style>
    <style:style style:name="TITLE_5f_AND_5f_BODY_5f_2_5f_4_5f_1-outline9" style:display-name="TITLE_AND_BODY_2_4_1-outline9" style:family="presentation" style:parent-style-name="TITLE_5f_AND_5f_BODY_5f_2_5f_4_5f_1-outline8">
      <style:paragraph-properties fo:margin-top="0.1cm" fo:margin-bottom="0cm"/>
      <style:text-properties fo:font-size="20pt" style:font-size-asian="20pt" style:font-size-complex="20pt"/>
    </style:style>
    <style:style style:name="TITLE_5f_AND_5f_BODY_5f_2_5f_4_5f_1-subtitle" style:display-name="TITLE_AND_BODY_2_4_1-subtitle" style:family="presentation">
      <style:graphic-properties draw:stroke="none" draw:fill="none" draw:textarea-vertical-align="middle">
        <text:list-style style:name="TITLE_5f_AND_5f_BODY_5f_2_5f_4_5f_1-subtitle" style:display-name="TITLE_AND_BODY_2_4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2_5f_4_5f_1-title" style:display-name="TITLE_AND_BODY_2_4_1-title" style:family="presentation">
      <style:graphic-properties draw:stroke="none" draw:fill="none" draw:textarea-vertical-align="middle">
        <text:list-style style:name="TITLE_5f_AND_5f_BODY_5f_2_5f_4_5f_1-title" style:display-name="TITLE_AND_BODY_2_4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background" style:display-name="TITLE_AND_BODY_2-background" style:family="presentation">
      <style:graphic-properties draw:stroke="none" draw:fill="solid" draw:fill-color="#ffffff"/>
      <style:text-properties style:letter-kerning="true"/>
    </style:style>
    <style:style style:name="TITLE_5f_AND_5f_BODY_5f_2-backgroundobjects" style:display-name="TITLE_AND_BODY_2-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2-notes" style:display-name="TITLE_AND_BODY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2-outline1" style:display-name="TITLE_AND_BODY_2-outline1" style:family="presentation">
      <style:graphic-properties draw:stroke="none" draw:fill="none" draw:auto-grow-height="false" draw:fit-to-size="shrink-to-fit" style:shrink-to-fit="true">
        <text:list-style style:name="TITLE_5f_AND_5f_BODY_5f_2-outline1" style:display-name="TITLE_AND_BODY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outline2" style:display-name="TITLE_AND_BODY_2-outline2" style:family="presentation" style:parent-style-name="TITLE_5f_AND_5f_BODY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outline3" style:display-name="TITLE_AND_BODY_2-outline3" style:family="presentation" style:parent-style-name="TITLE_5f_AND_5f_BODY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outline4" style:display-name="TITLE_AND_BODY_2-outline4" style:family="presentation" style:parent-style-name="TITLE_5f_AND_5f_BODY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outline5" style:display-name="TITLE_AND_BODY_2-outline5" style:family="presentation" style:parent-style-name="TITLE_5f_AND_5f_BODY_5f_2-outline4">
      <style:paragraph-properties fo:margin-top="0.1cm" fo:margin-bottom="0cm"/>
      <style:text-properties fo:font-size="20pt" style:font-size-asian="20pt" style:font-size-complex="20pt"/>
    </style:style>
    <style:style style:name="TITLE_5f_AND_5f_BODY_5f_2-outline6" style:display-name="TITLE_AND_BODY_2-outline6" style:family="presentation" style:parent-style-name="TITLE_5f_AND_5f_BODY_5f_2-outline5">
      <style:paragraph-properties fo:margin-top="0.1cm" fo:margin-bottom="0cm"/>
      <style:text-properties fo:font-size="20pt" style:font-size-asian="20pt" style:font-size-complex="20pt"/>
    </style:style>
    <style:style style:name="TITLE_5f_AND_5f_BODY_5f_2-outline7" style:display-name="TITLE_AND_BODY_2-outline7" style:family="presentation" style:parent-style-name="TITLE_5f_AND_5f_BODY_5f_2-outline6">
      <style:paragraph-properties fo:margin-top="0.1cm" fo:margin-bottom="0cm"/>
      <style:text-properties fo:font-size="20pt" style:font-size-asian="20pt" style:font-size-complex="20pt"/>
    </style:style>
    <style:style style:name="TITLE_5f_AND_5f_BODY_5f_2-outline8" style:display-name="TITLE_AND_BODY_2-outline8" style:family="presentation" style:parent-style-name="TITLE_5f_AND_5f_BODY_5f_2-outline7">
      <style:paragraph-properties fo:margin-top="0.1cm" fo:margin-bottom="0cm"/>
      <style:text-properties fo:font-size="20pt" style:font-size-asian="20pt" style:font-size-complex="20pt"/>
    </style:style>
    <style:style style:name="TITLE_5f_AND_5f_BODY_5f_2-outline9" style:display-name="TITLE_AND_BODY_2-outline9" style:family="presentation" style:parent-style-name="TITLE_5f_AND_5f_BODY_5f_2-outline8">
      <style:paragraph-properties fo:margin-top="0.1cm" fo:margin-bottom="0cm"/>
      <style:text-properties fo:font-size="20pt" style:font-size-asian="20pt" style:font-size-complex="20pt"/>
    </style:style>
    <style:style style:name="TITLE_5f_AND_5f_BODY_5f_2-subtitle" style:display-name="TITLE_AND_BODY_2-subtitle" style:family="presentation">
      <style:graphic-properties draw:stroke="none" draw:fill="none" draw:textarea-vertical-align="middle">
        <text:list-style style:name="TITLE_5f_AND_5f_BODY_5f_2-subtitle" style:display-name="TITLE_AND_BODY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2-title" style:display-name="TITLE_AND_BODY_2-title" style:family="presentation">
      <style:graphic-properties draw:stroke="none" draw:fill="none" draw:textarea-vertical-align="middle">
        <text:list-style style:name="TITLE_5f_AND_5f_BODY_5f_2-title" style:display-name="TITLE_AND_BODY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2-background" style:display-name="TITLE_AND_BODY_2_2-background" style:family="presentation">
      <style:graphic-properties draw:stroke="none" draw:fill="solid" draw:fill-color="#ffffff"/>
      <style:text-properties style:letter-kerning="true"/>
    </style:style>
    <style:style style:name="TITLE_5f_AND_5f_BODY_5f_2_5f_2-backgroundobjects" style:display-name="TITLE_AND_BODY_2_2-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2_5f_2-notes" style:display-name="TITLE_AND_BODY_2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2_5f_2-outline1" style:display-name="TITLE_AND_BODY_2_2-outline1" style:family="presentation">
      <style:graphic-properties draw:stroke="none" draw:fill="none" draw:auto-grow-height="false" draw:fit-to-size="shrink-to-fit" style:shrink-to-fit="true">
        <text:list-style style:name="TITLE_5f_AND_5f_BODY_5f_2_5f_2-outline1" style:display-name="TITLE_AND_BODY_2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2-outline2" style:display-name="TITLE_AND_BODY_2_2-outline2" style:family="presentation" style:parent-style-name="TITLE_5f_AND_5f_BODY_5f_2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2-outline3" style:display-name="TITLE_AND_BODY_2_2-outline3" style:family="presentation" style:parent-style-name="TITLE_5f_AND_5f_BODY_5f_2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2-outline4" style:display-name="TITLE_AND_BODY_2_2-outline4" style:family="presentation" style:parent-style-name="TITLE_5f_AND_5f_BODY_5f_2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2-outline5" style:display-name="TITLE_AND_BODY_2_2-outline5" style:family="presentation" style:parent-style-name="TITLE_5f_AND_5f_BODY_5f_2_5f_2-outline4">
      <style:paragraph-properties fo:margin-top="0.1cm" fo:margin-bottom="0cm"/>
      <style:text-properties fo:font-size="20pt" style:font-size-asian="20pt" style:font-size-complex="20pt"/>
    </style:style>
    <style:style style:name="TITLE_5f_AND_5f_BODY_5f_2_5f_2-outline6" style:display-name="TITLE_AND_BODY_2_2-outline6" style:family="presentation" style:parent-style-name="TITLE_5f_AND_5f_BODY_5f_2_5f_2-outline5">
      <style:paragraph-properties fo:margin-top="0.1cm" fo:margin-bottom="0cm"/>
      <style:text-properties fo:font-size="20pt" style:font-size-asian="20pt" style:font-size-complex="20pt"/>
    </style:style>
    <style:style style:name="TITLE_5f_AND_5f_BODY_5f_2_5f_2-outline7" style:display-name="TITLE_AND_BODY_2_2-outline7" style:family="presentation" style:parent-style-name="TITLE_5f_AND_5f_BODY_5f_2_5f_2-outline6">
      <style:paragraph-properties fo:margin-top="0.1cm" fo:margin-bottom="0cm"/>
      <style:text-properties fo:font-size="20pt" style:font-size-asian="20pt" style:font-size-complex="20pt"/>
    </style:style>
    <style:style style:name="TITLE_5f_AND_5f_BODY_5f_2_5f_2-outline8" style:display-name="TITLE_AND_BODY_2_2-outline8" style:family="presentation" style:parent-style-name="TITLE_5f_AND_5f_BODY_5f_2_5f_2-outline7">
      <style:paragraph-properties fo:margin-top="0.1cm" fo:margin-bottom="0cm"/>
      <style:text-properties fo:font-size="20pt" style:font-size-asian="20pt" style:font-size-complex="20pt"/>
    </style:style>
    <style:style style:name="TITLE_5f_AND_5f_BODY_5f_2_5f_2-outline9" style:display-name="TITLE_AND_BODY_2_2-outline9" style:family="presentation" style:parent-style-name="TITLE_5f_AND_5f_BODY_5f_2_5f_2-outline8">
      <style:paragraph-properties fo:margin-top="0.1cm" fo:margin-bottom="0cm"/>
      <style:text-properties fo:font-size="20pt" style:font-size-asian="20pt" style:font-size-complex="20pt"/>
    </style:style>
    <style:style style:name="TITLE_5f_AND_5f_BODY_5f_2_5f_2-subtitle" style:display-name="TITLE_AND_BODY_2_2-subtitle" style:family="presentation">
      <style:graphic-properties draw:stroke="none" draw:fill="none" draw:textarea-vertical-align="middle">
        <text:list-style style:name="TITLE_5f_AND_5f_BODY_5f_2_5f_2-subtitle" style:display-name="TITLE_AND_BODY_2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2_5f_2-title" style:display-name="TITLE_AND_BODY_2_2-title" style:family="presentation">
      <style:graphic-properties draw:stroke="none" draw:fill="none" draw:textarea-vertical-align="middle">
        <text:list-style style:name="TITLE_5f_AND_5f_BODY_5f_2_5f_2-title" style:display-name="TITLE_AND_BODY_2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1-background" style:display-name="TITLE_AND_BODY_2_1-background" style:family="presentation">
      <style:graphic-properties draw:stroke="none" draw:fill="solid" draw:fill-color="#ffffff"/>
      <style:text-properties style:letter-kerning="true"/>
    </style:style>
    <style:style style:name="TITLE_5f_AND_5f_BODY_5f_2_5f_1-backgroundobjects" style:display-name="TITLE_AND_BODY_2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2_5f_1-notes" style:display-name="TITLE_AND_BODY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2_5f_1-outline1" style:display-name="TITLE_AND_BODY_2_1-outline1" style:family="presentation">
      <style:graphic-properties draw:stroke="none" draw:fill="none" draw:auto-grow-height="false" draw:fit-to-size="shrink-to-fit" style:shrink-to-fit="true">
        <text:list-style style:name="TITLE_5f_AND_5f_BODY_5f_2_5f_1-outline1" style:display-name="TITLE_AND_BODY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1-outline2" style:display-name="TITLE_AND_BODY_2_1-outline2" style:family="presentation" style:parent-style-name="TITLE_5f_AND_5f_BODY_5f_2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outline3" style:display-name="TITLE_AND_BODY_2_1-outline3" style:family="presentation" style:parent-style-name="TITLE_5f_AND_5f_BODY_5f_2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outline4" style:display-name="TITLE_AND_BODY_2_1-outline4" style:family="presentation" style:parent-style-name="TITLE_5f_AND_5f_BODY_5f_2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outline5" style:display-name="TITLE_AND_BODY_2_1-outline5" style:family="presentation" style:parent-style-name="TITLE_5f_AND_5f_BODY_5f_2_5f_1-outline4">
      <style:paragraph-properties fo:margin-top="0.1cm" fo:margin-bottom="0cm"/>
      <style:text-properties fo:font-size="20pt" style:font-size-asian="20pt" style:font-size-complex="20pt"/>
    </style:style>
    <style:style style:name="TITLE_5f_AND_5f_BODY_5f_2_5f_1-outline6" style:display-name="TITLE_AND_BODY_2_1-outline6" style:family="presentation" style:parent-style-name="TITLE_5f_AND_5f_BODY_5f_2_5f_1-outline5">
      <style:paragraph-properties fo:margin-top="0.1cm" fo:margin-bottom="0cm"/>
      <style:text-properties fo:font-size="20pt" style:font-size-asian="20pt" style:font-size-complex="20pt"/>
    </style:style>
    <style:style style:name="TITLE_5f_AND_5f_BODY_5f_2_5f_1-outline7" style:display-name="TITLE_AND_BODY_2_1-outline7" style:family="presentation" style:parent-style-name="TITLE_5f_AND_5f_BODY_5f_2_5f_1-outline6">
      <style:paragraph-properties fo:margin-top="0.1cm" fo:margin-bottom="0cm"/>
      <style:text-properties fo:font-size="20pt" style:font-size-asian="20pt" style:font-size-complex="20pt"/>
    </style:style>
    <style:style style:name="TITLE_5f_AND_5f_BODY_5f_2_5f_1-outline8" style:display-name="TITLE_AND_BODY_2_1-outline8" style:family="presentation" style:parent-style-name="TITLE_5f_AND_5f_BODY_5f_2_5f_1-outline7">
      <style:paragraph-properties fo:margin-top="0.1cm" fo:margin-bottom="0cm"/>
      <style:text-properties fo:font-size="20pt" style:font-size-asian="20pt" style:font-size-complex="20pt"/>
    </style:style>
    <style:style style:name="TITLE_5f_AND_5f_BODY_5f_2_5f_1-outline9" style:display-name="TITLE_AND_BODY_2_1-outline9" style:family="presentation" style:parent-style-name="TITLE_5f_AND_5f_BODY_5f_2_5f_1-outline8">
      <style:paragraph-properties fo:margin-top="0.1cm" fo:margin-bottom="0cm"/>
      <style:text-properties fo:font-size="20pt" style:font-size-asian="20pt" style:font-size-complex="20pt"/>
    </style:style>
    <style:style style:name="TITLE_5f_AND_5f_BODY_5f_2_5f_1-subtitle" style:display-name="TITLE_AND_BODY_2_1-subtitle" style:family="presentation">
      <style:graphic-properties draw:stroke="none" draw:fill="none" draw:textarea-vertical-align="middle">
        <text:list-style style:name="TITLE_5f_AND_5f_BODY_5f_2_5f_1-subtitle" style:display-name="TITLE_AND_BODY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2_5f_1-title" style:display-name="TITLE_AND_BODY_2_1-title" style:family="presentation">
      <style:graphic-properties draw:stroke="none" draw:fill="none" draw:textarea-vertical-align="middle">
        <text:list-style style:name="TITLE_5f_AND_5f_BODY_5f_2_5f_1-title" style:display-name="TITLE_AND_BODY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1_5f_1-background" style:display-name="TITLE_AND_BODY_2_1_1-background" style:family="presentation">
      <style:graphic-properties draw:stroke="none" draw:fill="solid" draw:fill-color="#ffffff"/>
      <style:text-properties style:letter-kerning="true"/>
    </style:style>
    <style:style style:name="TITLE_5f_AND_5f_BODY_5f_2_5f_1_5f_1-backgroundobjects" style:display-name="TITLE_AND_BODY_2_1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2_5f_1_5f_1-notes" style:display-name="TITLE_AND_BODY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2_5f_1_5f_1-outline1" style:display-name="TITLE_AND_BODY_2_1_1-outline1" style:family="presentation">
      <style:graphic-properties draw:stroke="none" draw:fill="none" draw:auto-grow-height="false" draw:fit-to-size="shrink-to-fit" style:shrink-to-fit="true">
        <text:list-style style:name="TITLE_5f_AND_5f_BODY_5f_2_5f_1_5f_1-outline1" style:display-name="TITLE_AND_BODY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1_5f_1-outline2" style:display-name="TITLE_AND_BODY_2_1_1-outline2" style:family="presentation" style:parent-style-name="TITLE_5f_AND_5f_BODY_5f_2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_5f_1-outline3" style:display-name="TITLE_AND_BODY_2_1_1-outline3" style:family="presentation" style:parent-style-name="TITLE_5f_AND_5f_BODY_5f_2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_5f_1-outline4" style:display-name="TITLE_AND_BODY_2_1_1-outline4" style:family="presentation" style:parent-style-name="TITLE_5f_AND_5f_BODY_5f_2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_5f_1-outline5" style:display-name="TITLE_AND_BODY_2_1_1-outline5" style:family="presentation" style:parent-style-name="TITLE_5f_AND_5f_BODY_5f_2_5f_1_5f_1-outline4">
      <style:paragraph-properties fo:margin-top="0.1cm" fo:margin-bottom="0cm"/>
      <style:text-properties fo:font-size="20pt" style:font-size-asian="20pt" style:font-size-complex="20pt"/>
    </style:style>
    <style:style style:name="TITLE_5f_AND_5f_BODY_5f_2_5f_1_5f_1-outline6" style:display-name="TITLE_AND_BODY_2_1_1-outline6" style:family="presentation" style:parent-style-name="TITLE_5f_AND_5f_BODY_5f_2_5f_1_5f_1-outline5">
      <style:paragraph-properties fo:margin-top="0.1cm" fo:margin-bottom="0cm"/>
      <style:text-properties fo:font-size="20pt" style:font-size-asian="20pt" style:font-size-complex="20pt"/>
    </style:style>
    <style:style style:name="TITLE_5f_AND_5f_BODY_5f_2_5f_1_5f_1-outline7" style:display-name="TITLE_AND_BODY_2_1_1-outline7" style:family="presentation" style:parent-style-name="TITLE_5f_AND_5f_BODY_5f_2_5f_1_5f_1-outline6">
      <style:paragraph-properties fo:margin-top="0.1cm" fo:margin-bottom="0cm"/>
      <style:text-properties fo:font-size="20pt" style:font-size-asian="20pt" style:font-size-complex="20pt"/>
    </style:style>
    <style:style style:name="TITLE_5f_AND_5f_BODY_5f_2_5f_1_5f_1-outline8" style:display-name="TITLE_AND_BODY_2_1_1-outline8" style:family="presentation" style:parent-style-name="TITLE_5f_AND_5f_BODY_5f_2_5f_1_5f_1-outline7">
      <style:paragraph-properties fo:margin-top="0.1cm" fo:margin-bottom="0cm"/>
      <style:text-properties fo:font-size="20pt" style:font-size-asian="20pt" style:font-size-complex="20pt"/>
    </style:style>
    <style:style style:name="TITLE_5f_AND_5f_BODY_5f_2_5f_1_5f_1-outline9" style:display-name="TITLE_AND_BODY_2_1_1-outline9" style:family="presentation" style:parent-style-name="TITLE_5f_AND_5f_BODY_5f_2_5f_1_5f_1-outline8">
      <style:paragraph-properties fo:margin-top="0.1cm" fo:margin-bottom="0cm"/>
      <style:text-properties fo:font-size="20pt" style:font-size-asian="20pt" style:font-size-complex="20pt"/>
    </style:style>
    <style:style style:name="TITLE_5f_AND_5f_BODY_5f_2_5f_1_5f_1-subtitle" style:display-name="TITLE_AND_BODY_2_1_1-subtitle" style:family="presentation">
      <style:graphic-properties draw:stroke="none" draw:fill="none" draw:textarea-vertical-align="middle">
        <text:list-style style:name="TITLE_5f_AND_5f_BODY_5f_2_5f_1_5f_1-subtitle" style:display-name="TITLE_AND_BODY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2_5f_1_5f_1-title" style:display-name="TITLE_AND_BODY_2_1_1-title" style:family="presentation">
      <style:graphic-properties draw:stroke="none" draw:fill="none" draw:textarea-vertical-align="middle">
        <text:list-style style:name="TITLE_5f_AND_5f_BODY_5f_2_5f_1_5f_1-title" style:display-name="TITLE_AND_BODY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558cm, 0cm, 6.722cm, 0cm)" draw:image-opacity="100%" style:mirror="none"/>
    </style:style>
    <style:style style:name="Mpr1" style:family="presentation" style:parent-style-name="SECTION_5f_HEADER_5f_1_5f_1-backgroundobjects">
      <style:graphic-properties draw:stroke="none" draw:fill="none" draw:fill-color="#ffffff" draw:auto-grow-height="false" fo:min-height="1.485cm"/>
    </style:style>
    <style:style style:name="Mpr2" style:family="presentation" style:parent-style-name="SECTION_5f_HEADER_5f_1_5f_1-backgroundobjects">
      <style:graphic-properties draw:stroke="none" draw:fill="none" draw:fill-color="#ffffff" draw:textarea-vertical-align="bottom" draw:auto-grow-height="false" fo:min-height="1.485cm"/>
    </style:style>
    <style:style style:name="Mpr3" style:family="presentation" style:parent-style-name="TITLE_5f_AND_5f_BODY_5f_2_5f_3-backgroundobjects">
      <style:graphic-properties draw:stroke="none" draw:fill="none" draw:fill-color="#ffffff" draw:auto-grow-height="false" fo:min-height="1.27cm"/>
    </style:style>
    <style:style style:name="Mpr4" style:family="presentation" style:parent-style-name="TITLE_5f_AND_5f_BODY_5f_2_5f_3-backgroundobjects">
      <style:graphic-properties draw:stroke="none" draw:fill="none" draw:fill-color="#ffffff" draw:textarea-vertical-align="bottom" draw:auto-grow-height="false" fo:min-height="1.27cm"/>
    </style:style>
    <style:style style:name="Mpr5" style:family="presentation" style:parent-style-name="TITLE_5f_AND_5f_BODY_5f_2_5f_4_5f_1-backgroundobjects">
      <style:graphic-properties draw:stroke="none" draw:fill="none" draw:fill-color="#ffffff" draw:auto-grow-height="false" fo:min-height="1.27cm"/>
    </style:style>
    <style:style style:name="Mpr6" style:family="presentation" style:parent-style-name="TITLE_5f_AND_5f_BODY_5f_2_5f_4_5f_1-backgroundobjects">
      <style:graphic-properties draw:stroke="none" draw:fill="none" draw:fill-color="#ffffff" draw:textarea-vertical-align="bottom" draw:auto-grow-height="false" fo:min-height="1.27cm"/>
    </style:style>
    <style:style style:name="Mpr7" style:family="presentation" style:parent-style-name="TITLE_5f_AND_5f_BODY_5f_2-backgroundobjects">
      <style:graphic-properties draw:stroke="none" draw:fill="none" draw:fill-color="#ffffff" draw:auto-grow-height="false" fo:min-height="1.27cm"/>
    </style:style>
    <style:style style:name="Mpr8" style:family="presentation" style:parent-style-name="TITLE_5f_AND_5f_BODY_5f_2-backgroundobjects">
      <style:graphic-properties draw:stroke="none" draw:fill="none" draw:fill-color="#ffffff" draw:textarea-vertical-align="bottom" draw:auto-grow-height="false" fo:min-height="1.27cm"/>
    </style:style>
    <style:style style:name="Mpr9" style:family="presentation" style:parent-style-name="TITLE_5f_AND_5f_BODY_5f_2_5f_2-backgroundobjects">
      <style:graphic-properties draw:stroke="none" draw:fill="none" draw:fill-color="#ffffff" draw:auto-grow-height="false" fo:min-height="1.27cm"/>
    </style:style>
    <style:style style:name="Mpr10" style:family="presentation" style:parent-style-name="TITLE_5f_AND_5f_BODY_5f_2_5f_2-backgroundobjects">
      <style:graphic-properties draw:stroke="none" draw:fill="none" draw:fill-color="#ffffff" draw:textarea-vertical-align="bottom" draw:auto-grow-height="false" fo:min-height="1.27cm"/>
    </style:style>
    <style:style style:name="Mpr11" style:family="presentation" style:parent-style-name="TITLE_5f_AND_5f_BODY_5f_2_5f_1-backgroundobjects">
      <style:graphic-properties draw:stroke="none" draw:fill="none" draw:fill-color="#ffffff" draw:auto-grow-height="false" fo:min-height="1.27cm"/>
    </style:style>
    <style:style style:name="Mpr12" style:family="presentation" style:parent-style-name="TITLE_5f_AND_5f_BODY_5f_2_5f_1-backgroundobjects">
      <style:graphic-properties draw:stroke="none" draw:fill="none" draw:fill-color="#ffffff" draw:textarea-vertical-align="bottom" draw:auto-grow-height="false" fo:min-height="1.27cm"/>
    </style:style>
    <style:style style:name="Mpr13" style:family="presentation" style:parent-style-name="TITLE_5f_AND_5f_BODY_5f_2_5f_1_5f_1-backgroundobjects">
      <style:graphic-properties draw:stroke="none" draw:fill="none" draw:fill-color="#ffffff" draw:auto-grow-height="false" fo:min-height="1.27cm"/>
    </style:style>
    <style:style style:name="Mpr14" style:family="presentation" style:parent-style-name="TITLE_5f_AND_5f_BODY_5f_2_5f_1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solid" draw:fill-color="#000000"/>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normal" style:font-name-asian="Century Gothic" style:font-size-asian="18pt" style:font-style-asian="normal" style:font-weight-asian="normal" style:font-name-complex="Century Gothic"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ECTION_5f_HEADER_5f_1_5f_1" style:display-name="SECTION_HEADER_1_1" style:page-layout-name="PM1" draw:style-name="Mdp1">
      <draw:frame draw:name="Google Shape;9;p2" presentation:style-name="SECTION_5f_HEADER_5f_1_5f_1-title" draw:layer="backgroundobjects" svg:width="23.667cm" svg:height="2.003cm" svg:x="0.866cm" svg:y="0.428cm" presentation:class="title" presentation:placeholder="true" presentation:user-transformed="true">
        <draw:text-box/>
      </draw:frame>
      <draw:frame draw:name="Google Shape;10;p2" draw:style-name="Mgr3" draw:text-style-name="MP5" draw:layer="backgroundobjects" svg:width="9.664cm" svg:height="9.664cm" svg:x="7.868cm" svg:y="3.104cm">
        <draw:image xlink:href="Pictures/100002010000040000000400A2C57A2F2A1F919C.png" xlink:type="simple" xlink:show="embed" xlink:actuate="onLoad">
          <text:p/>
        </draw:image>
      </draw:frame>
      <draw:frame draw:name="Google Shape;11;p2" draw:style-name="Mgr3" draw:text-style-name="MP5" draw:layer="backgroundobjects" svg:width="0.766cm" svg:height="0.766cm" svg:x="16.824cm" svg:y="13.157cm">
        <draw:image xlink:href="Pictures/10000201000000B4000000B46027ED32C11D68DD.png" xlink:type="simple" xlink:show="embed" xlink:actuate="onLoad">
          <text:p/>
        </draw:image>
      </draw:frame>
      <draw:frame draw:name="Google Shape;12;p2" draw:style-name="Mgr3" draw:text-style-name="MP5" draw:layer="backgroundobjects" svg:width="0.766cm" svg:height="0.766cm" svg:x="15.907cm" svg:y="13.157cm">
        <draw:image xlink:href="Pictures/1000020100000084000000841A7D57659B0061C4.png" xlink:type="simple" xlink:show="embed" xlink:actuate="onLoad">
          <text:p/>
        </draw:image>
      </draw:frame>
      <draw:frame draw:name="Google Shape;13;p2" draw:style-name="Mgr3" draw:text-style-name="MP5" draw:layer="backgroundobjects" svg:width="1.346cm" svg:height="1.009cm" svg:x="17.576cm" svg:y="13.066cm">
        <draw:image xlink:href="Pictures/10000201000001900000012CE2A20F5209AEEEE6.png" xlink:type="simple" xlink:show="embed" xlink:actuate="onLoad">
          <text:p/>
        </draw:image>
      </draw:frame>
      <draw:custom-shape draw:name="Google Shape;14;p2" draw:style-name="Mgr4" draw:text-style-name="MP7" draw:layer="backgroundobjects" svg:width="6.772cm" svg:height="1.009cm" svg:x="18.575cm" svg:y="12.904cm">
        <text:p text:style-name="MP6"><text:span text:style-name="MT1">@Bootstrap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ECTION_5f_HEADER_5f_1_5f_1-outline1" draw:layer="backgroundobjects" svg:width="22.859cm" svg:height="8.286cm" svg:x="1.27cm" svg:y="3.343cm" presentation:class="outline" presentation:placeholder="true">
        <draw:text-box/>
      </draw:frame>
      <presentation:notes style:page-layout-name="PM2">
        <draw:page-thumbnail presentation:style-name="SECTION_5f_HEADER_5f_1_5f_1-title" draw:layer="backgroundobjects" svg:width="19.798cm" svg:height="11.136cm" svg:x="0.6cm" svg:y="2.257cm" presentation:class="page"/>
        <draw:frame presentation:style-name="SECTION_5f_HEADER_5f_1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_5f_2_5f_3" style:display-name="TITLE_AND_BODY_2_3" style:page-layout-name="PM1" draw:style-name="Mdp1">
      <draw:frame draw:name="Google Shape;112;p17" presentation:style-name="TITLE_5f_AND_5f_BODY_5f_2_5f_3-outline1" draw:layer="backgroundobjects" svg:width="20.914cm" svg:height="9.489cm" svg:x="3.508cm" svg:y="2.668cm" presentation:class="outline" presentation:placeholder="true" presentation:user-transformed="true">
        <draw:text-box/>
      </draw:frame>
      <draw:frame draw:name="Google Shape;113;p17" presentation:style-name="TITLE_5f_AND_5f_BODY_5f_2_5f_3-outline1" draw:layer="backgroundobjects" svg:width="10.89cm" svg:height="8.972cm" svg:x="6.931cm" svg:y="5.164cm" presentation:class="outline" presentation:placeholder="true" presentation:user-transformed="true">
        <draw:text-box/>
      </draw:frame>
      <draw:custom-shape draw:name="Google Shape;114;p17" draw:style-name="Mgr5" draw:text-style-name="MP8" draw:layer="backgroundobjects" svg:width="25.452cm" svg:height="2.178cm" svg:x="-0.022cm" svg:y="-0.002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5;p17" presentation:style-name="TITLE_5f_AND_5f_BODY_5f_2_5f_3-title" draw:layer="backgroundobjects" svg:width="21.908cm" svg:height="1.59cm" svg:x="3.356cm" svg:y="0.178cm" presentation:class="title" presentation:placeholder="true" presentation:user-transformed="true">
        <draw:text-box/>
      </draw:frame>
      <draw:frame draw:name="Google Shape;116;p17" draw:style-name="Mgr3" draw:text-style-name="MP5" draw:layer="backgroundobjects" svg:width="3.604cm" svg:height="3.604cm" svg:x="0.234cm" svg:y="0.215cm">
        <draw:image xlink:href="Pictures/100002010000020000000200E34C0A2E787C9B97.png" xlink:type="simple" xlink:show="embed" xlink:actuate="onLoad">
          <text:p/>
        </draw:image>
      </draw:frame>
      <presentation:notes style:page-layout-name="PM2">
        <draw:page-thumbnail presentation:style-name="TITLE_5f_AND_5f_BODY_5f_2_5f_3-title" draw:layer="backgroundobjects" svg:width="16.931cm" svg:height="9.524cm" svg:x="1.059cm" svg:y="1.93cm" presentation:class="page"/>
        <draw:frame presentation:style-name="TITLE_5f_AND_5f_BODY_5f_2_5f_3-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2_5f_4_5f_1" style:display-name="TITLE_AND_BODY_2_4_1" style:page-layout-name="PM1" draw:style-name="Mdp1">
      <draw:frame draw:name="Google Shape;100;p15" presentation:style-name="TITLE_5f_AND_5f_BODY_5f_2_5f_4_5f_1-outline1" draw:layer="backgroundobjects" svg:width="21.132cm" svg:height="9.489cm" svg:x="3.519cm" svg:y="2.786cm" presentation:class="outline" presentation:placeholder="true" presentation:user-transformed="true">
        <draw:text-box/>
      </draw:frame>
      <draw:frame draw:name="Google Shape;101;p15" draw:style-name="Mgr6" draw:text-style-name="MP5" draw:layer="backgroundobjects" svg:width="3.114cm" svg:height="1.93cm" svg:x="0.041cm" svg:y="7.263cm">
        <draw:image xlink:href="Pictures/1000020100000438000004385DCD94D9D292316F.png" xlink:type="simple" xlink:show="embed" xlink:actuate="onLoad">
          <text:p/>
        </draw:image>
      </draw:frame>
      <draw:custom-shape draw:name="Google Shape;102;p15" draw:style-name="Mgr5" draw:text-style-name="MP8" draw:layer="backgroundobjects" svg:width="25.452cm" svg:height="2.178cm" svg:x="-0.022cm" svg:y="-0.002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3;p15" presentation:style-name="TITLE_5f_AND_5f_BODY_5f_2_5f_4_5f_1-title" draw:layer="backgroundobjects" svg:width="21.908cm" svg:height="1.59cm" svg:x="3.356cm" svg:y="0.178cm" presentation:class="title" presentation:placeholder="true" presentation:user-transformed="true">
        <draw:text-box/>
      </draw:frame>
      <draw:frame draw:name="Google Shape;104;p15" draw:style-name="Mgr3" draw:text-style-name="MP5" draw:layer="backgroundobjects" svg:width="3.604cm" svg:height="3.604cm" svg:x="0.234cm" svg:y="0.215cm">
        <draw:image xlink:href="Pictures/100002010000020000000200E34C0A2E787C9B97.png" xlink:type="simple" xlink:show="embed" xlink:actuate="onLoad">
          <text:p/>
        </draw:image>
      </draw:frame>
      <presentation:notes style:page-layout-name="PM2">
        <draw:page-thumbnail presentation:style-name="TITLE_5f_AND_5f_BODY_5f_2_5f_4_5f_1-title" draw:layer="backgroundobjects" svg:width="16.931cm" svg:height="9.524cm" svg:x="1.059cm" svg:y="1.93cm" presentation:class="page"/>
        <draw:frame presentation:style-name="TITLE_5f_AND_5f_BODY_5f_2_5f_4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2" style:display-name="TITLE_AND_BODY_2" style:page-layout-name="PM1" draw:style-name="Mdp1">
      <draw:frame draw:name="Google Shape;89;p13" presentation:style-name="TITLE_5f_AND_5f_BODY_5f_2-outline1" draw:layer="backgroundobjects" svg:width="20.699cm" svg:height="9.489cm" svg:x="3.578cm" svg:y="2.786cm" presentation:class="outline" presentation:placeholder="true" presentation:user-transformed="true">
        <draw:text-box/>
      </draw:frame>
      <draw:custom-shape draw:name="Google Shape;90;p13" draw:style-name="Mgr5" draw:text-style-name="MP8" draw:layer="backgroundobjects" svg:width="25.452cm" svg:height="2.178cm" svg:x="-0.022cm" svg:y="-0.002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p13" presentation:style-name="TITLE_5f_AND_5f_BODY_5f_2-title" draw:layer="backgroundobjects" svg:width="21.908cm" svg:height="1.59cm" svg:x="3.356cm" svg:y="0.178cm" presentation:class="title" presentation:placeholder="true" presentation:user-transformed="true">
        <draw:text-box/>
      </draw:frame>
      <draw:frame draw:name="Google Shape;92;p13" draw:style-name="Mgr3" draw:text-style-name="MP5" draw:layer="backgroundobjects" svg:width="3.604cm" svg:height="3.604cm" svg:x="0.234cm" svg:y="0.215cm">
        <draw:image xlink:href="Pictures/100002010000020000000200E34C0A2E787C9B97.png" xlink:type="simple" xlink:show="embed" xlink:actuate="onLoad">
          <text:p/>
        </draw:image>
      </draw:frame>
      <presentation:notes style:page-layout-name="PM2">
        <draw:page-thumbnail presentation:style-name="TITLE_5f_AND_5f_BODY_5f_2-title" draw:layer="backgroundobjects" svg:width="16.931cm" svg:height="9.524cm" svg:x="1.059cm" svg:y="1.93cm" presentation:class="page"/>
        <draw:frame presentation:style-name="TITLE_5f_AND_5f_BODY_5f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2_5f_2" style:display-name="TITLE_AND_BODY_2_2" style:page-layout-name="PM1" draw:style-name="Mdp1">
      <draw:frame draw:name="Google Shape;106;p16" presentation:style-name="TITLE_5f_AND_5f_BODY_5f_2_5f_2-outline1" draw:layer="backgroundobjects" svg:width="15.185cm" svg:height="9.489cm" svg:x="1.193cm" svg:y="4.199cm" presentation:class="outline" presentation:placeholder="true" presentation:user-transformed="true">
        <draw:text-box/>
      </draw:frame>
      <draw:frame draw:name="Google Shape;107;p16" presentation:style-name="TITLE_5f_AND_5f_BODY_5f_2_5f_2-outline1" draw:layer="backgroundobjects" svg:width="8.307cm" svg:height="7.238cm" svg:x="16.732cm" svg:y="4.199cm" presentation:class="outline" presentation:placeholder="true" presentation:user-transformed="true">
        <draw:text-box/>
      </draw:frame>
      <draw:custom-shape draw:name="Google Shape;108;p16" draw:style-name="Mgr5" draw:text-style-name="MP8" draw:layer="backgroundobjects" svg:width="25.452cm" svg:height="2.178cm" svg:x="-0.022cm" svg:y="-0.002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9;p16" presentation:style-name="TITLE_5f_AND_5f_BODY_5f_2_5f_2-title" draw:layer="backgroundobjects" svg:width="21.908cm" svg:height="1.59cm" svg:x="3.356cm" svg:y="0.178cm" presentation:class="title" presentation:placeholder="true" presentation:user-transformed="true">
        <draw:text-box/>
      </draw:frame>
      <draw:frame draw:name="Google Shape;110;p16" draw:style-name="Mgr3" draw:text-style-name="MP5" draw:layer="backgroundobjects" svg:width="3.604cm" svg:height="3.604cm" svg:x="0.234cm" svg:y="0.215cm">
        <draw:image xlink:href="Pictures/100002010000020000000200E34C0A2E787C9B97.png" xlink:type="simple" xlink:show="embed" xlink:actuate="onLoad">
          <text:p/>
        </draw:image>
      </draw:frame>
      <presentation:notes style:page-layout-name="PM2">
        <draw:page-thumbnail presentation:style-name="TITLE_5f_AND_5f_BODY_5f_2_5f_2-title" draw:layer="backgroundobjects" svg:width="16.931cm" svg:height="9.524cm" svg:x="1.059cm" svg:y="1.93cm" presentation:class="page"/>
        <draw:frame presentation:style-name="TITLE_5f_AND_5f_BODY_5f_2_5f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2_5f_1" style:display-name="TITLE_AND_BODY_2_1" style:page-layout-name="PM1" draw:style-name="Mdp1">
      <draw:custom-shape draw:name="Google Shape;132;p20" draw:style-name="Mgr5" draw:text-style-name="MP8" draw:layer="backgroundobjects" svg:width="25.421cm" svg:height="2.178cm" svg:x="-0.001cm" svg:y="-0.002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p20" draw:style-name="Mgr3" draw:text-style-name="MP5" draw:layer="backgroundobjects" svg:width="3.699cm" svg:height="3.699cm" svg:x="0.113cm" svg:y="0.216cm">
        <draw:image xlink:href="Pictures/100002010000020000000200F43894A2E5981DCE.png" xlink:type="simple" xlink:show="embed" xlink:actuate="onLoad">
          <text:p/>
        </draw:image>
      </draw:frame>
      <draw:frame draw:name="Google Shape;134;p20" presentation:style-name="TITLE_5f_AND_5f_BODY_5f_2_5f_1-title" draw:layer="backgroundobjects" svg:width="21.908cm" svg:height="1.59cm" svg:x="3.356cm" svg:y="0.178cm" presentation:class="title" presentation:placeholder="true" presentation:user-transformed="true">
        <draw:text-box/>
      </draw:frame>
      <draw:frame draw:name="Google Shape;135;p20" presentation:style-name="TITLE_5f_AND_5f_BODY_5f_2_5f_1-outline1" draw:layer="backgroundobjects" svg:width="21.032cm" svg:height="9.489cm" svg:x="3.602cm" svg:y="2.707cm" presentation:class="outline" presentation:placeholder="true" presentation:user-transformed="true">
        <draw:text-box/>
      </draw:frame>
      <presentation:notes style:page-layout-name="PM2">
        <draw:page-thumbnail presentation:style-name="TITLE_5f_AND_5f_BODY_5f_2_5f_1-title" draw:layer="backgroundobjects" svg:width="16.931cm" svg:height="9.524cm" svg:x="1.059cm" svg:y="1.93cm" presentation:class="page"/>
        <draw:frame presentation:style-name="TITLE_5f_AND_5f_BODY_5f_2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2_5f_1_5f_1" style:display-name="TITLE_AND_BODY_2_1_1" style:page-layout-name="PM1" draw:style-name="Mdp1">
      <draw:custom-shape draw:name="Google Shape;201;p31" draw:style-name="Mgr5" draw:text-style-name="MP8" draw:layer="backgroundobjects" svg:width="25.421cm" svg:height="2.178cm" svg:x="-0.001cm" svg:y="-0.002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2;p31" draw:style-name="Mgr3" draw:text-style-name="MP5" draw:layer="backgroundobjects" svg:width="2.955cm" svg:height="2.955cm" svg:x="0.304cm" svg:y="0.405cm">
        <draw:image xlink:href="Pictures/100002010000020000000200C380900152203F0B.png" xlink:type="simple" xlink:show="embed" xlink:actuate="onLoad">
          <text:p/>
        </draw:image>
      </draw:frame>
      <draw:frame draw:name="Google Shape;203;p31" presentation:style-name="TITLE_5f_AND_5f_BODY_5f_2_5f_1_5f_1-title" draw:layer="backgroundobjects" svg:width="21.908cm" svg:height="1.59cm" svg:x="3.356cm" svg:y="0.178cm" presentation:class="title" presentation:placeholder="true" presentation:user-transformed="true">
        <draw:text-box/>
      </draw:frame>
      <draw:frame draw:name="Google Shape;204;p31" presentation:style-name="TITLE_5f_AND_5f_BODY_5f_2_5f_1_5f_1-outline1" draw:layer="backgroundobjects" svg:width="21.327cm" svg:height="9.489cm" svg:x="3.26cm" svg:y="2.72cm" presentation:class="outline" presentation:placeholder="true" presentation:user-transformed="true">
        <draw:text-box/>
      </draw:frame>
      <presentation:notes style:page-layout-name="PM2">
        <draw:page-thumbnail presentation:style-name="TITLE_5f_AND_5f_BODY_5f_2_5f_1_5f_1-title" draw:layer="backgroundobjects" svg:width="16.931cm" svg:height="9.524cm" svg:x="1.059cm" svg:y="1.93cm" presentation:class="page"/>
        <draw:frame presentation:style-name="TITLE_5f_AND_5f_BODY_5f_2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9"/>
    <meta:generator>LibreOfficeDev/6.0.5.2$Linux_X86_64 LibreOffice_project/</meta:generator>
  </office:meta>
</office:document-meta>
</file>