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C380900152203F0B.png" manifest:media-type="image/png"/>
  <manifest:file-entry manifest:full-path="Pictures/10000000000001F4000001D4D35B40FDEEF88F5C.png" manifest:media-type="image/png"/>
  <manifest:file-entry manifest:full-path="Pictures/100002010000020000000200F43894A2E5981DCE.png" manifest:media-type="image/png"/>
  <manifest:file-entry manifest:full-path="Pictures/100002010000020000000200E34C0A2E787C9B97.png" manifest:media-type="image/png"/>
  <manifest:file-entry manifest:full-path="Pictures/10000201000001900000012CE2A20F5209AEEEE6.png" manifest:media-type="image/png"/>
  <manifest:file-entry manifest:full-path="Pictures/1000020100000438000004385DCD94D9D292316F.png" manifest:media-type="image/png"/>
  <manifest:file-entry manifest:full-path="Pictures/1000020100000084000000841A7D57659B0061C4.png" manifest:media-type="image/png"/>
  <manifest:file-entry manifest:full-path="Pictures/10000201000000B4000000B46027ED32C11D68DD.png" manifest:media-type="image/png"/>
  <manifest:file-entry manifest:full-path="Pictures/10000201000001F4000001E4CF0195E221BD501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/>
    <style:font-face style:name="Courier Prime" svg:font-family="'Courier Prime'"/>
    <style:font-face style:name="JetBrains Mono" svg:font-family="'JetBrai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CTION_5f_HEADER_5f_1_5f_2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SECTION_5f_HEADER_5f_1_5f_2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_5f_2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_5f_2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_5f_2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_5f_2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_5f_2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_5f_2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_5f_2_5f_1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_5f_2_5f_1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_5f_2_5f_1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_5f_2_5f_4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_5f_2_5f_4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_5f_2_5f_4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_5f_2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_5f_2_5f_1_5f_5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_5f_2_5f_1_5f_5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_5f_2_5f_1_5f_5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_5f_2_5f_1_5f_1_5f_2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_5f_2_5f_1_5f_1_5f_2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_5f_2_5f_1_5f_1_5f_2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_5f_2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" fo:font-size="36pt" fo:letter-spacing="normal" fo:font-style="normal" style:text-underline-style="none" fo:font-weight="bold" style:font-name-asian="Century Gothic" style:font-size-asian="36pt" style:font-style-asian="normal" style:font-weight-asian="bold" style:font-name-complex="Century Gothic" style:font-size-complex="36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name-asian="Century Gothic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Gothic" fo:font-size="22pt" fo:letter-spacing="normal" fo:font-style="normal" style:text-underline-style="none" fo:font-weight="normal" style:font-name-asian="Century Gothic" style:font-size-asian="22pt" style:font-style-asian="normal" style:font-weight-asian="normal" style:font-name-complex="Century Gothic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font-style="normal" style:text-underline-style="none" fo:font-weight="normal" style:font-name-asian="Century Gothic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entury Gothic" fo:font-size="26.5pt" fo:letter-spacing="normal" fo:font-style="normal" style:text-underline-style="none" fo:font-weight="normal" style:font-name-asian="Century Gothic" style:font-size-asian="26.5pt" style:font-style-asian="normal" style:font-weight-asian="normal" style:font-name-complex="Century Gothic" style:font-size-complex="26.5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style:font-name="Courier Prime" fo:font-size="11pt" fo:letter-spacing="normal" fo:font-style="italic" style:text-underline-style="none" fo:font-weight="normal" style:font-name-asian="Courier Prime" style:font-size-asian="11pt" style:font-style-asian="italic" style:font-weight-asian="normal" style:font-name-complex="Courier Prime" style:font-size-complex="11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ourier Prime" fo:font-size="11pt" fo:letter-spacing="normal" fo:font-style="italic" style:text-underline-style="none" fo:font-weight="bold" style:font-name-asian="Courier Prime" style:font-size-asian="11pt" style:font-style-asian="italic" style:font-weight-asian="bold" style:font-name-complex="Courier Prime" style:font-size-complex="11pt" style:font-style-complex="italic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Courier Prime" fo:font-size="11pt" fo:letter-spacing="normal" fo:font-style="normal" style:text-underline-style="none" fo:font-weight="normal" style:font-name-asian="Courier Prime" style:font-size-asian="11pt" style:font-style-asian="normal" style:font-weight-asian="normal" style:font-name-complex="Courier Prime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name-asian="Century Gothic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bold" style:font-name-asian="Century Gothic" style:font-size-asian="16pt" style:font-style-asian="italic" style:font-weight-asian="bold" style:font-name-complex="Century Gothic" style:font-size-complex="16pt" style:font-style-complex="italic" style:font-weight-complex="bold"/>
    </style:style>
    <style:style style:name="T15" style:family="text">
      <style:text-properties fo:font-variant="normal" fo:text-transform="none" fo:color="#0097a7" style:text-line-through-style="none" style:text-line-through-type="none" style:text-position="0% 100%" style:font-name="Century Gothic" fo:font-size="16pt" fo:letter-spacing="normal" fo:font-style="normal" style:text-underline-style="solid" style:text-underline-width="auto" style:text-underline-color="font-color" fo:font-weight="normal" style:font-name-asian="Century Gothic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bold" style:font-name-asian="Century Gothic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Prime" fo:font-size="16pt" fo:letter-spacing="normal" fo:font-style="normal" style:text-underline-style="none" fo:font-weight="normal" style:font-name-asian="Courier Prime" style:font-size-asian="16pt" style:font-style-asian="normal" style:font-weight-asian="normal" style:font-name-complex="Courier Prime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Prime" fo:font-size="11pt" fo:letter-spacing="normal" fo:font-style="normal" style:text-underline-style="none" fo:font-weight="bold" style:font-name-asian="Courier Prime" style:font-size-asian="11pt" style:font-style-asian="normal" style:font-weight-asian="bold" style:font-name-complex="Courier Prime" style:font-size-complex="11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Prime" fo:font-size="11pt" fo:letter-spacing="normal" fo:font-style="italic" style:text-underline-style="none" fo:font-weight="normal" style:font-name-asian="Courier Prime" style:font-size-asian="11pt" style:font-style-asian="italic" style:font-weight-asian="normal" style:font-name-complex="Courier Prime" style:font-size-complex="11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Prime" fo:font-size="11pt" fo:letter-spacing="normal" fo:font-style="normal" style:text-underline-style="none" fo:font-weight="normal" style:font-name-asian="Courier Prime" style:font-size-asian="11pt" style:font-style-asian="normal" style:font-weight-asian="normal" style:font-name-complex="Courier Prime" style:font-size-complex="11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7" style:family="text">
      <style:text-properties fo:font-variant="normal" fo:text-transform="none" fo:color="#228b22" style:text-line-through-style="none" style:text-line-through-type="none" style:text-position="0% 100%" style:font-name="Courier Prime" fo:font-size="16pt" fo:letter-spacing="normal" fo:font-style="normal" style:text-underline-style="none" fo:font-weight="normal" style:font-name-asian="Courier Prime" style:font-size-asian="16pt" style:font-style-asian="normal" style:font-weight-asian="normal" style:font-name-complex="Courier Prime" style:font-size-complex="16pt" style:font-style-complex="normal" style:font-weight-complex="normal"/>
    </style:style>
    <style:style style:name="T28" style:family="text">
      <style:text-properties fo:font-variant="normal" fo:text-transform="none" fo:color="#000080" style:text-line-through-style="none" style:text-line-through-type="none" style:text-position="0% 100%" style:font-name="Courier Prime" fo:font-size="16pt" fo:letter-spacing="normal" fo:font-style="normal" style:text-underline-style="none" fo:font-weight="normal" style:font-name-asian="Courier Prime" style:font-size-asian="16pt" style:font-style-asian="normal" style:font-weight-asian="normal" style:font-name-complex="Courier Prime" style:font-size-complex="16pt" style:font-style-complex="normal" style:font-weight-complex="normal"/>
    </style:style>
    <style:style style:name="T29" style:family="text">
      <style:text-properties fo:font-variant="normal" fo:text-transform="none" fo:color="#228b22" style:text-line-through-style="none" style:text-line-through-type="none" style:text-position="0% 100%" style:font-name="Courier Prime" fo:font-size="11pt" fo:letter-spacing="normal" fo:font-style="normal" style:text-underline-style="none" fo:font-weight="normal" style:font-name-asian="Courier Prime" style:font-size-asian="11pt" style:font-style-asian="normal" style:font-weight-asian="normal" style:font-name-complex="Courier Prime" style:font-size-complex="11pt" style:font-style-complex="normal" style:font-weight-complex="normal"/>
    </style:style>
    <style:style style:name="T30" style:family="text">
      <style:text-properties fo:font-variant="normal" fo:text-transform="none" fo:color="#000080" style:text-line-through-style="none" style:text-line-through-type="none" style:text-position="0% 100%" style:font-name="Courier Prime" fo:font-size="11pt" fo:letter-spacing="normal" fo:font-style="normal" style:text-underline-style="none" fo:font-weight="normal" style:font-name-asian="Courier Prime" style:font-size-asian="11pt" style:font-style-asian="normal" style:font-weight-asian="normal" style:font-name-complex="Courier Prime" style:font-size-complex="11pt" style:font-style-complex="normal" style:font-weight-complex="normal"/>
    </style:style>
    <style:style style:name="T31" style:family="text">
      <style:text-properties fo:font-variant="normal" fo:text-transform="none" fo:color="#000080" style:text-line-through-style="none" style:text-line-through-type="none" style:text-position="0% 100%" style:font-name="Courier Prime" fo:font-size="11pt" fo:letter-spacing="normal" fo:font-style="normal" style:text-underline-style="none" fo:font-weight="bold" style:font-name-asian="Courier Prime" style:font-size-asian="11pt" style:font-style-asian="normal" style:font-weight-asian="bold" style:font-name-complex="Courier Prime" style:font-size-complex="11pt" style:font-style-complex="normal" style:font-weight-complex="bold"/>
    </style:style>
    <style:style style:name="T32" style:family="text">
      <style:text-properties fo:font-variant="normal" fo:text-transform="none" fo:color="#000080" style:text-line-through-style="none" style:text-line-through-type="none" style:text-position="0% 100%" style:font-name="Courier Prime" fo:font-size="11pt" fo:letter-spacing="normal" fo:font-style="italic" style:text-underline-style="none" fo:font-weight="normal" style:font-name-asian="Courier Prime" style:font-size-asian="11pt" style:font-style-asian="italic" style:font-weight-asian="normal" style:font-name-complex="Courier Prime" style:font-size-complex="11pt" style:font-style-complex="italic" style:font-weight-complex="normal"/>
    </style:style>
    <style:style style:name="T33" style:family="text">
      <style:text-properties fo:font-variant="normal" fo:text-transform="none" fo:color="#000080" style:text-line-through-style="none" style:text-line-through-type="none" style:text-position="0% 100%" style:font-name="Courier Prime" fo:font-size="11pt" fo:letter-spacing="normal" fo:font-style="italic" style:text-underline-style="none" fo:font-weight="bold" style:font-name-asian="Courier Prime" style:font-size-asian="11pt" style:font-style-asian="italic" style:font-weight-asian="bold" style:font-name-complex="Courier Prime" style:font-size-complex="11pt" style:font-style-complex="italic" style:font-weight-complex="bold"/>
    </style:style>
    <style:style style:name="T34" style:family="text">
      <style:text-properties fo:font-variant="normal" fo:text-transform="none" fo:color="#000080" style:text-line-through-style="none" style:text-line-through-type="none" style:text-position="0% 100%" style:font-name="JetBrains Mono" fo:font-size="11pt" fo:letter-spacing="normal" fo:font-style="italic" style:text-underline-style="none" fo:font-weight="normal" style:font-name-asian="JetBrains Mono" style:font-size-asian="11pt" style:font-style-asian="italic" style:font-weight-asian="normal" style:font-name-complex="JetBrains Mono" style:font-size-complex="11pt" style:font-style-complex="italic" style:font-weight-complex="normal"/>
    </style:style>
    <style:style style:name="T35" style:family="text">
      <style:text-properties fo:font-variant="normal" fo:text-transform="none" fo:color="#000080" style:text-line-through-style="none" style:text-line-through-type="none" style:text-position="0% 100%" style:font-name="JetBrains Mono" fo:font-size="11pt" fo:letter-spacing="normal" fo:font-style="normal" style:text-underline-style="none" fo:font-weight="bold" style:font-name-asian="JetBrains Mono" style:font-size-asian="11pt" style:font-style-asian="normal" style:font-weight-asian="bold" style:font-name-complex="JetBrains Mono" style:font-size-complex="11pt" style:font-style-complex="normal" style:font-weight-complex="bold"/>
    </style:style>
    <style:style style:name="T36" style:family="text">
      <style:text-properties fo:font-variant="normal" fo:text-transform="none" fo:color="#228b22" style:text-line-through-style="none" style:text-line-through-type="none" style:text-position="0% 100%" style:font-name="Courier Prime" fo:font-size="11pt" fo:letter-spacing="normal" fo:font-style="normal" style:text-underline-style="none" fo:font-weight="bold" style:font-name-asian="Courier Prime" style:font-size-asian="11pt" style:font-style-asian="normal" style:font-weight-asian="bold" style:font-name-complex="Courier Prime" style:font-size-complex="11pt" style:font-style-complex="normal" style:font-weight-complex="bold"/>
    </style:style>
    <style:style style:name="T37" style:family="text">
      <style:text-properties fo:font-variant="normal" fo:text-transform="none" fo:color="#228b22" style:text-line-through-style="none" style:text-line-through-type="none" style:text-position="0% 100%" style:font-name="Courier Prime" fo:font-size="11pt" fo:letter-spacing="normal" fo:font-style="italic" style:text-underline-style="none" fo:font-weight="normal" style:font-name-asian="Courier Prime" style:font-size-asian="11pt" style:font-style-asian="italic" style:font-weight-asian="normal" style:font-name-complex="Courier Prime" style:font-size-complex="11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style:font-name="Century Gothic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Century Gothic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Century Gothic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style:font-name="Century Gothic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-Driven Algorithms" draw:style-name="dp1" draw:master-page-name="SECTION_5f_HEADER_5f_1_5f_2_5f_1">
        <draw:frame draw:name="Google Shape;302;p53" presentation:style-name="pr1" draw:text-style-name="P2" draw:layer="layout" svg:width="23.667cm" svg:height="2.003cm" svg:x="0.866cm" svg:y="0.428cm" presentation:class="title" presentation:user-transformed="true">
          <draw:text-box>
            <text:p text:style-name="P1"><text:span text:style-name="T1">Data-Driven Algorithms</text:span></text:p>
          </draw:text-box>
        </draw:frame>
        <presentation:notes draw:style-name="dp2">
          <draw:page-thumbnail draw:name="Google Shape;299;g3f41e9d4784_0_0:notes" draw:style-name="gr1" draw:layer="layout" svg:width="16.932cm" svg:height="9.524cm" svg:x="1.059cm" svg:y="1.905cm" draw:page-number="1" presentation:class="page"/>
          <draw:frame draw:name="Google Shape;300;g3f41e9d4784_0_0:notes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This is the </text:span><text:span text:style-name="T3">pyret</text:span><text:span text:style-name="T2"> version of this lesson. Make sure you are using the right software tool (WeScheme, Pyret, CODAP, etc...)</text:span></text:p>
              <text:p text:style-name="P3"><text:span text:style-name="T2">To learn more about how to use PearDeck, and how to view the embedded links on these slides without going into present mode visit https://help.peardeck.com/en</text:span></text:p>
              <text:p text:style-name="P3"><text:span text:style-name="T2"/></text:p>
            </draw:text-box>
          </draw:frame>
        </presentation:notes>
      </draw:page>
      <draw:page draw:name="Spell-checking: The Algorithm" draw:style-name="dp1" draw:master-page-name="TITLE_5f_AND_5f_BODY_5f_2">
        <draw:frame draw:name="Google Shape;307;p54" presentation:style-name="pr3" draw:text-style-name="P8" draw:layer="layout" svg:width="20.699cm" svg:height="9.489cm" svg:x="3.578cm" svg:y="2.786cm" presentation:class="outline" presentation:user-transformed="true">
          <draw:text-box>
            <text:p text:style-name="P5"><text:span text:style-name="T4">Consider this sentence with your partner:</text:span></text:p>
            <text:p text:style-name="P6"><text:span text:style-name="T5">Teh cat meowed so loudky it woke thm upp.</text:span></text:p>
            <text:list text:style-name="L4">
              <text:list-item>
                <text:p text:style-name="P6"><text:span text:style-name="T4">What do you think the author intended to write?</text:span></text:p>
              </text:list-item>
              <text:list-item>
                <text:p text:style-name="P5"><text:span text:style-name="T4">Be prepared to describe how you did your spell checking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How do you locate misspelled words?</text:span></text:p>
                  </text:list-item>
                  <text:list-item>
                    <text:p text:style-name="P5"><text:span text:style-name="T4">How do you correct misspelled words?</text:span></text:p>
                  </text:list-item>
                  <text:list-item>
                    <text:p text:style-name="P5"><text:span text:style-name="T4">How would you describe each of the spelling mistakes that the author made?</text:span></text:p>
                  </text:list-item>
                </text:list>
              </text:list-item>
            </text:list>
            <text:p text:style-name="P7"><text:span text:style-name="T6"/></text:p>
          </draw:text-box>
        </draw:frame>
        <draw:frame draw:name="Google Shape;308;p54" presentation:style-name="pr4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Spell-checking: The Algorithm</text:span></text:p>
          </draw:text-box>
        </draw:frame>
        <presentation:notes draw:style-name="dp2">
          <draw:page-thumbnail draw:name="Google Shape;304;g3f41e9d4784_0_4:notes" draw:style-name="gr1" draw:layer="layout" svg:width="16.932cm" svg:height="9.524cm" svg:x="1.059cm" svg:y="1.905cm" draw:page-number="2" presentation:class="page"/>
          <draw:frame draw:name="Google Shape;305;g3f41e9d4784_0_4:notes" presentation:style-name="pr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ll-checking: The Algorithm" draw:style-name="dp1" draw:master-page-name="TITLE_5f_AND_5f_BODY_5f_2">
        <draw:frame draw:name="Google Shape;313;p55" presentation:style-name="pr3" draw:text-style-name="P8" draw:layer="layout" svg:width="20.699cm" svg:height="9.489cm" svg:x="3.578cm" svg:y="2.786cm" presentation:class="outline" presentation:user-transformed="true">
          <draw:text-box>
            <text:list text:style-name="L4">
              <text:list-item>
                <text:p text:style-name="P12"><text:span text:style-name="T4">How did you find the misspelled words?</text:span></text:p>
              </text:list-item>
              <text:list-item>
                <text:p text:style-name="P12"><text:span text:style-name="T4">When you found a misspelled word, how did you figure out how to correct it?</text:span></text:p>
              </text:list-item>
              <text:list-item>
                <text:p text:style-name="P12"><text:span text:style-name="T4">The author made four different kinds of mistakes when writing this sentence. What were they?</text:span></text:p>
              </text:list-item>
            </text:list>
            <text:p text:style-name="P7"><text:span text:style-name="T6"/></text:p>
          </draw:text-box>
        </draw:frame>
        <draw:frame draw:name="Google Shape;314;p55" presentation:style-name="pr4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Spell-checking: The Algorithm</text:span></text:p>
          </draw:text-box>
        </draw:frame>
        <presentation:notes draw:style-name="dp2">
          <draw:page-thumbnail draw:name="Google Shape;310;g3f41e9d4784_0_9:notes" draw:style-name="gr1" draw:layer="layout" svg:width="16.932cm" svg:height="9.524cm" svg:x="1.059cm" svg:y="1.905cm" draw:page-number="3" presentation:class="page"/>
          <draw:frame draw:name="Google Shape;311;g3f41e9d4784_0_9:notes" presentation:style-name="pr6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3"><text:span text:style-name="T3">How did you find the misspelled words?</text:span></text:p>
                </text:list-item>
                <text:list-item>
                  <text:p text:style-name="P13"><text:span text:style-name="T8">Answers will vary, but most people would say "I just knew it when I saw it". This is important to call out!</text:span></text:p>
                </text:list-item>
                <text:list-item>
                  <text:p text:style-name="P13"><text:span text:style-name="T3">When you found a misspelled word, how did you figure out how to correct it?</text:span></text:p>
                </text:list-item>
                <text:list-item>
                  <text:p text:style-name="P13"><text:span text:style-name="T8">Possible responses might include things like:</text:span></text:p>
                </text:list-item>
              </text:list>
              <text:list text:style-name="L10">
                <text:list-item>
                  <text:list>
                    <text:list-item>
                      <text:p text:style-name="P13"><text:span text:style-name="T2">There was only one word it could be!</text:span></text:p>
                    </text:list-item>
                    <text:list-item>
                      <text:p text:style-name="P13"><text:span text:style-name="T2">I could tell from the rest of the sentence.</text:span></text:p>
                    </text:list-item>
                    <text:list-item>
                      <text:p text:style-name="P13"><text:span text:style-name="T2">I've made this same typing mistake a million times.</text:span></text:p>
                    </text:list-item>
                  </text:list>
                </text:list-item>
                <text:list-item>
                  <text:p text:style-name="P13"><text:span text:style-name="T3">The author made four different kinds of mistakes when writing this sentence. What were they?</text:span></text:p>
                </text:list-item>
                <text:list-item>
                  <text:p text:style-name="P13"><text:span text:style-name="T9">Teh</text:span><text:span text:style-name="T8">   Reversed the letters </text:span><text:span text:style-name="T10">h and e</text:span></text:p>
                </text:list-item>
                <text:list-item>
                  <text:p text:style-name="P13"><text:span text:style-name="T11">loudky</text:span><text:span text:style-name="T10">   Typed k instead of l</text:span></text:p>
                </text:list-item>
                <text:list-item>
                  <text:p text:style-name="P13"><text:span text:style-name="T11">thm</text:span><text:span text:style-name="T10">   Left out the letter e</text:span></text:p>
                </text:list-item>
                <text:list-item>
                  <text:p text:style-name="P13"><text:span text:style-name="T11">upp</text:span><text:span text:style-name="T10">   Added an extra p at the end</text:span></text:p>
                </text:list-item>
              </text:list>
              <text:p text:style-name="P3"><text:span text:style-name="T12"/></text:p>
            </draw:text-box>
          </draw:frame>
        </presentation:notes>
      </draw:page>
      <draw:page draw:name="Spell-checking: The Algorithm" draw:style-name="dp1" draw:master-page-name="TITLE_5f_AND_5f_BODY_5f_2">
        <draw:frame draw:name="Google Shape;319;p56" presentation:style-name="pr3" draw:text-style-name="P8" draw:layer="layout" svg:width="20.699cm" svg:height="9.489cm" svg:x="3.578cm" svg:y="2.786cm" presentation:class="outline" presentation:user-transformed="true">
          <draw:text-box>
            <text:p text:style-name="P5"><text:span text:style-name="T4">When humans spell check, they rely on </text:span><text:span text:style-name="T13">context clues, experience, and background</text:span><text:span text:style-name="T4">. The process of spell-checking varies not just by person, but by situation. If a complex, technical word had been misspelled, for example, you might have relied on a different spell checking strategy.</text:span></text:p>
            <text:p text:style-name="P7"><text:span text:style-name="T6"/></text:p>
          </draw:text-box>
        </draw:frame>
        <draw:frame draw:name="Google Shape;320;p56" presentation:style-name="pr4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Spell-checking: The Algorithm</text:span></text:p>
          </draw:text-box>
        </draw:frame>
        <presentation:notes draw:style-name="dp2">
          <draw:page-thumbnail draw:name="Google Shape;316;g3f41e9d4784_0_14:notes" draw:style-name="gr1" draw:layer="layout" svg:width="16.932cm" svg:height="9.524cm" svg:x="1.059cm" svg:y="1.905cm" draw:page-number="4" presentation:class="page"/>
          <draw:frame draw:name="Google Shape;317;g3f41e9d4784_0_14:notes" presentation:style-name="pr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ll-checking: The Algorithm" draw:style-name="dp1" draw:master-page-name="TITLE_5f_AND_5f_BODY_5f_2_5f_1">
        <draw:frame draw:name="Google Shape;325;p57" presentation:style-name="pr8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Spell-checking: The Algorithm</text:span></text:p>
          </draw:text-box>
        </draw:frame>
        <draw:frame draw:name="Google Shape;326;p57" presentation:style-name="pr9" draw:text-style-name="P8" draw:layer="layout" svg:width="21.032cm" svg:height="9.489cm" svg:x="3.602cm" svg:y="2.707cm" presentation:class="outline" presentation:user-transformed="true">
          <draw:text-box>
            <text:p text:style-name="P5"><text:span text:style-name="T4">The spell checker built into your web browser is a classic example of a </text:span><text:span text:style-name="T14">data-driven algorithm</text:span><text:span text:style-name="T4"> at work. To get a better sense of how machines work differently from us, we are going to follow the algorithm from the original SPELL program.</text:span></text:p>
            <text:list text:style-name="L4">
              <text:list-item>
                <text:p text:style-name="P6"><text:span text:style-name="T4">To complete </text:span><text:span text:style-name="T15"><text:a xlink:href="https://bootstrapworld.org/materials/fall2026/en-us/lessons/data-driven-algorithms/pages/first-spell-checker.html" xlink:type="simple">The First Spell Checker</text:a></text:span><text:span text:style-name="T4">, </text:span><text:span text:style-name="T13">you</text:span><text:span text:style-name="T4"> will be the computer, following an early spell checker's algorithm.</text:span></text:p>
              </text:list-item>
              <text:list-item>
                <text:p text:style-name="P5"><text:span text:style-name="T4">Reflect on the activity and how it compares to your own strategies.</text:span></text:p>
              </text:list-item>
            </text:list>
            <text:p text:style-name="P7"><text:span text:style-name="T6"/></text:p>
          </draw:text-box>
        </draw:frame>
        <presentation:notes draw:style-name="dp2">
          <draw:page-thumbnail draw:name="Google Shape;322;g3f41e9d4784_0_19:notes" draw:style-name="gr1" draw:layer="layout" svg:width="16.932cm" svg:height="9.524cm" svg:x="1.059cm" svg:y="1.905cm" draw:page-number="5" presentation:class="page"/>
          <draw:frame draw:name="Google Shape;323;g3f41e9d4784_0_19:notes" presentation:style-name="pr10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After students have completed the activity, invite them to share their responses to the three reflection questions (below) in small groups.</text:span></text:p>
              <text:p text:style-name="P3"><text:span text:style-name="T2"/></text:p>
            </draw:text-box>
          </draw:frame>
        </presentation:notes>
      </draw:page>
      <draw:page draw:name="Spell-checking: The Algorithm" draw:style-name="dp1" draw:master-page-name="TITLE_5f_AND_5f_BODY_5f_2_5f_1">
        <draw:frame draw:name="Google Shape;331;p58" presentation:style-name="pr8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Spell-checking: The Algorithm</text:span></text:p>
          </draw:text-box>
        </draw:frame>
        <draw:frame draw:name="Google Shape;332;p58" presentation:style-name="pr9" draw:text-style-name="P8" draw:layer="layout" svg:width="21.032cm" svg:height="9.489cm" svg:x="3.602cm" svg:y="2.707cm" presentation:class="outline" presentation:user-transformed="true">
          <draw:text-box>
            <text:list text:style-name="L4">
              <text:list-item>
                <text:p text:style-name="P12"><text:span text:style-name="T4">What do you think are some limitations of the first spell checker's algorithm?</text:span></text:p>
              </text:list-item>
              <text:list-item>
                <text:p text:style-name="P12"><text:span text:style-name="T4">How is the first spell checker's algorithm similar to whatever strategy </text:span><text:span text:style-name="T16">you</text:span><text:span text:style-name="T4"> use when spell checking your writing?</text:span></text:p>
              </text:list-item>
              <text:list-item>
                <text:p text:style-name="P12"><text:span text:style-name="T4">How is the first spell checker's algorithm different from whatever strategy </text:span><text:span text:style-name="T16">you</text:span><text:span text:style-name="T4"> use when spell checking your writing?</text:span></text:p>
              </text:list-item>
            </text:list>
            <text:p text:style-name="P7"><text:span text:style-name="T6"/></text:p>
          </draw:text-box>
        </draw:frame>
        <presentation:notes draw:style-name="dp2">
          <draw:page-thumbnail draw:name="Google Shape;328;g3f41e9d4784_0_24:notes" draw:style-name="gr1" draw:layer="layout" svg:width="16.932cm" svg:height="9.524cm" svg:x="1.059cm" svg:y="1.905cm" draw:page-number="6" presentation:class="page"/>
          <draw:frame draw:name="Google Shape;329;g3f41e9d4784_0_24:notes" presentation:style-name="pr10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3"><text:span text:style-name="T3">What do you think are some limitations of the first spell checker's algorithm?</text:span></text:p>
                </text:list-item>
                <text:list-item>
                  <text:p text:style-name="P13"><text:span text:style-name="T8">There is an extremely limited number of ways in which a word can be misspelled. For example, if two separate letters in a word are incorrect, the spell checker has no chance of proposing the correct word!</text:span></text:p>
                </text:list-item>
                <text:list-item>
                  <text:p text:style-name="P13"><text:span text:style-name="T3">How is the first spell checker's algorithm similar to whatever strategy you use when spell checking your writing?</text:span></text:p>
                </text:list-item>
                <text:list-item>
                  <text:p text:style-name="P13"><text:span text:style-name="T8">See what your students propose, and discuss. If they come up with any similarities, we'd love to hear what they are!</text:span></text:p>
                </text:list-item>
                <text:list-item>
                  <text:p text:style-name="P13"><text:span text:style-name="T3">How is the first spell checker's algorithm different from whatever strategy you use when spell checking your writing?</text:span></text:p>
                </text:list-item>
                <text:list-item>
                  <text:p text:style-name="P13"><text:span text:style-name="T8">When you check spelling, you rely a lot on context, instinct, and previously acquired knowledge.</text:span></text:p>
                </text:list-item>
                <text:list-item>
                  <text:p text:style-name="P13"><text:span text:style-name="T8">The first spell checking program did not have, or use, any of these strengths.</text:span></text:p>
                </text:list-item>
                <text:list-item>
                  <text:p text:style-name="P13"><text:span text:style-name="T8">In contrast, however, a human would not have the time, ability, or concentration to systematically list out thousands of potential words, whereas the computer has no difficulty doing so.</text:span></text:p>
                </text:list-item>
                <text:list-item>
                  <text:p text:style-name="P13"><text:span text:style-name="T8">Therefore, the strategies used by the human and computer may be extremely different for a similar task.</text:span></text:p>
                </text:list-item>
              </text:list>
              <text:p text:style-name="P3"><text:span text:style-name="T2"/></text:p>
            </draw:text-box>
          </draw:frame>
        </presentation:notes>
      </draw:page>
      <draw:page draw:name="Spell-checking: The Algorithm" draw:style-name="dp1" draw:master-page-name="TITLE_5f_AND_5f_BODY_5f_2_5f_1_5f_1">
        <draw:frame draw:name="Google Shape;337;p59" presentation:style-name="pr11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Spell-checking: The Algorithm</text:span></text:p>
          </draw:text-box>
        </draw:frame>
        <draw:frame draw:name="Google Shape;338;p59" presentation:style-name="pr12" draw:text-style-name="P8" draw:layer="layout" svg:width="21.327cm" svg:height="9.489cm" svg:x="3.26cm" svg:y="2.72cm" presentation:class="outline" presentation:user-transformed="true">
          <draw:text-box>
            <text:list text:style-name="L4">
              <text:list-item>
                <text:p text:style-name="P12"><text:span text:style-name="T4">In what ways do spell checkers succeed at mimicking humans?</text:span></text:p>
              </text:list-item>
              <text:list-item>
                <text:p text:style-name="P12"><text:span text:style-name="T4">Would it be a good idea for a human to try mimic a spell checker's algorithm? Why or why not?</text:span></text:p>
              </text:list-item>
            </text:list>
            <text:p text:style-name="P7"><text:span text:style-name="T6"/></text:p>
          </draw:text-box>
        </draw:frame>
        <presentation:notes draw:style-name="dp2">
          <draw:page-thumbnail draw:name="Google Shape;334;g3f41e9d4784_0_29:notes" draw:style-name="gr1" draw:layer="layout" svg:width="16.932cm" svg:height="9.524cm" svg:x="1.059cm" svg:y="1.905cm" draw:page-number="7" presentation:class="page"/>
          <draw:frame draw:name="Google Shape;335;g3f41e9d4784_0_29:notes" presentation:style-name="pr13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3"><text:span text:style-name="T3">In what ways do spell checkers succeed at mimicking humans?</text:span></text:p>
                </text:list-item>
                <text:list-item>
                  <text:p text:style-name="P13"><text:span text:style-name="T8">They don't! But the outcomes might be similar, depending on a wide variety of factors.</text:span></text:p>
                </text:list-item>
                <text:list-item>
                  <text:p text:style-name="P13"><text:span text:style-name="T3">Would it be a good idea for a human to try mimic a spell checker's algorithm? Why or why not?</text:span></text:p>
                </text:list-item>
                <text:list-item>
                  <text:p text:style-name="P13"><text:span text:style-name="T8">No. it would be time-consuming, laborious, and highly error prone for a human.</text:span></text:p>
                </text:list-item>
                <text:list-item>
                  <text:p text:style-name="P13"><text:span text:style-name="T8">The program we just discussed relies on computational brute force: primitive spell checking programs will repeatedly edit / transform a misspelled word, generating dozens of different words to verify in the dictionary.</text:span></text:p>
                </text:list-item>
              </text:list>
              <text:p text:style-name="P3"><text:span text:style-name="T2"/></text:p>
            </draw:text-box>
          </draw:frame>
        </presentation:notes>
      </draw:page>
      <draw:page draw:name="Spell Checking in Pyret" draw:style-name="dp1" draw:master-page-name="TITLE_5f_AND_5f_BODY_5f_2_5f_4_5f_1">
        <draw:frame draw:name="Google Shape;343;p60" presentation:style-name="pr14" draw:text-style-name="P8" draw:layer="layout" svg:width="21.132cm" svg:height="9.489cm" svg:x="3.519cm" svg:y="2.786cm" presentation:class="outline" presentation:user-transformed="true">
          <draw:text-box>
            <text:list text:style-name="L4">
              <text:list-item>
                <text:p text:style-name="P12"><text:span text:style-name="T4">Let's take a look at a spell checking program written in Pyret.</text:span></text:p>
              </text:list-item>
              <text:list-item>
                <text:p text:style-name="P12"><text:span text:style-name="T4">Open the </text:span><text:span text:style-name="T15"><text:a xlink:href="https://pyret.bootstrapworld.org/editor#shareurl=https://raw.githubusercontent.com/bootstrapworld/starter-files/fall2026/ai/Spell%20Checker%20Starter%20File.arr" xlink:type="simple">Spell Checker Starter File</text:a></text:span><text:span text:style-name="T4">, save a copy, and click "Run".</text:span></text:p>
              </text:list-item>
              <text:list-item>
                <text:p text:style-name="P12"><text:span text:style-name="T4">In Pyret, a </text:span><text:span text:style-name="T13">comment</text:span><text:span text:style-name="T4"> is any line of code that starts with a </text:span><text:span text:style-name="T17">#</text:span><text:span text:style-name="T4">. Pyret ignores comments completely, so programmers use them to write notes! </text:span><text:span text:style-name="T16">Read the comments in the Definitions Area</text:span><text:span text:style-name="T4">. What do these notes tell you?</text:span></text:p>
              </text:list-item>
              <text:list-item>
                <text:p text:style-name="P12"><text:span text:style-name="T4">Complete the first section of </text:span><text:span text:style-name="T15"><text:a xlink:href="https://bootstrapworld.org/materials/fall2026/en-us/lessons/data-driven-algorithms/pages/pyret-spell-checker.html" xlink:type="simple">A Pyret Spell Checker</text:a></text:span><text:span text:style-name="T4">.</text:span></text:p>
              </text:list-item>
            </text:list>
            <text:p text:style-name="P7"><text:span text:style-name="T6"/></text:p>
          </draw:text-box>
        </draw:frame>
        <draw:frame draw:name="Google Shape;344;p60" presentation:style-name="pr15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Spell Checking in Pyret</text:span></text:p>
          </draw:text-box>
        </draw:frame>
        <presentation:notes draw:style-name="dp2">
          <draw:page-thumbnail draw:name="Google Shape;340;g3f41e9d4784_0_34:notes" draw:style-name="gr1" draw:layer="layout" svg:width="16.932cm" svg:height="9.524cm" svg:x="1.059cm" svg:y="1.905cm" draw:page-number="8" presentation:class="page"/>
          <draw:frame draw:name="Google Shape;341;g3f41e9d4784_0_34:notes" presentation:style-name="pr16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Heads up: The functions used in this Pyret starter file only work in this particular starter file.</text:span></text:p>
              <text:p text:style-name="P3"><text:span text:style-name="T2"/></text:p>
            </draw:text-box>
          </draw:frame>
        </presentation:notes>
      </draw:page>
      <draw:page draw:name="Spell Checking in Pyret" draw:style-name="dp1" draw:master-page-name="TITLE_5f_AND_5f_BODY_5f_2_5f_1">
        <draw:frame draw:name="Google Shape;349;p61" presentation:style-name="pr8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Spell Checking in Pyret</text:span></text:p>
          </draw:text-box>
        </draw:frame>
        <draw:frame draw:name="Google Shape;350;p61" presentation:style-name="pr9" draw:text-style-name="P8" draw:layer="layout" svg:width="21.032cm" svg:height="9.489cm" svg:x="3.602cm" svg:y="2.707cm" presentation:class="outline" presentation:user-transformed="true">
          <draw:text-box>
            <text:list text:style-name="L4">
              <text:list-item>
                <text:p text:style-name="P12"><text:span text:style-name="T4">How did the spell checker's work compare to your efforts to be a computer on </text:span><text:span text:style-name="T15"><text:a xlink:href="https://bootstrapworld.org/materials/fall2026/en-us/lessons/data-driven-algorithms/pages/first-spell-checker.html" xlink:type="simple">The First Spell Checker</text:a></text:span><text:span text:style-name="T4">?</text:span></text:p>
              </text:list-item>
              <text:list-item>
                <text:p text:style-name="P12"><text:span text:style-name="T4">Were all of Pyret's suggestions useful?</text:span></text:p>
              </text:list-item>
            </text:list>
            <text:p text:style-name="P7"><text:span text:style-name="T6"/></text:p>
          </draw:text-box>
        </draw:frame>
        <presentation:notes draw:style-name="dp2">
          <draw:page-thumbnail draw:name="Google Shape;346;g3f41e9d4784_0_39:notes" draw:style-name="gr1" draw:layer="layout" svg:width="16.932cm" svg:height="9.524cm" svg:x="1.059cm" svg:y="1.905cm" draw:page-number="9" presentation:class="page"/>
          <draw:frame draw:name="Google Shape;347;g3f41e9d4784_0_39:notes" presentation:style-name="pr10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3"><text:span text:style-name="T3">How did the spell checker's work compare to your efforts to be a computer on </text:span><text:span text:style-name="T18"><text:a xlink:href="https://bootstrapworld.org/materials/fall2026/en-us/lessons/data-driven-algorithms/pages/first-spell-checker.html" xlink:type="simple">The First Spell Checker</text:a></text:span><text:span text:style-name="T19">?</text:span></text:p>
                </text:list-item>
                <text:list-item>
                  <text:p text:style-name="P13"><text:span text:style-name="T20">It found everything we did and more than a hundred other insertions and substitutions in mere seconds!</text:span></text:p>
                </text:list-item>
                <text:list-item>
                  <text:p text:style-name="P13"><text:span text:style-name="T19">Were all of Pyret's suggestions useful?</text:span></text:p>
                </text:list-item>
                <text:list-item>
                  <text:p text:style-name="P13"><text:span text:style-name="T20">No! Most of the words it proposed were nonsense.</text:span></text:p>
                </text:list-item>
              </text:list>
              <text:p text:style-name="P3"><text:span text:style-name="T21"/></text:p>
            </draw:text-box>
          </draw:frame>
        </presentation:notes>
      </draw:page>
      <draw:page draw:name="Spell Checking in Pyret" draw:style-name="dp1" draw:master-page-name="TITLE_5f_AND_5f_BODY_5f_2_5f_1">
        <draw:frame draw:name="Google Shape;355;p62" presentation:style-name="pr8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Spell Checking in Pyret</text:span></text:p>
          </draw:text-box>
        </draw:frame>
        <draw:frame draw:name="Google Shape;356;p62" presentation:style-name="pr9" draw:text-style-name="P8" draw:layer="layout" svg:width="21.032cm" svg:height="9.489cm" svg:x="3.602cm" svg:y="2.707cm" presentation:class="outline" presentation:user-transformed="true">
          <draw:text-box>
            <text:p text:style-name="P5"><text:span text:style-name="T4">All of the "words" our spell checker generated in the first section involved a single change. A more technical term with the same meaning is </text:span><text:span text:style-name="T14">edit distance</text:span><text:span text:style-name="T4"> - the edit distance for all of those words was 1, meaning they were a single swap, insertion, substitution or deletion away from the original. </text:span><text:span text:style-name="T14">Edit distance</text:span><text:span text:style-name="T4"> is one way that we can measure the similarity of two strings!</text:span></text:p>
            <text:p text:style-name="P7"><text:span text:style-name="T6"/></text:p>
          </draw:text-box>
        </draw:frame>
        <presentation:notes draw:style-name="dp2">
          <draw:page-thumbnail draw:name="Google Shape;352;g3f41e9d4784_0_44:notes" draw:style-name="gr1" draw:layer="layout" svg:width="16.932cm" svg:height="9.524cm" svg:x="1.059cm" svg:y="1.905cm" draw:page-number="10" presentation:class="page"/>
          <draw:frame draw:name="Google Shape;353;g3f41e9d4784_0_44:notes" presentation:style-name="pr1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ll Checking in Pyret" draw:style-name="dp1" draw:master-page-name="TITLE_5f_AND_5f_BODY_5f_2_5f_1_5f_5">
        <draw:frame draw:name="Google Shape;361;p63" presentation:style-name="pr18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Spell Checking in Pyret</text:span></text:p>
          </draw:text-box>
        </draw:frame>
        <draw:frame draw:name="Google Shape;362;p63" presentation:style-name="pr19" draw:text-style-name="P8" draw:layer="layout" svg:width="20.948cm" svg:height="9.489cm" svg:x="3.531cm" svg:y="2.786cm" presentation:class="outline" presentation:user-transformed="true">
          <draw:text-box>
            <text:list text:style-name="L4">
              <text:list-item>
                <text:p text:style-name="P12"><text:span text:style-name="T4">Let's take a look at how Pyret generates lists of words with a bigger edit distance and refines its suggestions to remove nonsensical words.</text:span></text:p>
              </text:list-item>
              <text:list-item>
                <text:p text:style-name="P12"><text:span text:style-name="T4">Complete the rest of </text:span><text:span text:style-name="T15"><text:a xlink:href="https://bootstrapworld.org/materials/fall2026/en-us/lessons/data-driven-algorithms/pages/pyret-spell-checker.html" xlink:type="simple">A Pyret Spell Checker</text:a></text:span><text:span text:style-name="T4">.</text:span></text:p>
              </text:list-item>
            </text:list>
            <text:p text:style-name="P7"><text:span text:style-name="T6"/></text:p>
          </draw:text-box>
        </draw:frame>
        <presentation:notes draw:style-name="dp2">
          <draw:page-thumbnail draw:name="Google Shape;358;g3f41e9d4784_0_49:notes" draw:style-name="gr1" draw:layer="layout" svg:width="16.932cm" svg:height="9.524cm" svg:x="1.059cm" svg:y="1.905cm" draw:page-number="11" presentation:class="page"/>
          <draw:frame draw:name="Google Shape;359;g3f41e9d4784_0_49:notes" presentation:style-name="pr2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ll Checking in Pyret" draw:style-name="dp1" draw:master-page-name="TITLE_5f_AND_5f_BODY_5f_2_5f_1">
        <draw:frame draw:name="Google Shape;367;p64" presentation:style-name="pr8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Spell Checking in Pyret</text:span></text:p>
          </draw:text-box>
        </draw:frame>
        <draw:frame draw:name="Google Shape;368;p64" presentation:style-name="pr9" draw:text-style-name="P8" draw:layer="layout" svg:width="21.032cm" svg:height="9.489cm" svg:x="3.602cm" svg:y="2.707cm" presentation:class="outline" presentation:user-transformed="true">
          <draw:text-box>
            <text:list text:style-name="L4">
              <text:list-item>
                <text:p text:style-name="P12"><text:span text:style-name="T4">What did you discover about the dictionaries in </text:span><text:span text:style-name="T15"><text:a xlink:href="https://pyret.bootstrapworld.org/editor#shareurl=https://raw.githubusercontent.com/bootstrapworld/starter-files/fall2026/ai/Spell%20Checker%20Starter%20File.arr" xlink:type="simple">Spell Checker Starter File</text:a></text:span><text:span text:style-name="T4">?</text:span></text:p>
              </text:list-item>
              <text:list-item>
                <text:p text:style-name="P12"><text:span text:style-name="T4">Why did </text:span><text:span text:style-name="T17">alt-words</text:span><text:span text:style-name="T4"> return a different number of results, depending on which dictionary it was given?</text:span></text:p>
              </text:list-item>
            </text:list>
            <text:p text:style-name="P6"><text:span text:style-name="T4">When we fed </text:span><text:span text:style-name="T13">more representative data</text:span><text:span text:style-name="T4"> to our spell checker, we got better results </text:span><text:span text:style-name="T13">without changing the spell checker's code</text:span><text:span text:style-name="T4">.</text:span></text:p>
            <text:p text:style-name="P6"><text:span text:style-name="T4">📌 </text:span><text:span text:style-name="T4">The effectiveness of </text:span><text:span text:style-name="T14">data-driven algorithms</text:span><text:span text:style-name="T4"> is directly tied to how </text:span><text:span text:style-name="T13">representative</text:span><text:span text:style-name="T4"> the data is.</text:span></text:p>
            <text:p text:style-name="P6"><text:span text:style-name="T4">The same algorithm that almost seems "intelligent" when given 10,000 of the most commonly used words in English could appear </text:span><text:span text:style-name="T13">useless</text:span><text:span text:style-name="T4"> with a dataset of only 100 words, or the names of 10,000 chemicals.</text:span></text:p>
            <text:p text:style-name="P7"><text:span text:style-name="T6"/></text:p>
          </draw:text-box>
        </draw:frame>
        <presentation:notes draw:style-name="dp2">
          <draw:page-thumbnail draw:name="Google Shape;364;g3f41e9d4784_0_54:notes" draw:style-name="gr1" draw:layer="layout" svg:width="16.932cm" svg:height="9.524cm" svg:x="1.059cm" svg:y="1.905cm" draw:page-number="12" presentation:class="page"/>
          <draw:frame draw:name="Google Shape;365;g3f41e9d4784_0_54:notes" presentation:style-name="pr10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3"><text:span text:style-name="T3">What did you discover about the dictionaries in </text:span><text:span text:style-name="T18"><text:a xlink:href="https://pyret.bootstrapworld.org/editor#shareurl=https://raw.githubusercontent.com/bootstrapworld/starter-files/fall2026/ai/Spell%20Checker%20Starter%20File.arr" xlink:type="simple">Spell Checker Starter File</text:a></text:span><text:span text:style-name="T19">?</text:span></text:p>
                </text:list-item>
                <text:list-item>
                  <text:p text:style-name="P13"><text:span text:style-name="T19">Why did </text:span><text:span text:style-name="T22">alt-words return a different number of results, depending on which dictionary it was given?</text:span></text:p>
                </text:list-item>
                <text:list-item>
                  <text:p text:style-name="P13"><text:span text:style-name="T23">Because smaller dictionaries didn't know as many words, so only-real was removing words even though they could be found in larger dictionaries.</text:span></text:p>
                </text:list-item>
              </text:list>
              <text:p text:style-name="P3"><text:span text:style-name="T24"/></text:p>
            </draw:text-box>
          </draw:frame>
        </presentation:notes>
      </draw:page>
      <draw:page draw:name="Spell Checking in Pyret" draw:style-name="dp1" draw:master-page-name="TITLE_5f_AND_5f_BODY_5f_2_5f_1_5f_1_5f_2">
        <draw:frame draw:name="Google Shape;373;p65" presentation:style-name="pr21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Spell Checking in Pyret</text:span></text:p>
          </draw:text-box>
        </draw:frame>
        <draw:frame draw:name="Google Shape;374;p65" presentation:style-name="pr22" draw:text-style-name="P8" draw:layer="layout" svg:width="15.185cm" svg:height="9.489cm" svg:x="1.389cm" svg:y="3.689cm" presentation:class="outline" presentation:user-transformed="true">
          <draw:text-box>
            <text:p text:style-name="P5"><text:span text:style-name="T4">Look at the screenshot (right) of a text messaging app's suggestions for the possibly misspelled word "Cose". The app suggests the original word ("Cose"), indicating that no error was made, along with two alternatives: "Code" and "Close".</text:span></text:p>
            <text:list text:style-name="L4">
              <text:list-item>
                <text:p text:style-name="P6"><text:span text:style-name="T4">What sort of </text:span><text:span text:style-name="T13">algorithm</text:span><text:span text:style-name="T4"> do you think the app used in developing possible alternative words?</text:span></text:p>
              </text:list-item>
              <text:list-item>
                <text:p text:style-name="P5"><text:span text:style-name="T4">What sort of </text:span><text:span text:style-name="T13">data</text:span><text:span text:style-name="T4"> do you think the spell checking app used in developing possible alternative words?</text:span></text:p>
              </text:list-item>
            </text:list>
            <text:p text:style-name="P7"><text:span text:style-name="T6"/></text:p>
          </draw:text-box>
        </draw:frame>
        <draw:frame draw:name="Google Shape;375;p65" draw:style-name="gr2" draw:text-style-name="P14" draw:layer="layout" svg:width="7.552cm" svg:height="7.068cm" svg:x="16.855cm" svg:y="4.466cm">
          <draw:image xlink:href="Pictures/10000000000001F4000001D4D35B40FDEEF88F5C.png" xlink:type="simple" xlink:show="embed" xlink:actuate="onLoad">
            <text:p/>
          </draw:image>
        </draw:frame>
        <presentation:notes draw:style-name="dp2">
          <draw:page-thumbnail draw:name="Google Shape;370;g3f41e9d4784_0_59:notes" draw:style-name="gr1" draw:layer="layout" svg:width="16.932cm" svg:height="9.524cm" svg:x="1.059cm" svg:y="1.905cm" draw:page-number="13" presentation:class="page"/>
          <draw:frame draw:name="Google Shape;371;g3f41e9d4784_0_59:notes" presentation:style-name="pr2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Look at the screenshot (right) of a text messaging app's suggestions for the possibly misspelled word "Cose". The app suggests the original word ("Cose"), indicating that no error was made, along with two alternatives: "Code" and "Close".</text:span></text:p>
              <text:p text:style-name="P3"><text:span text:style-name="T25"><text:a xlink:href="https://bootstrapworld.org/materials/fall2026/en-us/lessons/data-driven-algorithms/images/AUTOGEN-IMAGE1.png" xlink:type="simple">[click here for image]</text:a></text:span></text:p>
              <text:list text:style-name="L9">
                <text:list-item>
                  <text:p text:style-name="P3"><text:span text:style-name="T19">What sort of </text:span><text:span text:style-name="T26">algorithm</text:span><text:span text:style-name="T19"> do you think the app used in developing possible alternative words?</text:span></text:p>
                </text:list-item>
                <text:list-item>
                  <text:p text:style-name="P3"><text:span text:style-name="T20">Responses will vary.</text:span></text:p>
                </text:list-item>
                <text:list-item>
                  <text:p text:style-name="P3"><text:span text:style-name="T20">Students may refer to the algorithms discussed in the first half of the lesson.</text:span></text:p>
                </text:list-item>
                <text:list-item>
                  <text:p text:style-name="P3"><text:span text:style-name="T20">Students might also imagine more complicated algorithms - for instance, algorithms that consider the proximity of letters on the keyboard!</text:span></text:p>
                </text:list-item>
                <text:list-item>
                  <text:p text:style-name="P3"><text:span text:style-name="T19">What sort of </text:span><text:span text:style-name="T26">data</text:span><text:span text:style-name="T19"> do you think the spell checking app used in developing possible alternative words?</text:span></text:p>
                </text:list-item>
                <text:list-item>
                  <text:p text:style-name="P3"><text:span text:style-name="T20">Responses will vary.</text:span></text:p>
                </text:list-item>
                <text:list-item>
                  <text:p text:style-name="P3"><text:span text:style-name="T20">Which words the user is most likely to type</text:span></text:p>
                </text:list-item>
                <text:list-item>
                  <text:p text:style-name="P3"><text:span text:style-name="T20">The topic of the text conversation and the most probable next word</text:span></text:p>
                </text:list-item>
                <text:list-item>
                  <text:p text:style-name="P3"><text:span text:style-name="T20">The dictionary of words the app draws from</text:span></text:p>
                </text:list-item>
              </text:list>
              <text:p text:style-name="P3"><text:span text:style-name="T21">Students will discuss a similar screenshot of a text messaging app in our lesson on </text:span><text:span text:style-name="T25"><text:a xlink:href="https://bootstrapworld.org/materials/fall2026/en-us/lessons/stat-lang-models-generating-text/index.shtml" xlink:type="simple">Generative Models</text:a></text:span><text:span text:style-name="T21">. During that lesson, however, students explore how generative AI uses data-driven algorithms to determine what word to produce next.</text:span></text:p>
              <text:p text:style-name="P3"><text:span text:style-name="T21"/></text:p>
            </draw:text-box>
          </draw:frame>
        </presentation:notes>
      </draw:page>
      <draw:page draw:name="Defining Values" draw:style-name="dp1" draw:master-page-name="TITLE_5f_AND_5f_BODY_5f_2_5f_4_5f_1">
        <draw:frame draw:name="Google Shape;380;p66" presentation:style-name="pr14" draw:text-style-name="P8" draw:layer="layout" svg:width="21.132cm" svg:height="9.489cm" svg:x="3.519cm" svg:y="2.786cm" presentation:class="outline" presentation:user-transformed="true">
          <draw:text-box>
            <text:p text:style-name="P5"><text:span text:style-name="T4">Let's experiment with a bigger list of suggestions...</text:span></text:p>
            <text:list text:style-name="L4">
              <text:list-item>
                <text:p text:style-name="P6"><text:span text:style-name="T4">In the Interactions Window on the right, evaluate </text:span><text:span text:style-name="T17">alt-words(</text:span><text:span text:style-name="T27">"plation"</text:span><text:span text:style-name="T17">, WORDS-L, </text:span><text:span text:style-name="T28">4</text:span><text:span text:style-name="T17">)</text:span><text:span text:style-name="T4">.</text:span></text:p>
              </text:list-item>
              <text:list-item>
                <text:p text:style-name="P5"><text:span text:style-name="T4">How long did Pyret take to generate all the substitutions, deletions, insertions, and swaps, and then filter by only real words?</text:span></text:p>
              </text:list-item>
              <text:list-item>
                <text:p text:style-name="P5"><text:span text:style-name="T4">Would asking it to do the </text:span><text:span text:style-name="T13">same thing</text:span><text:span text:style-name="T4"> over again go faster? Why or why not?</text:span></text:p>
              </text:list-item>
              <text:list-item>
                <text:p text:style-name="P5"><text:span text:style-name="T4">Try it out! What happened? Can you explain why?</text:span></text:p>
              </text:list-item>
            </text:list>
            <text:p text:style-name="P7"><text:span text:style-name="T6"/></text:p>
          </draw:text-box>
        </draw:frame>
        <draw:frame draw:name="Google Shape;381;p66" presentation:style-name="pr15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Defining Values</text:span></text:p>
          </draw:text-box>
        </draw:frame>
        <presentation:notes draw:style-name="dp2">
          <draw:page-thumbnail draw:name="Google Shape;377;g3f41e9d4784_0_65:notes" draw:style-name="gr1" draw:layer="layout" svg:width="16.932cm" svg:height="9.524cm" svg:x="1.059cm" svg:y="1.905cm" draw:page-number="14" presentation:class="page"/>
          <draw:frame draw:name="Google Shape;378;g3f41e9d4784_0_65:notes" presentation:style-name="pr16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Let's experiment with a bigger list of suggestions...</text:span></text:p>
              <text:list text:style-name="L9">
                <text:list-item>
                  <text:p text:style-name="P3"><text:span text:style-name="T2">In the Interactions Window on the right, evaluate </text:span><text:span text:style-name="T12">alt-words(</text:span><text:span text:style-name="T29">"plation", WORDS-L, </text:span><text:span text:style-name="T30">4).</text:span></text:p>
                </text:list-item>
                <text:list-item>
                  <text:p text:style-name="P3"><text:span text:style-name="T31">How long did Pyret take to generate all the substitutions, deletions, insertions, and swaps, and then filter by only real words?</text:span></text:p>
                </text:list-item>
                <text:list-item>
                  <text:p text:style-name="P3"><text:span text:style-name="T32">A while!</text:span></text:p>
                </text:list-item>
                <text:list-item>
                  <text:p text:style-name="P3"><text:span text:style-name="T31">Would asking it to do the </text:span><text:span text:style-name="T33">same thing</text:span><text:span text:style-name="T31"> over again go faster? Why or why not?</text:span></text:p>
                </text:list-item>
                <text:list-item>
                  <text:p text:style-name="P3"><text:span text:style-name="T32">Responses may vary</text:span></text:p>
                </text:list-item>
                <text:list-item>
                  <text:p text:style-name="P3"><text:span text:style-name="T31">Try it out! What happened? Can you explain why?</text:span></text:p>
                </text:list-item>
                <text:list-item>
                  <text:p text:style-name="P3"><text:span text:style-name="T32">It still took forever, because we are asking it to redo the same work.</text:span></text:p>
                </text:list-item>
              </text:list>
              <text:p text:style-name="P3"><text:span text:style-name="T30"/></text:p>
            </draw:text-box>
          </draw:frame>
        </presentation:notes>
      </draw:page>
      <draw:page draw:name="Defining Values" draw:style-name="dp1" draw:master-page-name="TITLE_5f_AND_5f_BODY_5f_2_5f_1">
        <draw:frame draw:name="Google Shape;386;p67" presentation:style-name="pr8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Defining Values</text:span></text:p>
          </draw:text-box>
        </draw:frame>
        <draw:frame draw:name="Google Shape;387;p67" presentation:style-name="pr9" draw:text-style-name="P8" draw:layer="layout" svg:width="21.032cm" svg:height="9.489cm" svg:x="3.602cm" svg:y="2.707cm" presentation:class="outline" presentation:user-transformed="true">
          <draw:text-box>
            <text:p text:style-name="P5"><text:span text:style-name="T4">When we ask Pyret to do something over and over, it has no way of knowing that it should save its work! As a result, </text:span><text:span text:style-name="T13">it does the work over and over, too!</text:span><text:span text:style-name="T4"> Fortunately, the world of math has a solution: define a </text:span><text:span text:style-name="T14">variable</text:span><text:span text:style-name="T4">.</text:span></text:p>
            <text:p text:style-name="P6"><text:span text:style-name="T4">Evaluate </text:span><text:span text:style-name="T17">results = alt-words(</text:span><text:span text:style-name="T27">"plation"</text:span><text:span text:style-name="T17">, WORDS-L, </text:span><text:span text:style-name="T28">4</text:span><text:span text:style-name="T17">)</text:span><text:span text:style-name="T4">.</text:span></text:p>
            <text:list text:style-name="L4">
              <text:list-item>
                <text:p text:style-name="P6"><text:span text:style-name="T4">Did anything come back? Why or why not?</text:span></text:p>
              </text:list-item>
              <text:list-item>
                <text:p text:style-name="P5"><text:span text:style-name="T4">Now evaluate </text:span><text:span text:style-name="T17">results</text:span><text:span text:style-name="T4"> three times. What happens?</text:span></text:p>
              </text:list-item>
              <text:list-item>
                <text:p text:style-name="P5"><text:span text:style-name="T4">Click "Run", and evaluate </text:span><text:span text:style-name="T17">results</text:span><text:span text:style-name="T4">. What happens?</text:span></text:p>
              </text:list-item>
              <text:list-item>
                <text:p text:style-name="P5"><text:span text:style-name="T4">Evaluate </text:span><text:span text:style-name="T17">feeling = </text:span><text:span text:style-name="T27">"Joy"</text:span><text:span text:style-name="T4"> and hit Enter. What do you think will happen if we evaluate </text:span><text:span text:style-name="T17">feeling</text:span><text:span text:style-name="T4">?</text:span></text:p>
              </text:list-item>
            </text:list>
            <text:p text:style-name="P7"><text:span text:style-name="T6"/></text:p>
          </draw:text-box>
        </draw:frame>
        <presentation:notes draw:style-name="dp2">
          <draw:page-thumbnail draw:name="Google Shape;383;g3f41e9d4784_0_70:notes" draw:style-name="gr1" draw:layer="layout" svg:width="16.932cm" svg:height="9.524cm" svg:x="1.059cm" svg:y="1.905cm" draw:page-number="15" presentation:class="page"/>
          <draw:frame draw:name="Google Shape;384;g3f41e9d4784_0_70:notes" presentation:style-name="pr10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Evaluate </text:span><text:span text:style-name="T12">results = alt-words(</text:span><text:span text:style-name="T29">"plation", WORDS-L, </text:span><text:span text:style-name="T30">4).</text:span></text:p>
              <text:list text:style-name="L9">
                <text:list-item>
                  <text:p text:style-name="P3"><text:span text:style-name="T31">Did anything come back? Why or why not?</text:span></text:p>
                </text:list-item>
                <text:list-item>
                  <text:p text:style-name="P3"><text:span text:style-name="T32">No! Defining a variable doesn't produce anything, </text:span><text:span text:style-name="T33">just like in math!</text:span></text:p>
                </text:list-item>
                <text:list-item>
                  <text:p text:style-name="P3"><text:span text:style-name="T34">x <text:s/>= <text:s/>4 doesn't have an "answer", because definitions aren't expressions.</text:span></text:p>
                </text:list-item>
                <text:list-item>
                  <text:p text:style-name="P3"><text:span text:style-name="T35">Now evaluate </text:span><text:span text:style-name="T31">results three times. What happens?</text:span></text:p>
                </text:list-item>
                <text:list-item>
                  <text:p text:style-name="P3"><text:span text:style-name="T32">It was lightning fast!</text:span></text:p>
                </text:list-item>
                <text:list-item>
                  <text:p text:style-name="P3"><text:span text:style-name="T31">Click "Run", and evaluate results. What happens?</text:span></text:p>
                </text:list-item>
                <text:list-item>
                  <text:p text:style-name="P3"><text:span text:style-name="T32">We get an error message! Pyret "forgot" about our variable</text:span></text:p>
                </text:list-item>
                <text:list-item>
                  <text:p text:style-name="P3"><text:span text:style-name="T31">Evaluate feeling = </text:span><text:span text:style-name="T36">"Joy" and hit Enter. What do you think will happen if we evaluate feeling?</text:span></text:p>
                </text:list-item>
                <text:list-item>
                  <text:p text:style-name="P3"><text:span text:style-name="T37">We'll get back "Joy"</text:span></text:p>
                </text:list-item>
              </text:list>
              <text:p text:style-name="P3"><text:span text:style-name="T29"/></text:p>
            </draw:text-box>
          </draw:frame>
        </presentation:notes>
      </draw:page>
      <draw:page draw:name="Defining Values" draw:style-name="dp1" draw:master-page-name="TITLE_5f_AND_5f_BODY_5f_2_5f_1">
        <draw:frame draw:name="Google Shape;392;p68" presentation:style-name="pr8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Defining Values</text:span></text:p>
          </draw:text-box>
        </draw:frame>
        <draw:frame draw:name="Google Shape;393;p68" presentation:style-name="pr9" draw:text-style-name="P8" draw:layer="layout" svg:width="21.032cm" svg:height="9.489cm" svg:x="3.602cm" svg:y="2.707cm" presentation:class="outline" presentation:user-transformed="true">
          <draw:text-box>
            <text:p text:style-name="P5"><text:span text:style-name="T4">When we want Pyret to remember a definition, we add it to the </text:span><text:span text:style-name="T16">Definitions Area</text:span><text:span text:style-name="T4">. Every time we click "Run" Pyret re-runs all the code, including the definition!</text:span></text:p>
            <text:list text:style-name="L4">
              <text:list-item>
                <text:p text:style-name="P6"><text:span text:style-name="T4">Add </text:span><text:span text:style-name="T17">results = alt-words(</text:span><text:span text:style-name="T27">"plation"</text:span><text:span text:style-name="T17">, WORDS-L, </text:span><text:span text:style-name="T28">4</text:span><text:span text:style-name="T17">)</text:span><text:span text:style-name="T4"> as the </text:span><text:span text:style-name="T16">last line of the Definitions Area</text:span><text:span text:style-name="T4">, and click "Run". Evaluate </text:span><text:span text:style-name="T17">results</text:span><text:span text:style-name="T4"> in the Interactions Area.</text:span></text:p>
              </text:list-item>
              <text:list-item>
                <text:p text:style-name="P5"><text:span text:style-name="T4">Add a </text:span><text:span text:style-name="T13">second</text:span><text:span text:style-name="T4"> definition to the Interactions Area</text:span></text:p>
              </text:list-item>
              <text:list-item>
                <text:p text:style-name="P5"><text:span text:style-name="T4">What happens if you add another definition that </text:span><text:span text:style-name="T13">also</text:span><text:span text:style-name="T4"> has the name </text:span><text:span text:style-name="T17">results</text:span><text:span text:style-name="T4">?</text:span></text:p>
              </text:list-item>
            </text:list>
            <text:p text:style-name="P7"><text:span text:style-name="T6"/></text:p>
          </draw:text-box>
        </draw:frame>
        <presentation:notes draw:style-name="dp2">
          <draw:page-thumbnail draw:name="Google Shape;389;g3f41e9d4784_0_75:notes" draw:style-name="gr1" draw:layer="layout" svg:width="16.932cm" svg:height="9.524cm" svg:x="1.059cm" svg:y="1.905cm" draw:page-number="16" presentation:class="page"/>
          <draw:frame draw:name="Google Shape;390;g3f41e9d4784_0_75:notes" presentation:style-name="pr2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ing Values" draw:style-name="dp1" draw:master-page-name="TITLE_5f_AND_5f_BODY_5f_2_5f_1_5f_1">
        <draw:frame draw:name="Google Shape;398;p69" presentation:style-name="pr11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Defining Values</text:span></text:p>
          </draw:text-box>
        </draw:frame>
        <draw:frame draw:name="Google Shape;399;p69" presentation:style-name="pr12" draw:text-style-name="P8" draw:layer="layout" svg:width="21.327cm" svg:height="9.489cm" svg:x="3.26cm" svg:y="2.72cm" presentation:class="outline" presentation:user-transformed="true">
          <draw:text-box>
            <text:list text:style-name="L4">
              <text:list-item>
                <text:p text:style-name="P12"><text:span text:style-name="T4">Why are variable definitions valuable?</text:span></text:p>
              </text:list-item>
              <text:list-item>
                <text:p text:style-name="P12"><text:span text:style-name="T4">What kinds of values can we define, besides just tables of spelling corrections?</text:span></text:p>
              </text:list-item>
              <text:list-item>
                <text:p text:style-name="P12"><text:span text:style-name="T4">Why can't we define two variables with the same name?</text:span></text:p>
              </text:list-item>
            </text:list>
            <text:p text:style-name="P7"><text:span text:style-name="T6"/></text:p>
          </draw:text-box>
        </draw:frame>
        <presentation:notes draw:style-name="dp2">
          <draw:page-thumbnail draw:name="Google Shape;395;g3f41e9d4784_0_80:notes" draw:style-name="gr1" draw:layer="layout" svg:width="16.932cm" svg:height="9.524cm" svg:x="1.059cm" svg:y="1.905cm" draw:page-number="17" presentation:class="page"/>
          <draw:frame draw:name="Google Shape;396;g3f41e9d4784_0_80:notes" presentation:style-name="pr13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3"><text:span text:style-name="T3">Why are variable definitions valuable?</text:span></text:p>
                </text:list-item>
                <text:list-item>
                  <text:p text:style-name="P13"><text:span text:style-name="T8">We can save expensive work</text:span></text:p>
                </text:list-item>
                <text:list-item>
                  <text:p text:style-name="P13"><text:span text:style-name="T3">What kinds of values can we define, besides just tables of spelling corrections?</text:span></text:p>
                </text:list-item>
                <text:list-item>
                  <text:p text:style-name="P13"><text:span text:style-name="T8">Anything!</text:span></text:p>
                </text:list-item>
                <text:list-item>
                  <text:p text:style-name="P13"><text:span text:style-name="T3">Why can't we define two variables with the same name?</text:span></text:p>
                </text:list-item>
                <text:list-item>
                  <text:p text:style-name="P13"><text:span text:style-name="T8">Pyret only allows a variable name to have one value.</text:span></text:p>
                </text:list-item>
              </text:list>
              <text:p text:style-name="P3"><text:span text:style-name="T2"/></text:p>
            </draw:text-box>
          </draw:frame>
        </presentation:notes>
      </draw:page>
      <draw:page draw:name="Defining Values" draw:style-name="dp1" draw:master-page-name="TITLE_5f_AND_5f_BODY_5f_2_5f_1_5f_1">
        <draw:frame draw:name="Google Shape;404;p70" presentation:style-name="pr11" draw:text-style-name="P10" draw:layer="layout" svg:width="21.908cm" svg:height="1.59cm" svg:x="3.356cm" svg:y="0.178cm" presentation:class="title" presentation:user-transformed="true">
          <draw:text-box>
            <text:p text:style-name="P9"><text:span text:style-name="T7">Defining Values</text:span></text:p>
          </draw:text-box>
        </draw:frame>
        <draw:frame draw:name="Google Shape;405;p70" presentation:style-name="pr12" draw:text-style-name="P8" draw:layer="layout" svg:width="21.327cm" svg:height="9.489cm" svg:x="3.26cm" svg:y="2.72cm" presentation:class="outline" presentation:user-transformed="true">
          <draw:text-box>
            <text:p text:style-name="P5"><text:span text:style-name="T4">Now that we can generate and save spelling suggestions, what are some things we might want to </text:span><text:span text:style-name="T13">do</text:span><text:span text:style-name="T4"> with them?</text:span></text:p>
            <text:p text:style-name="P7"><text:span text:style-name="T6"/></text:p>
          </draw:text-box>
        </draw:frame>
        <presentation:notes draw:style-name="dp2">
          <draw:page-thumbnail draw:name="Google Shape;401;g3f41e9d4784_0_85:notes" draw:style-name="gr1" draw:layer="layout" svg:width="16.932cm" svg:height="9.524cm" svg:x="1.059cm" svg:y="1.905cm" draw:page-number="18" presentation:class="page"/>
          <draw:frame draw:name="Google Shape;402;g3f41e9d4784_0_85:notes" presentation:style-name="pr13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3"><text:span text:style-name="T3">Now that we can generate and save spelling suggestions, what are some things we might want to </text:span><text:span text:style-name="T9">do</text:span><text:span text:style-name="T3"> with them?</text:span></text:p>
                </text:list-item>
                <text:list-item>
                  <text:p text:style-name="P13"><text:span text:style-name="T8">We might want to sort the results, putting the suggestions with shorter edit distances first</text:span></text:p>
                </text:list-item>
                <text:list-item>
                  <text:p text:style-name="P13"><text:span text:style-name="T8">We might want to just show the "top 5", rather than a table with hundreds of entries</text:span></text:p>
                </text:list-item>
                <text:list-item>
                  <text:p text:style-name="P13"><text:span text:style-name="T8">Maybe we could make a chart or a graph?</text:span></text:p>
                </text:list-item>
              </text:list>
              <text:p text:style-name="P3"><text:span text:style-name="T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/>
    <style:font-face style:name="Courier Prime" svg:font-family="'Courier Prime'"/>
    <style:font-face style:name="JetBrains Mono" svg:font-family="'JetBrai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_5f_1_5f_2_5f_1-background" style:display-name="SECTION_HEADER_1_2_1-background" style:family="presentation">
      <style:graphic-properties draw:stroke="none" draw:fill="solid" draw:fill-color="#ffffff"/>
      <style:text-properties style:letter-kerning="true"/>
    </style:style>
    <style:style style:name="SECTION_5f_HEADER_5f_1_5f_2_5f_1-backgroundobjects" style:display-name="SECTION_HEADER_1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_5f_2_5f_1-notes" style:display-name="SECTION_HEADER_1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_5f_2_5f_1-outline1" style:display-name="SECTION_HEADER_1_2_1-outline1" style:family="presentation">
      <style:graphic-properties draw:stroke="none" draw:fill="none" draw:auto-grow-height="false" draw:fit-to-size="shrink-to-fit" style:shrink-to-fit="true">
        <text:list-style style:name="SECTION_5f_HEADER_5f_1_5f_2_5f_1-outline1" style:display-name="SECTION_HEADER_1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_5f_2_5f_1-outline2" style:display-name="SECTION_HEADER_1_2_1-outline2" style:family="presentation" style:parent-style-name="SECTION_5f_HEADER_5f_1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_5f_1-outline3" style:display-name="SECTION_HEADER_1_2_1-outline3" style:family="presentation" style:parent-style-name="SECTION_5f_HEADER_5f_1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_5f_1-outline4" style:display-name="SECTION_HEADER_1_2_1-outline4" style:family="presentation" style:parent-style-name="SECTION_5f_HEADER_5f_1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_5f_1-outline5" style:display-name="SECTION_HEADER_1_2_1-outline5" style:family="presentation" style:parent-style-name="SECTION_5f_HEADER_5f_1_5f_2_5f_1-outline4">
      <style:paragraph-properties fo:margin-top="0.1cm" fo:margin-bottom="0cm"/>
      <style:text-properties fo:font-size="20pt" style:font-size-asian="20pt" style:font-size-complex="20pt"/>
    </style:style>
    <style:style style:name="SECTION_5f_HEADER_5f_1_5f_2_5f_1-outline6" style:display-name="SECTION_HEADER_1_2_1-outline6" style:family="presentation" style:parent-style-name="SECTION_5f_HEADER_5f_1_5f_2_5f_1-outline5">
      <style:paragraph-properties fo:margin-top="0.1cm" fo:margin-bottom="0cm"/>
      <style:text-properties fo:font-size="20pt" style:font-size-asian="20pt" style:font-size-complex="20pt"/>
    </style:style>
    <style:style style:name="SECTION_5f_HEADER_5f_1_5f_2_5f_1-outline7" style:display-name="SECTION_HEADER_1_2_1-outline7" style:family="presentation" style:parent-style-name="SECTION_5f_HEADER_5f_1_5f_2_5f_1-outline6">
      <style:paragraph-properties fo:margin-top="0.1cm" fo:margin-bottom="0cm"/>
      <style:text-properties fo:font-size="20pt" style:font-size-asian="20pt" style:font-size-complex="20pt"/>
    </style:style>
    <style:style style:name="SECTION_5f_HEADER_5f_1_5f_2_5f_1-outline8" style:display-name="SECTION_HEADER_1_2_1-outline8" style:family="presentation" style:parent-style-name="SECTION_5f_HEADER_5f_1_5f_2_5f_1-outline7">
      <style:paragraph-properties fo:margin-top="0.1cm" fo:margin-bottom="0cm"/>
      <style:text-properties fo:font-size="20pt" style:font-size-asian="20pt" style:font-size-complex="20pt"/>
    </style:style>
    <style:style style:name="SECTION_5f_HEADER_5f_1_5f_2_5f_1-outline9" style:display-name="SECTION_HEADER_1_2_1-outline9" style:family="presentation" style:parent-style-name="SECTION_5f_HEADER_5f_1_5f_2_5f_1-outline8">
      <style:paragraph-properties fo:margin-top="0.1cm" fo:margin-bottom="0cm"/>
      <style:text-properties fo:font-size="20pt" style:font-size-asian="20pt" style:font-size-complex="20pt"/>
    </style:style>
    <style:style style:name="SECTION_5f_HEADER_5f_1_5f_2_5f_1-subtitle" style:display-name="SECTION_HEADER_1_2_1-subtitle" style:family="presentation">
      <style:graphic-properties draw:stroke="none" draw:fill="none" draw:textarea-vertical-align="middle">
        <text:list-style style:name="SECTION_5f_HEADER_5f_1_5f_2_5f_1-subtitle" style:display-name="SECTION_HEADER_1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_5f_2_5f_1-title" style:display-name="SECTION_HEADER_1_2_1-title" style:family="presentation">
      <style:graphic-properties draw:stroke="none" draw:fill="none" draw:textarea-vertical-align="middle">
        <text:list-style style:name="SECTION_5f_HEADER_5f_1_5f_2_5f_1-title" style:display-name="SECTION_HEADER_1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-background" style:display-name="TITLE_AND_BODY_2-background" style:family="presentation">
      <style:graphic-properties draw:stroke="none" draw:fill="solid" draw:fill-color="#ffffff"/>
      <style:text-properties style:letter-kerning="true"/>
    </style:style>
    <style:style style:name="TITLE_5f_AND_5f_BODY_5f_2-backgroundobjects" style:display-name="TITLE_AND_BODY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2-notes" style:display-name="TITLE_AND_BODY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2-outline1" style:display-name="TITLE_AND_BODY_2-outline1" style:family="presentation">
      <style:graphic-properties draw:stroke="none" draw:fill="none" draw:auto-grow-height="false" draw:fit-to-size="shrink-to-fit" style:shrink-to-fit="true">
        <text:list-style style:name="TITLE_5f_AND_5f_BODY_5f_2-outline1" style:display-name="TITLE_AND_BODY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-outline2" style:display-name="TITLE_AND_BODY_2-outline2" style:family="presentation" style:parent-style-name="TITLE_5f_AND_5f_BODY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-outline3" style:display-name="TITLE_AND_BODY_2-outline3" style:family="presentation" style:parent-style-name="TITLE_5f_AND_5f_BODY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-outline4" style:display-name="TITLE_AND_BODY_2-outline4" style:family="presentation" style:parent-style-name="TITLE_5f_AND_5f_BODY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-outline5" style:display-name="TITLE_AND_BODY_2-outline5" style:family="presentation" style:parent-style-name="TITLE_5f_AND_5f_BODY_5f_2-outline4">
      <style:paragraph-properties fo:margin-top="0.1cm" fo:margin-bottom="0cm"/>
      <style:text-properties fo:font-size="20pt" style:font-size-asian="20pt" style:font-size-complex="20pt"/>
    </style:style>
    <style:style style:name="TITLE_5f_AND_5f_BODY_5f_2-outline6" style:display-name="TITLE_AND_BODY_2-outline6" style:family="presentation" style:parent-style-name="TITLE_5f_AND_5f_BODY_5f_2-outline5">
      <style:paragraph-properties fo:margin-top="0.1cm" fo:margin-bottom="0cm"/>
      <style:text-properties fo:font-size="20pt" style:font-size-asian="20pt" style:font-size-complex="20pt"/>
    </style:style>
    <style:style style:name="TITLE_5f_AND_5f_BODY_5f_2-outline7" style:display-name="TITLE_AND_BODY_2-outline7" style:family="presentation" style:parent-style-name="TITLE_5f_AND_5f_BODY_5f_2-outline6">
      <style:paragraph-properties fo:margin-top="0.1cm" fo:margin-bottom="0cm"/>
      <style:text-properties fo:font-size="20pt" style:font-size-asian="20pt" style:font-size-complex="20pt"/>
    </style:style>
    <style:style style:name="TITLE_5f_AND_5f_BODY_5f_2-outline8" style:display-name="TITLE_AND_BODY_2-outline8" style:family="presentation" style:parent-style-name="TITLE_5f_AND_5f_BODY_5f_2-outline7">
      <style:paragraph-properties fo:margin-top="0.1cm" fo:margin-bottom="0cm"/>
      <style:text-properties fo:font-size="20pt" style:font-size-asian="20pt" style:font-size-complex="20pt"/>
    </style:style>
    <style:style style:name="TITLE_5f_AND_5f_BODY_5f_2-outline9" style:display-name="TITLE_AND_BODY_2-outline9" style:family="presentation" style:parent-style-name="TITLE_5f_AND_5f_BODY_5f_2-outline8">
      <style:paragraph-properties fo:margin-top="0.1cm" fo:margin-bottom="0cm"/>
      <style:text-properties fo:font-size="20pt" style:font-size-asian="20pt" style:font-size-complex="20pt"/>
    </style:style>
    <style:style style:name="TITLE_5f_AND_5f_BODY_5f_2-subtitle" style:display-name="TITLE_AND_BODY_2-subtitle" style:family="presentation">
      <style:graphic-properties draw:stroke="none" draw:fill="none" draw:textarea-vertical-align="middle">
        <text:list-style style:name="TITLE_5f_AND_5f_BODY_5f_2-subtitle" style:display-name="TITLE_AND_BODY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2-title" style:display-name="TITLE_AND_BODY_2-title" style:family="presentation">
      <style:graphic-properties draw:stroke="none" draw:fill="none" draw:textarea-vertical-align="middle">
        <text:list-style style:name="TITLE_5f_AND_5f_BODY_5f_2-title" style:display-name="TITLE_AND_BODY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1-background" style:display-name="TITLE_AND_BODY_2_1-background" style:family="presentation">
      <style:graphic-properties draw:stroke="none" draw:fill="solid" draw:fill-color="#ffffff"/>
      <style:text-properties style:letter-kerning="true"/>
    </style:style>
    <style:style style:name="TITLE_5f_AND_5f_BODY_5f_2_5f_1-backgroundobjects" style:display-name="TITLE_AND_BODY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2_5f_1-notes" style:display-name="TITLE_AND_BODY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2_5f_1-outline1" style:display-name="TITLE_AND_BODY_2_1-outline1" style:family="presentation">
      <style:graphic-properties draw:stroke="none" draw:fill="none" draw:auto-grow-height="false" draw:fit-to-size="shrink-to-fit" style:shrink-to-fit="true">
        <text:list-style style:name="TITLE_5f_AND_5f_BODY_5f_2_5f_1-outline1" style:display-name="TITLE_AND_BODY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1-outline2" style:display-name="TITLE_AND_BODY_2_1-outline2" style:family="presentation" style:parent-style-name="TITLE_5f_AND_5f_BODY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-outline3" style:display-name="TITLE_AND_BODY_2_1-outline3" style:family="presentation" style:parent-style-name="TITLE_5f_AND_5f_BODY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-outline4" style:display-name="TITLE_AND_BODY_2_1-outline4" style:family="presentation" style:parent-style-name="TITLE_5f_AND_5f_BODY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-outline5" style:display-name="TITLE_AND_BODY_2_1-outline5" style:family="presentation" style:parent-style-name="TITLE_5f_AND_5f_BODY_5f_2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2_5f_1-outline6" style:display-name="TITLE_AND_BODY_2_1-outline6" style:family="presentation" style:parent-style-name="TITLE_5f_AND_5f_BODY_5f_2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2_5f_1-outline7" style:display-name="TITLE_AND_BODY_2_1-outline7" style:family="presentation" style:parent-style-name="TITLE_5f_AND_5f_BODY_5f_2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2_5f_1-outline8" style:display-name="TITLE_AND_BODY_2_1-outline8" style:family="presentation" style:parent-style-name="TITLE_5f_AND_5f_BODY_5f_2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2_5f_1-outline9" style:display-name="TITLE_AND_BODY_2_1-outline9" style:family="presentation" style:parent-style-name="TITLE_5f_AND_5f_BODY_5f_2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2_5f_1-subtitle" style:display-name="TITLE_AND_BODY_2_1-subtitle" style:family="presentation">
      <style:graphic-properties draw:stroke="none" draw:fill="none" draw:textarea-vertical-align="middle">
        <text:list-style style:name="TITLE_5f_AND_5f_BODY_5f_2_5f_1-subtitle" style:display-name="TITLE_AND_BODY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2_5f_1-title" style:display-name="TITLE_AND_BODY_2_1-title" style:family="presentation">
      <style:graphic-properties draw:stroke="none" draw:fill="none" draw:textarea-vertical-align="middle">
        <text:list-style style:name="TITLE_5f_AND_5f_BODY_5f_2_5f_1-title" style:display-name="TITLE_AND_BODY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1-background" style:display-name="TITLE_AND_BODY_2_1_1-background" style:family="presentation">
      <style:graphic-properties draw:stroke="none" draw:fill="solid" draw:fill-color="#ffffff"/>
      <style:text-properties style:letter-kerning="true"/>
    </style:style>
    <style:style style:name="TITLE_5f_AND_5f_BODY_5f_2_5f_1_5f_1-backgroundobjects" style:display-name="TITLE_AND_BODY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2_5f_1_5f_1-notes" style:display-name="TITLE_AND_BODY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1-outline1" style:display-name="TITLE_AND_BODY_2_1_1-outline1" style:family="presentation">
      <style:graphic-properties draw:stroke="none" draw:fill="none" draw:auto-grow-height="false" draw:fit-to-size="shrink-to-fit" style:shrink-to-fit="true">
        <text:list-style style:name="TITLE_5f_AND_5f_BODY_5f_2_5f_1_5f_1-outline1" style:display-name="TITLE_AND_BODY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1-outline2" style:display-name="TITLE_AND_BODY_2_1_1-outline2" style:family="presentation" style:parent-style-name="TITLE_5f_AND_5f_BODY_5f_2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_5f_1-outline3" style:display-name="TITLE_AND_BODY_2_1_1-outline3" style:family="presentation" style:parent-style-name="TITLE_5f_AND_5f_BODY_5f_2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_5f_1-outline4" style:display-name="TITLE_AND_BODY_2_1_1-outline4" style:family="presentation" style:parent-style-name="TITLE_5f_AND_5f_BODY_5f_2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_5f_1-outline5" style:display-name="TITLE_AND_BODY_2_1_1-outline5" style:family="presentation" style:parent-style-name="TITLE_5f_AND_5f_BODY_5f_2_5f_1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2_5f_1_5f_1-outline6" style:display-name="TITLE_AND_BODY_2_1_1-outline6" style:family="presentation" style:parent-style-name="TITLE_5f_AND_5f_BODY_5f_2_5f_1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2_5f_1_5f_1-outline7" style:display-name="TITLE_AND_BODY_2_1_1-outline7" style:family="presentation" style:parent-style-name="TITLE_5f_AND_5f_BODY_5f_2_5f_1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2_5f_1_5f_1-outline8" style:display-name="TITLE_AND_BODY_2_1_1-outline8" style:family="presentation" style:parent-style-name="TITLE_5f_AND_5f_BODY_5f_2_5f_1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2_5f_1_5f_1-outline9" style:display-name="TITLE_AND_BODY_2_1_1-outline9" style:family="presentation" style:parent-style-name="TITLE_5f_AND_5f_BODY_5f_2_5f_1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2_5f_1_5f_1-subtitle" style:display-name="TITLE_AND_BODY_2_1_1-subtitle" style:family="presentation">
      <style:graphic-properties draw:stroke="none" draw:fill="none" draw:textarea-vertical-align="middle">
        <text:list-style style:name="TITLE_5f_AND_5f_BODY_5f_2_5f_1_5f_1-subtitle" style:display-name="TITLE_AND_BODY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1-title" style:display-name="TITLE_AND_BODY_2_1_1-title" style:family="presentation">
      <style:graphic-properties draw:stroke="none" draw:fill="none" draw:textarea-vertical-align="middle">
        <text:list-style style:name="TITLE_5f_AND_5f_BODY_5f_2_5f_1_5f_1-title" style:display-name="TITLE_AND_BODY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4_5f_1-background" style:display-name="TITLE_AND_BODY_2_4_1-background" style:family="presentation">
      <style:graphic-properties draw:stroke="none" draw:fill="solid" draw:fill-color="#ffffff"/>
      <style:text-properties style:letter-kerning="true"/>
    </style:style>
    <style:style style:name="TITLE_5f_AND_5f_BODY_5f_2_5f_4_5f_1-backgroundobjects" style:display-name="TITLE_AND_BODY_2_4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2_5f_4_5f_1-notes" style:display-name="TITLE_AND_BODY_2_4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2_5f_4_5f_1-outline1" style:display-name="TITLE_AND_BODY_2_4_1-outline1" style:family="presentation">
      <style:graphic-properties draw:stroke="none" draw:fill="none" draw:auto-grow-height="false" draw:fit-to-size="shrink-to-fit" style:shrink-to-fit="true">
        <text:list-style style:name="TITLE_5f_AND_5f_BODY_5f_2_5f_4_5f_1-outline1" style:display-name="TITLE_AND_BODY_2_4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4_5f_1-outline2" style:display-name="TITLE_AND_BODY_2_4_1-outline2" style:family="presentation" style:parent-style-name="TITLE_5f_AND_5f_BODY_5f_2_5f_4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4_5f_1-outline3" style:display-name="TITLE_AND_BODY_2_4_1-outline3" style:family="presentation" style:parent-style-name="TITLE_5f_AND_5f_BODY_5f_2_5f_4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4_5f_1-outline4" style:display-name="TITLE_AND_BODY_2_4_1-outline4" style:family="presentation" style:parent-style-name="TITLE_5f_AND_5f_BODY_5f_2_5f_4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4_5f_1-outline5" style:display-name="TITLE_AND_BODY_2_4_1-outline5" style:family="presentation" style:parent-style-name="TITLE_5f_AND_5f_BODY_5f_2_5f_4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2_5f_4_5f_1-outline6" style:display-name="TITLE_AND_BODY_2_4_1-outline6" style:family="presentation" style:parent-style-name="TITLE_5f_AND_5f_BODY_5f_2_5f_4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2_5f_4_5f_1-outline7" style:display-name="TITLE_AND_BODY_2_4_1-outline7" style:family="presentation" style:parent-style-name="TITLE_5f_AND_5f_BODY_5f_2_5f_4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2_5f_4_5f_1-outline8" style:display-name="TITLE_AND_BODY_2_4_1-outline8" style:family="presentation" style:parent-style-name="TITLE_5f_AND_5f_BODY_5f_2_5f_4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2_5f_4_5f_1-outline9" style:display-name="TITLE_AND_BODY_2_4_1-outline9" style:family="presentation" style:parent-style-name="TITLE_5f_AND_5f_BODY_5f_2_5f_4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2_5f_4_5f_1-subtitle" style:display-name="TITLE_AND_BODY_2_4_1-subtitle" style:family="presentation">
      <style:graphic-properties draw:stroke="none" draw:fill="none" draw:textarea-vertical-align="middle">
        <text:list-style style:name="TITLE_5f_AND_5f_BODY_5f_2_5f_4_5f_1-subtitle" style:display-name="TITLE_AND_BODY_2_4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2_5f_4_5f_1-title" style:display-name="TITLE_AND_BODY_2_4_1-title" style:family="presentation">
      <style:graphic-properties draw:stroke="none" draw:fill="none" draw:textarea-vertical-align="middle">
        <text:list-style style:name="TITLE_5f_AND_5f_BODY_5f_2_5f_4_5f_1-title" style:display-name="TITLE_AND_BODY_2_4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5-background" style:display-name="TITLE_AND_BODY_2_1_5-background" style:family="presentation">
      <style:graphic-properties draw:stroke="none" draw:fill="solid" draw:fill-color="#ffffff"/>
      <style:text-properties style:letter-kerning="true"/>
    </style:style>
    <style:style style:name="TITLE_5f_AND_5f_BODY_5f_2_5f_1_5f_5-backgroundobjects" style:display-name="TITLE_AND_BODY_2_1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2_5f_1_5f_5-notes" style:display-name="TITLE_AND_BODY_2_1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5-outline1" style:display-name="TITLE_AND_BODY_2_1_5-outline1" style:family="presentation">
      <style:graphic-properties draw:stroke="none" draw:fill="none" draw:auto-grow-height="false" draw:fit-to-size="shrink-to-fit" style:shrink-to-fit="true">
        <text:list-style style:name="TITLE_5f_AND_5f_BODY_5f_2_5f_1_5f_5-outline1" style:display-name="TITLE_AND_BODY_2_1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5-outline2" style:display-name="TITLE_AND_BODY_2_1_5-outline2" style:family="presentation" style:parent-style-name="TITLE_5f_AND_5f_BODY_5f_2_5f_1_5f_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_5f_5-outline3" style:display-name="TITLE_AND_BODY_2_1_5-outline3" style:family="presentation" style:parent-style-name="TITLE_5f_AND_5f_BODY_5f_2_5f_1_5f_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_5f_5-outline4" style:display-name="TITLE_AND_BODY_2_1_5-outline4" style:family="presentation" style:parent-style-name="TITLE_5f_AND_5f_BODY_5f_2_5f_1_5f_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_5f_5-outline5" style:display-name="TITLE_AND_BODY_2_1_5-outline5" style:family="presentation" style:parent-style-name="TITLE_5f_AND_5f_BODY_5f_2_5f_1_5f_5-outline4">
      <style:paragraph-properties fo:margin-top="0.1cm" fo:margin-bottom="0cm"/>
      <style:text-properties fo:font-size="20pt" style:font-size-asian="20pt" style:font-size-complex="20pt"/>
    </style:style>
    <style:style style:name="TITLE_5f_AND_5f_BODY_5f_2_5f_1_5f_5-outline6" style:display-name="TITLE_AND_BODY_2_1_5-outline6" style:family="presentation" style:parent-style-name="TITLE_5f_AND_5f_BODY_5f_2_5f_1_5f_5-outline5">
      <style:paragraph-properties fo:margin-top="0.1cm" fo:margin-bottom="0cm"/>
      <style:text-properties fo:font-size="20pt" style:font-size-asian="20pt" style:font-size-complex="20pt"/>
    </style:style>
    <style:style style:name="TITLE_5f_AND_5f_BODY_5f_2_5f_1_5f_5-outline7" style:display-name="TITLE_AND_BODY_2_1_5-outline7" style:family="presentation" style:parent-style-name="TITLE_5f_AND_5f_BODY_5f_2_5f_1_5f_5-outline6">
      <style:paragraph-properties fo:margin-top="0.1cm" fo:margin-bottom="0cm"/>
      <style:text-properties fo:font-size="20pt" style:font-size-asian="20pt" style:font-size-complex="20pt"/>
    </style:style>
    <style:style style:name="TITLE_5f_AND_5f_BODY_5f_2_5f_1_5f_5-outline8" style:display-name="TITLE_AND_BODY_2_1_5-outline8" style:family="presentation" style:parent-style-name="TITLE_5f_AND_5f_BODY_5f_2_5f_1_5f_5-outline7">
      <style:paragraph-properties fo:margin-top="0.1cm" fo:margin-bottom="0cm"/>
      <style:text-properties fo:font-size="20pt" style:font-size-asian="20pt" style:font-size-complex="20pt"/>
    </style:style>
    <style:style style:name="TITLE_5f_AND_5f_BODY_5f_2_5f_1_5f_5-outline9" style:display-name="TITLE_AND_BODY_2_1_5-outline9" style:family="presentation" style:parent-style-name="TITLE_5f_AND_5f_BODY_5f_2_5f_1_5f_5-outline8">
      <style:paragraph-properties fo:margin-top="0.1cm" fo:margin-bottom="0cm"/>
      <style:text-properties fo:font-size="20pt" style:font-size-asian="20pt" style:font-size-complex="20pt"/>
    </style:style>
    <style:style style:name="TITLE_5f_AND_5f_BODY_5f_2_5f_1_5f_5-subtitle" style:display-name="TITLE_AND_BODY_2_1_5-subtitle" style:family="presentation">
      <style:graphic-properties draw:stroke="none" draw:fill="none" draw:textarea-vertical-align="middle">
        <text:list-style style:name="TITLE_5f_AND_5f_BODY_5f_2_5f_1_5f_5-subtitle" style:display-name="TITLE_AND_BODY_2_1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5-title" style:display-name="TITLE_AND_BODY_2_1_5-title" style:family="presentation">
      <style:graphic-properties draw:stroke="none" draw:fill="none" draw:textarea-vertical-align="middle">
        <text:list-style style:name="TITLE_5f_AND_5f_BODY_5f_2_5f_1_5f_5-title" style:display-name="TITLE_AND_BODY_2_1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1_5f_2-background" style:display-name="TITLE_AND_BODY_2_1_1_2-background" style:family="presentation">
      <style:graphic-properties draw:stroke="none" draw:fill="solid" draw:fill-color="#ffffff"/>
      <style:text-properties style:letter-kerning="true"/>
    </style:style>
    <style:style style:name="TITLE_5f_AND_5f_BODY_5f_2_5f_1_5f_1_5f_2-backgroundobjects" style:display-name="TITLE_AND_BODY_2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2_5f_1_5f_1_5f_2-notes" style:display-name="TITLE_AND_BODY_2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1_5f_2-outline1" style:display-name="TITLE_AND_BODY_2_1_1_2-outline1" style:family="presentation">
      <style:graphic-properties draw:stroke="none" draw:fill="none" draw:auto-grow-height="false" draw:fit-to-size="shrink-to-fit" style:shrink-to-fit="true">
        <text:list-style style:name="TITLE_5f_AND_5f_BODY_5f_2_5f_1_5f_1_5f_2-outline1" style:display-name="TITLE_AND_BODY_2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1_5f_2-outline2" style:display-name="TITLE_AND_BODY_2_1_1_2-outline2" style:family="presentation" style:parent-style-name="TITLE_5f_AND_5f_BODY_5f_2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_5f_1_5f_2-outline3" style:display-name="TITLE_AND_BODY_2_1_1_2-outline3" style:family="presentation" style:parent-style-name="TITLE_5f_AND_5f_BODY_5f_2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_5f_1_5f_2-outline4" style:display-name="TITLE_AND_BODY_2_1_1_2-outline4" style:family="presentation" style:parent-style-name="TITLE_5f_AND_5f_BODY_5f_2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_5f_1_5f_2-outline5" style:display-name="TITLE_AND_BODY_2_1_1_2-outline5" style:family="presentation" style:parent-style-name="TITLE_5f_AND_5f_BODY_5f_2_5f_1_5f_1_5f_2-outline4">
      <style:paragraph-properties fo:margin-top="0.1cm" fo:margin-bottom="0cm"/>
      <style:text-properties fo:font-size="20pt" style:font-size-asian="20pt" style:font-size-complex="20pt"/>
    </style:style>
    <style:style style:name="TITLE_5f_AND_5f_BODY_5f_2_5f_1_5f_1_5f_2-outline6" style:display-name="TITLE_AND_BODY_2_1_1_2-outline6" style:family="presentation" style:parent-style-name="TITLE_5f_AND_5f_BODY_5f_2_5f_1_5f_1_5f_2-outline5">
      <style:paragraph-properties fo:margin-top="0.1cm" fo:margin-bottom="0cm"/>
      <style:text-properties fo:font-size="20pt" style:font-size-asian="20pt" style:font-size-complex="20pt"/>
    </style:style>
    <style:style style:name="TITLE_5f_AND_5f_BODY_5f_2_5f_1_5f_1_5f_2-outline7" style:display-name="TITLE_AND_BODY_2_1_1_2-outline7" style:family="presentation" style:parent-style-name="TITLE_5f_AND_5f_BODY_5f_2_5f_1_5f_1_5f_2-outline6">
      <style:paragraph-properties fo:margin-top="0.1cm" fo:margin-bottom="0cm"/>
      <style:text-properties fo:font-size="20pt" style:font-size-asian="20pt" style:font-size-complex="20pt"/>
    </style:style>
    <style:style style:name="TITLE_5f_AND_5f_BODY_5f_2_5f_1_5f_1_5f_2-outline8" style:display-name="TITLE_AND_BODY_2_1_1_2-outline8" style:family="presentation" style:parent-style-name="TITLE_5f_AND_5f_BODY_5f_2_5f_1_5f_1_5f_2-outline7">
      <style:paragraph-properties fo:margin-top="0.1cm" fo:margin-bottom="0cm"/>
      <style:text-properties fo:font-size="20pt" style:font-size-asian="20pt" style:font-size-complex="20pt"/>
    </style:style>
    <style:style style:name="TITLE_5f_AND_5f_BODY_5f_2_5f_1_5f_1_5f_2-outline9" style:display-name="TITLE_AND_BODY_2_1_1_2-outline9" style:family="presentation" style:parent-style-name="TITLE_5f_AND_5f_BODY_5f_2_5f_1_5f_1_5f_2-outline8">
      <style:paragraph-properties fo:margin-top="0.1cm" fo:margin-bottom="0cm"/>
      <style:text-properties fo:font-size="20pt" style:font-size-asian="20pt" style:font-size-complex="20pt"/>
    </style:style>
    <style:style style:name="TITLE_5f_AND_5f_BODY_5f_2_5f_1_5f_1_5f_2-subtitle" style:display-name="TITLE_AND_BODY_2_1_1_2-subtitle" style:family="presentation">
      <style:graphic-properties draw:stroke="none" draw:fill="none" draw:textarea-vertical-align="middle">
        <text:list-style style:name="TITLE_5f_AND_5f_BODY_5f_2_5f_1_5f_1_5f_2-subtitle" style:display-name="TITLE_AND_BODY_2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1_5f_2-title" style:display-name="TITLE_AND_BODY_2_1_1_2-title" style:family="presentation">
      <style:graphic-properties draw:stroke="none" draw:fill="none" draw:textarea-vertical-align="middle">
        <text:list-style style:name="TITLE_5f_AND_5f_BODY_5f_2_5f_1_5f_1_5f_2-title" style:display-name="TITLE_AND_BODY_2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58cm, 0cm, 6.722cm, 0cm)" draw:image-opacity="100%" style:mirror="none"/>
    </style:style>
    <style:style style:name="Mpr1" style:family="presentation" style:parent-style-name="SECTION_5f_HEADER_5f_1_5f_2_5f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SECTION_5f_HEADER_5f_1_5f_2_5f_1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_5f_2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AND_5f_BODY_5f_2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5f_AND_5f_BODY_5f_2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_5f_2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_5f_2_5f_1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_5f_2_5f_1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_5f_2_5f_4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5f_AND_5f_BODY_5f_2_5f_4_5f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AND_5f_BODY_5f_2_5f_1_5f_5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_5f_2_5f_1_5f_5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BODY_5f_2_5f_1_5f_1_5f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5f_AND_5f_BODY_5f_2_5f_1_5f_1_5f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font-style="normal" style:text-underline-style="none" fo:font-weight="normal" style:font-name-asian="Century Gothic" style:font-size-asian="18pt" style:font-style-asian="normal" style:font-weight-asian="normal" style:font-name-complex="Century Gothic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_5f_1_5f_2_5f_1" style:display-name="SECTION_HEADER_1_2_1" style:page-layout-name="PM1" draw:style-name="Mdp1">
      <draw:frame draw:name="Google Shape;30;p5" draw:style-name="Mgr3" draw:text-style-name="MP5" draw:layer="backgroundobjects" svg:width="10.134cm" svg:height="9.81cm" svg:x="7.632cm" svg:y="2.843cm">
        <draw:image xlink:href="Pictures/10000201000001F4000001E4CF0195E221BD501B.png" xlink:type="simple" xlink:show="embed" xlink:actuate="onLoad">
          <text:p/>
        </draw:image>
      </draw:frame>
      <draw:frame draw:name="Google Shape;31;p5" presentation:style-name="SECTION_5f_HEADER_5f_1_5f_2_5f_1-title" draw:layer="backgroundobjects" svg:width="23.667cm" svg:height="2.003cm" svg:x="0.866cm" svg:y="0.428cm" presentation:class="title" presentation:placeholder="true" presentation:user-transformed="true">
        <draw:text-box/>
      </draw:frame>
      <draw:frame draw:name="Google Shape;32;p5" draw:style-name="Mgr3" draw:text-style-name="MP5" draw:layer="backgroundobjects" svg:width="0.766cm" svg:height="0.766cm" svg:x="16.824cm" svg:y="13.157cm">
        <draw:image xlink:href="Pictures/10000201000000B4000000B46027ED32C11D68DD.png" xlink:type="simple" xlink:show="embed" xlink:actuate="onLoad">
          <text:p/>
        </draw:image>
      </draw:frame>
      <draw:frame draw:name="Google Shape;33;p5" draw:style-name="Mgr3" draw:text-style-name="MP5" draw:layer="backgroundobjects" svg:width="0.766cm" svg:height="0.766cm" svg:x="15.907cm" svg:y="13.157cm">
        <draw:image xlink:href="Pictures/1000020100000084000000841A7D57659B0061C4.png" xlink:type="simple" xlink:show="embed" xlink:actuate="onLoad">
          <text:p/>
        </draw:image>
      </draw:frame>
      <draw:frame draw:name="Google Shape;34;p5" draw:style-name="Mgr3" draw:text-style-name="MP5" draw:layer="backgroundobjects" svg:width="1.346cm" svg:height="1.009cm" svg:x="17.576cm" svg:y="13.066cm">
        <draw:image xlink:href="Pictures/10000201000001900000012CE2A20F5209AEEEE6.png" xlink:type="simple" xlink:show="embed" xlink:actuate="onLoad">
          <text:p/>
        </draw:image>
      </draw:frame>
      <draw:custom-shape draw:name="Google Shape;35;p5" draw:style-name="Mgr4" draw:text-style-name="MP7" draw:layer="backgroundobjects" svg:width="6.772cm" svg:height="1.009cm" svg:x="18.575cm" svg:y="12.904cm">
        <text:p text:style-name="MP6"><text:span text:style-name="MT1">@BootstrapWorl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HEADER_5f_1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_5f_1_5f_2_5f_1-title" draw:layer="backgroundobjects" svg:width="19.798cm" svg:height="11.136cm" svg:x="0.6cm" svg:y="2.257cm" presentation:class="page"/>
        <draw:frame presentation:style-name="SECTION_5f_HEADER_5f_1_5f_2_5f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2" style:display-name="TITLE_AND_BODY_2" style:page-layout-name="PM1" draw:style-name="Mdp1">
      <draw:frame draw:name="Google Shape;101;p15" presentation:style-name="TITLE_5f_AND_5f_BODY_5f_2-outline1" draw:layer="backgroundobjects" svg:width="20.699cm" svg:height="9.489cm" svg:x="3.578cm" svg:y="2.786cm" presentation:class="outline" presentation:placeholder="true" presentation:user-transformed="true">
        <draw:text-box/>
      </draw:frame>
      <draw:custom-shape draw:name="Google Shape;102;p15" draw:style-name="Mgr5" draw:text-style-name="MP8" draw:layer="backgroundobjects" svg:width="25.452cm" svg:height="2.178cm" svg:x="-0.022cm" svg:y="-0.002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3;p15" presentation:style-name="TITLE_5f_AND_5f_BODY_5f_2-title" draw:layer="backgroundobjects" svg:width="21.908cm" svg:height="1.59cm" svg:x="3.356cm" svg:y="0.178cm" presentation:class="title" presentation:placeholder="true" presentation:user-transformed="true">
        <draw:text-box/>
      </draw:frame>
      <draw:frame draw:name="Google Shape;104;p15" draw:style-name="Mgr3" draw:text-style-name="MP5" draw:layer="backgroundobjects" svg:width="3.604cm" svg:height="3.604cm" svg:x="0.234cm" svg:y="0.215cm">
        <draw:image xlink:href="Pictures/100002010000020000000200E34C0A2E787C9B97.png" xlink:type="simple" xlink:show="embed" xlink:actuate="onLoad">
          <text:p/>
        </draw:image>
      </draw:frame>
      <presentation:notes style:page-layout-name="PM2">
        <draw:page-thumbnail presentation:style-name="TITLE_5f_AND_5f_BODY_5f_2-title" draw:layer="backgroundobjects" svg:width="16.931cm" svg:height="9.524cm" svg:x="1.059cm" svg:y="1.93cm" presentation:class="page"/>
        <draw:frame presentation:style-name="TITLE_5f_AND_5f_BODY_5f_2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2_5f_1" style:display-name="TITLE_AND_BODY_2_1" style:page-layout-name="PM1" draw:style-name="Mdp1">
      <draw:custom-shape draw:name="Google Shape;144;p22" draw:style-name="Mgr5" draw:text-style-name="MP8" draw:layer="backgroundobjects" svg:width="25.421cm" svg:height="2.178cm" svg:x="-0.001cm" svg:y="-0.002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5;p22" draw:style-name="Mgr3" draw:text-style-name="MP5" draw:layer="backgroundobjects" svg:width="3.699cm" svg:height="3.699cm" svg:x="0.113cm" svg:y="0.216cm">
        <draw:image xlink:href="Pictures/100002010000020000000200F43894A2E5981DCE.png" xlink:type="simple" xlink:show="embed" xlink:actuate="onLoad">
          <text:p/>
        </draw:image>
      </draw:frame>
      <draw:frame draw:name="Google Shape;146;p22" presentation:style-name="TITLE_5f_AND_5f_BODY_5f_2_5f_1-title" draw:layer="backgroundobjects" svg:width="21.908cm" svg:height="1.59cm" svg:x="3.356cm" svg:y="0.178cm" presentation:class="title" presentation:placeholder="true" presentation:user-transformed="true">
        <draw:text-box/>
      </draw:frame>
      <draw:frame draw:name="Google Shape;147;p22" presentation:style-name="TITLE_5f_AND_5f_BODY_5f_2_5f_1-outline1" draw:layer="backgroundobjects" svg:width="21.032cm" svg:height="9.489cm" svg:x="3.602cm" svg:y="2.707cm" presentation:class="outline" presentation:placeholder="true" presentation:user-transformed="true">
        <draw:text-box/>
      </draw:frame>
      <presentation:notes style:page-layout-name="PM2">
        <draw:page-thumbnail presentation:style-name="TITLE_5f_AND_5f_BODY_5f_2_5f_1-title" draw:layer="backgroundobjects" svg:width="16.931cm" svg:height="9.524cm" svg:x="1.059cm" svg:y="1.93cm" presentation:class="page"/>
        <draw:frame presentation:style-name="TITLE_5f_AND_5f_BODY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2_5f_1_5f_1" style:display-name="TITLE_AND_BODY_2_1_1" style:page-layout-name="PM1" draw:style-name="Mdp1">
      <draw:custom-shape draw:name="Google Shape;213;p33" draw:style-name="Mgr5" draw:text-style-name="MP8" draw:layer="backgroundobjects" svg:width="25.421cm" svg:height="2.178cm" svg:x="-0.001cm" svg:y="-0.002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4;p33" draw:style-name="Mgr3" draw:text-style-name="MP5" draw:layer="backgroundobjects" svg:width="2.955cm" svg:height="2.955cm" svg:x="0.304cm" svg:y="0.405cm">
        <draw:image xlink:href="Pictures/100002010000020000000200C380900152203F0B.png" xlink:type="simple" xlink:show="embed" xlink:actuate="onLoad">
          <text:p/>
        </draw:image>
      </draw:frame>
      <draw:frame draw:name="Google Shape;215;p33" presentation:style-name="TITLE_5f_AND_5f_BODY_5f_2_5f_1_5f_1-title" draw:layer="backgroundobjects" svg:width="21.908cm" svg:height="1.59cm" svg:x="3.356cm" svg:y="0.178cm" presentation:class="title" presentation:placeholder="true" presentation:user-transformed="true">
        <draw:text-box/>
      </draw:frame>
      <draw:frame draw:name="Google Shape;216;p33" presentation:style-name="TITLE_5f_AND_5f_BODY_5f_2_5f_1_5f_1-outline1" draw:layer="backgroundobjects" svg:width="21.327cm" svg:height="9.489cm" svg:x="3.26cm" svg:y="2.72cm" presentation:class="outline" presentation:placeholder="true" presentation:user-transformed="true">
        <draw:text-box/>
      </draw:frame>
      <presentation:notes style:page-layout-name="PM2">
        <draw:page-thumbnail presentation:style-name="TITLE_5f_AND_5f_BODY_5f_2_5f_1_5f_1-title" draw:layer="backgroundobjects" svg:width="16.931cm" svg:height="9.524cm" svg:x="1.059cm" svg:y="1.93cm" presentation:class="page"/>
        <draw:frame presentation:style-name="TITLE_5f_AND_5f_BODY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2_5f_4_5f_1" style:display-name="TITLE_AND_BODY_2_4_1" style:page-layout-name="PM1" draw:style-name="Mdp1">
      <draw:frame draw:name="Google Shape;112;p17" presentation:style-name="TITLE_5f_AND_5f_BODY_5f_2_5f_4_5f_1-outline1" draw:layer="backgroundobjects" svg:width="21.132cm" svg:height="9.489cm" svg:x="3.519cm" svg:y="2.786cm" presentation:class="outline" presentation:placeholder="true" presentation:user-transformed="true">
        <draw:text-box/>
      </draw:frame>
      <draw:frame draw:name="Google Shape;113;p17" draw:style-name="Mgr6" draw:text-style-name="MP5" draw:layer="backgroundobjects" svg:width="3.114cm" svg:height="1.93cm" svg:x="0.041cm" svg:y="7.263cm">
        <draw:image xlink:href="Pictures/1000020100000438000004385DCD94D9D292316F.png" xlink:type="simple" xlink:show="embed" xlink:actuate="onLoad">
          <text:p/>
        </draw:image>
      </draw:frame>
      <draw:custom-shape draw:name="Google Shape;114;p17" draw:style-name="Mgr5" draw:text-style-name="MP8" draw:layer="backgroundobjects" svg:width="25.452cm" svg:height="2.178cm" svg:x="-0.022cm" svg:y="-0.002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5;p17" presentation:style-name="TITLE_5f_AND_5f_BODY_5f_2_5f_4_5f_1-title" draw:layer="backgroundobjects" svg:width="21.908cm" svg:height="1.59cm" svg:x="3.356cm" svg:y="0.178cm" presentation:class="title" presentation:placeholder="true" presentation:user-transformed="true">
        <draw:text-box/>
      </draw:frame>
      <draw:frame draw:name="Google Shape;116;p17" draw:style-name="Mgr3" draw:text-style-name="MP5" draw:layer="backgroundobjects" svg:width="3.604cm" svg:height="3.604cm" svg:x="0.234cm" svg:y="0.215cm">
        <draw:image xlink:href="Pictures/100002010000020000000200E34C0A2E787C9B97.png" xlink:type="simple" xlink:show="embed" xlink:actuate="onLoad">
          <text:p/>
        </draw:image>
      </draw:frame>
      <presentation:notes style:page-layout-name="PM2">
        <draw:page-thumbnail presentation:style-name="TITLE_5f_AND_5f_BODY_5f_2_5f_4_5f_1-title" draw:layer="backgroundobjects" svg:width="16.931cm" svg:height="9.524cm" svg:x="1.059cm" svg:y="1.93cm" presentation:class="page"/>
        <draw:frame presentation:style-name="TITLE_5f_AND_5f_BODY_5f_2_5f_4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2_5f_1_5f_5" style:display-name="TITLE_AND_BODY_2_1_5" style:page-layout-name="PM1" draw:style-name="Mdp1">
      <draw:custom-shape draw:name="Google Shape;155;p24" draw:style-name="Mgr5" draw:text-style-name="MP8" draw:layer="backgroundobjects" svg:width="25.421cm" svg:height="2.178cm" svg:x="-0.001cm" svg:y="-0.002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6;p24" presentation:style-name="TITLE_5f_AND_5f_BODY_5f_2_5f_1_5f_5-title" draw:layer="backgroundobjects" svg:width="21.908cm" svg:height="1.59cm" svg:x="3.356cm" svg:y="0.178cm" presentation:class="title" presentation:placeholder="true" presentation:user-transformed="true">
        <draw:text-box/>
      </draw:frame>
      <draw:frame draw:name="Google Shape;157;p24" presentation:style-name="TITLE_5f_AND_5f_BODY_5f_2_5f_1_5f_5-outline1" draw:layer="backgroundobjects" svg:width="20.948cm" svg:height="9.489cm" svg:x="3.531cm" svg:y="2.786cm" presentation:class="outline" presentation:placeholder="true" presentation:user-transformed="true">
        <draw:text-box/>
      </draw:frame>
      <draw:frame draw:name="Google Shape;158;p24" draw:style-name="Mgr3" draw:text-style-name="MP5" draw:layer="backgroundobjects" svg:width="3.699cm" svg:height="3.699cm" svg:x="0.113cm" svg:y="0.216cm">
        <draw:image xlink:href="Pictures/100002010000020000000200F43894A2E5981DCE.png" xlink:type="simple" xlink:show="embed" xlink:actuate="onLoad">
          <text:p/>
        </draw:image>
      </draw:frame>
      <draw:frame draw:name="Google Shape;159;p24" draw:style-name="Mgr6" draw:text-style-name="MP5" draw:layer="backgroundobjects" svg:width="3.114cm" svg:height="1.93cm" svg:x="0.041cm" svg:y="7.263cm">
        <draw:image xlink:href="Pictures/1000020100000438000004385DCD94D9D292316F.png" xlink:type="simple" xlink:show="embed" xlink:actuate="onLoad">
          <text:p/>
        </draw:image>
      </draw:frame>
      <presentation:notes style:page-layout-name="PM2">
        <draw:page-thumbnail presentation:style-name="TITLE_5f_AND_5f_BODY_5f_2_5f_1_5f_5-title" draw:layer="backgroundobjects" svg:width="16.931cm" svg:height="9.524cm" svg:x="1.059cm" svg:y="1.93cm" presentation:class="page"/>
        <draw:frame presentation:style-name="TITLE_5f_AND_5f_BODY_5f_2_5f_1_5f_5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2_5f_1_5f_1_5f_2" style:display-name="TITLE_AND_BODY_2_1_1_2" style:page-layout-name="PM1" draw:style-name="Mdp1">
      <draw:custom-shape draw:name="Google Shape;218;p34" draw:style-name="Mgr5" draw:text-style-name="MP8" draw:layer="backgroundobjects" svg:width="25.421cm" svg:height="2.178cm" svg:x="-0.001cm" svg:y="-0.002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9;p34" draw:style-name="Mgr3" draw:text-style-name="MP5" draw:layer="backgroundobjects" svg:width="2.955cm" svg:height="2.955cm" svg:x="0.304cm" svg:y="0.405cm">
        <draw:image xlink:href="Pictures/100002010000020000000200C380900152203F0B.png" xlink:type="simple" xlink:show="embed" xlink:actuate="onLoad">
          <text:p/>
        </draw:image>
      </draw:frame>
      <draw:frame draw:name="Google Shape;220;p34" presentation:style-name="TITLE_5f_AND_5f_BODY_5f_2_5f_1_5f_1_5f_2-title" draw:layer="backgroundobjects" svg:width="21.908cm" svg:height="1.59cm" svg:x="3.356cm" svg:y="0.178cm" presentation:class="title" presentation:placeholder="true" presentation:user-transformed="true">
        <draw:text-box/>
      </draw:frame>
      <draw:frame draw:name="Google Shape;221;p34" presentation:style-name="TITLE_5f_AND_5f_BODY_5f_2_5f_1_5f_1_5f_2-outline1" draw:layer="backgroundobjects" svg:width="15.185cm" svg:height="9.489cm" svg:x="1.389cm" svg:y="3.689cm" presentation:class="outline" presentation:placeholder="true" presentation:user-transformed="true">
        <draw:text-box/>
      </draw:frame>
      <draw:frame draw:name="Google Shape;222;p34" presentation:style-name="TITLE_5f_AND_5f_BODY_5f_2_5f_1_5f_1_5f_2-outline1" draw:layer="backgroundobjects" svg:width="8.112cm" svg:height="7.068cm" svg:x="16.575cm" svg:y="4.466cm" presentation:class="outline" presentation:placeholder="true" presentation:user-transformed="true">
        <draw:text-box/>
      </draw:frame>
      <presentation:notes style:page-layout-name="PM2">
        <draw:page-thumbnail presentation:style-name="TITLE_5f_AND_5f_BODY_5f_2_5f_1_5f_1_5f_2-title" draw:layer="backgroundobjects" svg:width="16.931cm" svg:height="9.524cm" svg:x="1.059cm" svg:y="1.93cm" presentation:class="page"/>
        <draw:frame presentation:style-name="TITLE_5f_AND_5f_BODY_5f_2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8"/>
    <meta:generator>LibreOfficeDev/6.0.5.2$Linux_X86_64 LibreOffice_project/</meta:generator>
  </office:meta>
</office:document-meta>
</file>