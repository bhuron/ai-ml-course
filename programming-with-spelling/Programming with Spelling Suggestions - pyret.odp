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F600000143EE623A988B856C1B.png" manifest:media-type="image/png"/>
  <manifest:file-entry manifest:full-path="Pictures/10000201000002CF000000574CCA04CE4AE28230.png" manifest:media-type="image/png"/>
  <manifest:file-entry manifest:full-path="Pictures/10000201000002E100000057D842AD0043EA2D7E.png" manifest:media-type="image/png"/>
  <manifest:file-entry manifest:full-path="Pictures/10000000000001F4000001D46239A39D28DB40F8.png" manifest:media-type="image/png"/>
  <manifest:file-entry manifest:full-path="Pictures/10000000000001F4000001D44AB5030E5647C5EC.png" manifest:media-type="image/png"/>
  <manifest:file-entry manifest:full-path="Pictures/10000000000001F4000001D46823DCB89CA4530C.png" manifest:media-type="image/png"/>
  <manifest:file-entry manifest:full-path="Pictures/100002010000035A000000E6192C484CACC44C00.png" manifest:media-type="image/png"/>
  <manifest:file-entry manifest:full-path="Pictures/10000201000006320000006803744EA150FB94F1.png" manifest:media-type="image/png"/>
  <manifest:file-entry manifest:full-path="Pictures/10000000000001F4000001D4AC8C2285E0F2F1DC.png" manifest:media-type="image/png"/>
  <manifest:file-entry manifest:full-path="Pictures/10000201000001F0000000AE693991E4675B1B79.png" manifest:media-type="image/png"/>
  <manifest:file-entry manifest:full-path="Pictures/10000201000000B4000000B46027ED32C11D68DD.png" manifest:media-type="image/png"/>
  <manifest:file-entry manifest:full-path="Pictures/1000020100000084000000841A7D57659B0061C4.png" manifest:media-type="image/png"/>
  <manifest:file-entry manifest:full-path="Pictures/10000201000001900000012CE2A20F5209AEEEE6.png" manifest:media-type="image/png"/>
  <manifest:file-entry manifest:full-path="Pictures/1000020100000438000004385DCD94D9D292316F.png" manifest:media-type="image/png"/>
  <manifest:file-entry manifest:full-path="Pictures/100002010000020000000200E34C0A2E787C9B97.png" manifest:media-type="image/png"/>
  <manifest:file-entry manifest:full-path="Pictures/100002010000020000000200F43894A2E5981DCE.png" manifest:media-type="image/png"/>
  <manifest:file-entry manifest:full-path="Pictures/100000000000074E000001FED3F9C213CE87F15E.png" manifest:media-type="image/png"/>
  <manifest:file-entry manifest:full-path="Pictures/10000201000001F4000001E4CF0195E221BD501B.png" manifest:media-type="image/png"/>
  <manifest:file-entry manifest:full-path="Pictures/100002010000020000000200C380900152203F0B.png" manifest:media-type="image/png"/>
  <manifest:file-entry manifest:full-path="Pictures/10000000000001F4000001D47B2ED1637375ED90.png" manifest:media-type="image/png"/>
  <manifest:file-entry manifest:full-path="Pictures/10000000000001F4000001D6185C012D52EC78F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entury Gothic" svg:font-family="'Century Gothic'"/>
    <style:font-face style:name="Courier Prime" svg:font-family="'Courier Prim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SECTION_5f_HEADER_5f_1_5f_2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SECTION_5f_HEADER_5f_1_5f_2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_5f_2_5f_2-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 style:family="presentation" style:parent-style-name="TITLE_5f_AND_5f_BODY_5f_2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_5f_2_5f_2-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_5f_2_5f_2-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_5f_2_5f_1_5f_5-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_5f_2_5f_1_5f_5-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_5f_2_5f_1_5f_5-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_5f_2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1" style:family="presentation" style:parent-style-name="TITLE_5f_AND_5f_BODY_5f_2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_5f_2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_5f_2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_5f_2_5f_1_5f_5-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_5f_2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6" style:family="presentation" style:parent-style-name="TITLE_5f_AND_5f_BODY_5f_2_5f_1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7" style:family="presentation" style:parent-style-name="TITLE_5f_AND_5f_BODY_5f_2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_5f_2-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9" style:family="presentation" style:parent-style-name="TITLE_5f_AND_5f_BODY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0" style:family="presentation" style:parent-style-name="TITLE_5f_AND_5f_BODY_5f_2-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_5f_2-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_5f_2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_5f_2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_5f_2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_5f_2_5f_1_5f_5-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_5f_2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_5f_2_5f_1_5f_4-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8" style:family="presentation" style:parent-style-name="TITLE_5f_AND_5f_BODY_5f_2_5f_1_5f_4-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9" style:family="presentation" style:parent-style-name="TITLE_5f_AND_5f_BODY_5f_2_5f_1_5f_4-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_5f_2_5f_2-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_5f_2_5f_2-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_5f_2_5f_1_5f_5-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_5f_2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_5f_2_5f_1_5f_5-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_5f_2_5f_1_5f_5-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_5f_2-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_5f_2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_5f_2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_5f_2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_5f_2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31pt"/>
    </style:style>
    <style:style style:name="P11" style:family="paragraph">
      <loext:graphic-properties draw:fill="none"/>
      <style:paragraph-properties fo:text-align="start"/>
      <style:text-properties fo:font-size="18pt"/>
    </style:style>
    <style:style style:name="P1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agraph-properties fo:margin-left="0cm" fo:margin-right="0cm" fo:margin-top="0cm" fo:margin-bottom="0cm" fo:line-height="115%" fo:text-align="start" fo:text-indent="0cm" style:writing-mode="lr-tb"/>
    </style:style>
    <style:style style:name="P14" style:family="paragraph">
      <style:paragraph-properties fo:margin-left="0cm" fo:margin-right="0cm" fo:margin-top="0cm" fo:margin-bottom="0cm" fo:line-height="100%" fo:text-align="start" fo:text-indent="0cm" style:writing-mode="lr-tb"/>
    </style:style>
    <style:style style:name="T1" style:family="text">
      <style:text-properties fo:font-variant="normal" fo:text-transform="none" fo:color="#000000" style:text-line-through-style="none" style:text-line-through-type="none" style:text-position="0% 100%" style:font-name="Century Gothic" fo:font-size="32.2999992370605pt" fo:letter-spacing="normal" fo:font-style="normal" style:text-underline-style="none" fo:font-weight="bold" style:font-name-asian="Century Gothic" style:font-size-asian="32.2999992370605pt" style:font-style-asian="normal" style:font-weight-asian="bold" style:font-name-complex="Century Gothic" style:font-size-complex="32.2999992370605pt" style:font-style-complex="normal" style:font-weight-complex="bold"/>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4" style:family="text">
      <style:text-properties fo:font-variant="normal" fo:text-transform="none" fo:color="#000000" style:text-line-through-style="none" style:text-line-through-type="none" style:text-position="0% 100%" style:font-name="Century Gothic" fo:font-size="16pt" fo:letter-spacing="normal" fo:font-style="normal" style:text-underline-style="none" fo:font-weight="normal" style:font-name-asian="Century Gothic" style:font-size-asian="16pt" style:font-style-asian="normal" style:font-weight-asian="normal" style:font-name-complex="Century Gothic" style:font-size-complex="16pt" style:font-style-complex="normal" style:font-weight-complex="normal"/>
    </style:style>
    <style:style style:name="T5" style:family="text">
      <style:text-properties fo:font-variant="normal" fo:text-transform="none" fo:color="#0097a7" style:text-line-through-style="none" style:text-line-through-type="none" style:text-position="0% 100%" style:font-name="Century Gothic" fo:font-size="16pt" fo:letter-spacing="normal" fo:font-style="normal" style:text-underline-style="solid" style:text-underline-width="auto" style:text-underline-color="font-color" fo:font-weight="normal" style:font-name-asian="Century Gothic" style:font-size-asian="16pt" style:font-style-asian="normal" style:font-weight-asian="normal" style:font-name-complex="Century Gothic"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 Prime" fo:font-size="16pt" fo:letter-spacing="normal" fo:font-style="normal" style:text-underline-style="none" fo:font-weight="normal" style:font-name-asian="Courier Prime" style:font-size-asian="16pt" style:font-style-asian="normal" style:font-weight-asian="normal" style:font-name-complex="Courier Prime" style:font-size-complex="16pt" style:font-style-complex="normal" style:font-weight-complex="normal"/>
    </style:style>
    <style:style style:name="T7" style:family="text">
      <style:text-properties fo:font-variant="normal" fo:text-transform="none" fo:color="#228b22" style:text-line-through-style="none" style:text-line-through-type="none" style:text-position="0% 100%" style:font-name="Courier Prime" fo:font-size="16pt" fo:letter-spacing="normal" fo:font-style="normal" style:text-underline-style="none" fo:font-weight="normal" style:font-name-asian="Courier Prime" style:font-size-asian="16pt" style:font-style-asian="normal" style:font-weight-asian="normal" style:font-name-complex="Courier Prime" style:font-size-complex="16pt" style:font-style-complex="normal" style:font-weight-complex="normal"/>
    </style:style>
    <style:style style:name="T8" style:family="text">
      <style:text-properties fo:font-variant="normal" fo:text-transform="none" fo:color="#000080" style:text-line-through-style="none" style:text-line-through-type="none" style:text-position="0% 100%" style:font-name="Courier Prime" fo:font-size="16pt" fo:letter-spacing="normal" fo:font-style="normal" style:text-underline-style="none" fo:font-weight="normal" style:font-name-asian="Courier Prime" style:font-size-asian="16pt" style:font-style-asian="normal" style:font-weight-asian="normal" style:font-name-complex="Courier Prime"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entury Gothic" fo:font-size="16pt" fo:letter-spacing="normal" fo:font-style="italic" style:text-underline-style="none" fo:font-weight="normal" style:font-name-asian="Century Gothic" style:font-size-asian="16pt" style:font-style-asian="italic" style:font-weight-asian="normal" style:font-name-complex="Century Gothic" style:font-size-complex="16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normal" style:font-name-asian="Century Gothic" style:font-size-asian="18pt" style:font-style-asian="normal" style:font-weight-asian="normal" style:font-name-complex="Century Gothic"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entury Gothic" fo:font-size="26.5pt" fo:letter-spacing="normal" fo:font-style="normal" style:text-underline-style="none" fo:font-weight="normal" style:font-name-asian="Century Gothic" style:font-size-asian="26.5pt" style:font-style-asian="normal" style:font-weight-asian="normal" style:font-name-complex="Century Gothic" style:font-size-complex="26.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entury Gothic" fo:font-size="16pt" fo:letter-spacing="normal" fo:font-style="normal" style:text-underline-style="none" fo:font-weight="bold" style:font-name-asian="Century Gothic" style:font-size-asian="16pt" style:font-style-asian="normal" style:font-weight-asian="bold" style:font-name-complex="Century Gothic" style:font-size-complex="16pt" style:font-style-complex="normal" style:font-weight-complex="bold"/>
    </style:style>
    <style:style style:name="T13" style:family="text">
      <style:text-properties fo:font-variant="normal" fo:text-transform="none" fo:color="#555555" style:text-line-through-style="none" style:text-line-through-type="none" style:text-position="0% 100%" style:font-name="Courier Prime" fo:font-size="16pt" fo:letter-spacing="normal" fo:font-style="normal" style:text-underline-style="none" fo:font-weight="normal" style:font-name-asian="Courier Prime" style:font-size-asian="16pt" style:font-style-asian="normal" style:font-weight-asian="normal" style:font-name-complex="Courier Prime" style:font-size-complex="16pt" style:font-style-complex="normal" style:font-weight-complex="normal"/>
    </style:style>
    <style:style style:name="T14" style:family="text">
      <style:text-properties fo:font-variant="normal" fo:text-transform="none" fo:color="#555555" style:text-line-through-style="none" style:text-line-through-type="none" style:text-position="0% 100%" style:font-name="Courier Prime" fo:font-size="11pt" fo:letter-spacing="normal" fo:font-style="normal" style:text-underline-style="none" fo:font-weight="bold" style:font-name-asian="Courier Prime" style:font-size-asian="11pt" style:font-style-asian="normal" style:font-weight-asian="bold" style:font-name-complex="Courier Prime" style:font-size-complex="11pt" style:font-style-complex="normal" style:font-weight-complex="bold"/>
    </style:style>
    <style:style style:name="T15" style:family="text">
      <style:text-properties fo:font-variant="normal" fo:text-transform="none" fo:color="#555555" style:text-line-through-style="none" style:text-line-through-type="none" style:text-position="0% 100%" style:font-name="Courier Prime" fo:font-size="11pt" fo:letter-spacing="normal" fo:font-style="italic" style:text-underline-style="none" fo:font-weight="normal" style:font-name-asian="Courier Prime" style:font-size-asian="11pt" style:font-style-asian="italic" style:font-weight-asian="normal" style:font-name-complex="Courier Prime" style:font-size-complex="11pt" style:font-style-complex="italic" style:font-weight-complex="normal"/>
    </style:style>
    <style:style style:name="T16" style:family="text">
      <style:text-properties fo:font-variant="normal" fo:text-transform="none" fo:color="#555555" style:text-line-through-style="none" style:text-line-through-type="none" style:text-position="0% 100%" style:font-name="Courier Prime" fo:font-size="11pt" fo:letter-spacing="normal" fo:font-style="normal" style:text-underline-style="none" fo:font-weight="normal" style:font-name-asian="Courier Prime" style:font-size-asian="11pt" style:font-style-asian="normal" style:font-weight-asian="normal" style:font-name-complex="Courier Prime" style:font-size-complex="11pt" style:font-style-complex="normal" style:font-weight-complex="normal"/>
    </style:style>
    <style:style style:name="T17"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8"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20"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1" style:family="text">
      <style:text-properties fo:font-variant="normal" fo:text-transform="none" fo:color="#555555" style:text-line-through-style="none" style:text-line-through-type="none" style:text-position="0% 100%" style:font-name="Courier Prime" fo:font-size="11pt" fo:letter-spacing="normal" fo:font-style="italic" style:text-underline-style="none" fo:font-weight="bold" style:font-name-asian="Courier Prime" style:font-size-asian="11pt" style:font-style-asian="italic" style:font-weight-asian="bold" style:font-name-complex="Courier Prime" style:font-size-complex="11pt" style:font-style-complex="italic" style:font-weight-complex="bold"/>
    </style:style>
    <style:style style:name="T22" style:family="text">
      <style:text-properties fo:font-variant="normal" fo:text-transform="none" fo:color="#000000" style:text-line-through-style="none" style:text-line-through-type="none" style:text-position="0% 100%" style:font-name="Century Gothic" fo:font-size="15pt" fo:letter-spacing="normal" fo:font-style="normal" style:text-underline-style="none" fo:font-weight="normal" style:font-name-asian="Century Gothic" style:font-size-asian="15pt" style:font-style-asian="normal" style:font-weight-asian="normal" style:font-name-complex="Century Gothic" style:font-size-complex="15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urier Prime" fo:font-size="15pt" fo:letter-spacing="normal" fo:font-style="normal" style:text-underline-style="none" fo:font-weight="normal" style:font-name-asian="Courier Prime" style:font-size-asian="15pt" style:font-style-asian="normal" style:font-weight-asian="normal" style:font-name-complex="Courier Prime" style:font-size-complex="15pt" style:font-style-complex="normal" style:font-weight-complex="normal"/>
    </style:style>
    <style:style style:name="T24" style:family="text">
      <style:text-properties fo:font-variant="normal" fo:text-transform="none" fo:color="#555555" style:text-line-through-style="none" style:text-line-through-type="none" style:text-position="0% 100%" style:font-name="Courier Prime" fo:font-size="16pt" fo:letter-spacing="normal" fo:font-style="italic" style:text-underline-style="none" fo:font-weight="normal" style:font-name-asian="Courier Prime" style:font-size-asian="16pt" style:font-style-asian="italic" style:font-weight-asian="normal" style:font-name-complex="Courier Prime" style:font-size-complex="16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Century Gothic" fo:font-size="14.8000001907349pt" fo:letter-spacing="normal" fo:font-style="normal" style:text-underline-style="none" fo:font-weight="normal" style:font-name-asian="Century Gothic" style:font-size-asian="14.8000001907349pt" style:font-style-asian="normal" style:font-weight-asian="normal" style:font-name-complex="Century Gothic" style:font-size-complex="14.8000001907349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entury Gothic" fo:font-size="14.8000001907349pt" fo:letter-spacing="normal" fo:font-style="normal" style:text-underline-style="none" fo:font-weight="bold" style:font-name-asian="Century Gothic" style:font-size-asian="14.8000001907349pt" style:font-style-asian="normal" style:font-weight-asian="bold" style:font-name-complex="Century Gothic" style:font-size-complex="14.8000001907349pt" style:font-style-complex="normal" style:font-weight-complex="bold"/>
    </style:style>
    <style:style style:name="T27" style:family="text">
      <style:text-properties fo:font-variant="normal" fo:text-transform="none" fo:color="#000000" style:text-line-through-style="none" style:text-line-through-type="none" style:text-position="0% 100%" style:font-name="Century Gothic" fo:font-size="14.8000001907349pt" fo:letter-spacing="normal" fo:font-style="italic" style:text-underline-style="none" fo:font-weight="normal" style:font-name-asian="Century Gothic" style:font-size-asian="14.8000001907349pt" style:font-style-asian="italic" style:font-weight-asian="normal" style:font-name-complex="Century Gothic" style:font-size-complex="14.8000001907349pt" style:font-style-complex="italic" style:font-weight-complex="normal"/>
    </style:style>
    <style:style style:name="T28" style:family="text">
      <style:text-properties fo:font-variant="normal" fo:text-transform="none" style:text-line-through-style="none" style:text-line-through-type="none" style:text-position="0% 100%" fo:font-size="11pt" fo:letter-spacing="normal" fo:font-style="italic" style:text-underline-style="none" fo:font-weight="bold" style:font-size-asian="11pt" style:font-style-asian="italic" style:font-weight-asian="bold" style:font-size-complex="11pt" style:font-style-complex="italic" style:font-weight-complex="bold"/>
    </style:style>
    <style:style style:name="T29" style:family="text">
      <style:text-properties fo:font-variant="normal" fo:text-transform="none"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30" style:family="text">
      <style:text-properties fo:font-variant="normal" fo:text-transform="none" style:text-line-through-style="none" style:text-line-through-type="none" style:text-position="0% 100%" style:font-name="Courier Prime" fo:font-size="11pt" fo:letter-spacing="normal" fo:font-style="italic" style:text-underline-style="none" fo:font-weight="normal" style:font-name-asian="Courier Prime" style:font-size-asian="11pt" style:font-style-asian="italic" style:font-weight-asian="normal" style:font-name-complex="Courier Prime" style:font-size-complex="11pt" style:font-style-complex="italic" style:font-weight-complex="normal"/>
    </style:style>
    <style:style style:name="T31" style:family="text">
      <style:text-properties fo:font-variant="normal" fo:text-transform="none" style:text-line-through-style="none" style:text-line-through-type="none" style:text-position="0% 100%" style:font-name="Courier Prime" fo:font-size="11pt" fo:letter-spacing="normal" fo:font-style="normal" style:text-underline-style="none" fo:font-weight="bold" style:font-name-asian="Courier Prime" style:font-size-asian="11pt" style:font-style-asian="normal" style:font-weight-asian="bold" style:font-name-complex="Courier Prime" style:font-size-complex="11pt" style:font-style-complex="normal" style:font-weight-complex="bold"/>
    </style:style>
    <style:style style:name="T32" style:family="text">
      <style:text-properties fo:font-variant="normal" fo:text-transform="none" style:text-line-through-style="none" style:text-line-through-type="none" style:text-position="0% 100%" style:font-name="Courier Prime" fo:font-size="11pt" fo:letter-spacing="normal" fo:font-style="normal" style:text-underline-style="none" fo:font-weight="normal" style:font-name-asian="Courier Prime" style:font-size-asian="11pt" style:font-style-asian="normal" style:font-weight-asian="normal" style:font-name-complex="Courier Prime" style:font-size-complex="11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entury Gothic" fo:font-size="16pt" fo:letter-spacing="normal" fo:font-style="italic" style:text-underline-style="none" fo:font-weight="bold" style:font-name-asian="Century Gothic" style:font-size-asian="16pt" style:font-style-asian="italic" style:font-weight-asian="bold" style:font-name-complex="Century Gothic" style:font-size-complex="16pt" style:font-style-complex="italic" style:font-weight-complex="bold"/>
    </style:style>
    <style:style style:name="T34" style:family="text">
      <style:text-properties fo:font-variant="normal" fo:text-transform="none" fo:color="#000080" style:text-line-through-style="none" style:text-line-through-type="none" style:text-position="0% 100%" style:font-name="Courier Prime" fo:font-size="11pt" fo:letter-spacing="normal" fo:font-style="italic" style:text-underline-style="none" fo:font-weight="normal" style:font-name-asian="Courier Prime" style:font-size-asian="11pt" style:font-style-asian="italic" style:font-weight-asian="normal" style:font-name-complex="Courier Prime" style:font-size-complex="11pt" style:font-style-complex="italic" style:font-weight-complex="normal"/>
    </style:style>
    <style:style style:name="T35" style:family="text">
      <style:text-properties fo:font-variant="normal" fo:text-transform="none" fo:color="#228b22" style:text-line-through-style="none" style:text-line-through-type="none" style:text-position="0% 100%" style:font-name="Courier Prime" fo:font-size="11pt" fo:letter-spacing="normal" fo:font-style="italic" style:text-underline-style="none" fo:font-weight="normal" style:font-name-asian="Courier Prime" style:font-size-asian="11pt" style:font-style-asian="italic" style:font-weight-asian="normal" style:font-name-complex="Courier Prime" style:font-size-complex="11pt" style:font-style-complex="italic" style:font-weight-complex="normal"/>
    </style:style>
    <style:style style:name="T36" style:family="text">
      <style:text-properties fo:font-variant="normal" fo:text-transform="none" fo:color="#228b22" style:text-line-through-style="none" style:text-line-through-type="none" style:text-position="0% 100%" style:font-name="Courier Prime" fo:font-size="11pt" fo:letter-spacing="normal" fo:font-style="normal" style:text-underline-style="none" fo:font-weight="bold" style:font-name-asian="Courier Prime" style:font-size-asian="11pt" style:font-style-asian="normal" style:font-weight-asian="bold" style:font-name-complex="Courier Prime" style:font-size-complex="11pt" style:font-style-complex="normal" style:font-weight-complex="bold"/>
    </style:style>
    <style:style style:name="T37" style:family="text">
      <style:text-properties fo:font-variant="normal" fo:text-transform="none" fo:color="#228b22" style:text-line-through-style="none" style:text-line-through-type="none" style:text-position="0% 100%" style:font-name="Courier Prime" fo:font-size="11pt" fo:letter-spacing="normal" fo:font-style="normal" style:text-underline-style="none" fo:font-weight="normal" style:font-name-asian="Courier Prime" style:font-size-asian="11pt" style:font-style-asian="normal" style:font-weight-asian="normal" style:font-name-complex="Courier Prime" style:font-size-complex="11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urier Prime" fo:font-size="11pt" fo:letter-spacing="normal" fo:font-style="normal" style:text-underline-style="solid" style:text-underline-width="auto" style:text-underline-color="font-color" fo:font-weight="normal" style:font-name-asian="Courier Prime" style:font-size-asian="11pt" style:font-style-asian="normal" style:font-weight-asian="normal" style:font-name-complex="Courier Prime" style:font-size-complex="11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ourier Prime" fo:font-size="11pt" fo:letter-spacing="normal" fo:font-style="normal" style:text-underline-style="none" fo:font-weight="normal" style:font-name-asian="Courier Prime" style:font-size-asian="11pt" style:font-style-asian="normal" style:font-weight-asian="normal" style:font-name-complex="Courier Prime"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54cm" text:min-label-width="0.916cm"/>
        <style:text-properties style:font-name="Century Gothic"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fo:color="#55555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75cm" text:min-label-width="0.895cm"/>
        <style:text-properties style:font-name="Century Gothic"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75cm" text:min-label-width="0.895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style:font-name="Courier Prime" fo:color="#55555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style:font-name="Courier Prim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ogramming with Spelling Suggestions" draw:style-name="dp1" draw:master-page-name="SECTION_5f_HEADER_5f_1_5f_2_5f_1">
        <draw:frame draw:name="Google Shape;301;p53" presentation:style-name="pr1" draw:text-style-name="P2" draw:layer="layout" svg:width="23.667cm" svg:height="2.003cm" svg:x="0.866cm" svg:y="0.428cm" presentation:class="title" presentation:user-transformed="true">
          <draw:text-box>
            <text:p text:style-name="P1"><text:span text:style-name="T1">Programming with Spelling Suggestions</text:span></text:p>
          </draw:text-box>
        </draw:frame>
        <presentation:notes draw:style-name="dp2">
          <draw:page-thumbnail draw:name="Google Shape;298;g3edfef7293b_0_0:notes" draw:style-name="gr1" draw:layer="layout" svg:width="16.932cm" svg:height="9.524cm" svg:x="1.059cm" svg:y="1.905cm" draw:page-number="1" presentation:class="page"/>
          <draw:frame draw:name="Google Shape;299;g3edfef7293b_0_0:notes" presentation:style-name="pr2" draw:text-style-name="P4" draw:layer="layout" svg:width="15.239cm" svg:height="11.429cm" svg:x="1.905cm" svg:y="12.065cm" presentation:class="notes" presentation:user-transformed="true">
            <draw:text-box>
              <text:p text:style-name="P3"><text:span text:style-name="T2">This is the </text:span><text:span text:style-name="T3">pyret</text:span><text:span text:style-name="T2"> version of this lesson. Make sure you are using the right software tool (WeScheme, Pyret, CODAP, etc...)</text:span></text:p>
              <text:p text:style-name="P3"><text:span text:style-name="T2">To learn more about how to use PearDeck, and how to view the embedded links on these slides without going into present mode visit https://help.peardeck.com/en</text:span></text:p>
              <text:p text:style-name="P3"><text:span text:style-name="T2"/></text:p>
            </draw:text-box>
          </draw:frame>
        </presentation:notes>
      </draw:page>
      <draw:page draw:name="Introducing Contracts" draw:style-name="dp1" draw:master-page-name="TITLE_5f_AND_5f_BODY_5f_2_5f_2">
        <draw:frame draw:name="Google Shape;306;p54" presentation:style-name="pr3" draw:text-style-name="P8" draw:layer="layout" svg:width="15.185cm" svg:height="9.489cm" svg:x="1.193cm" svg:y="4.199cm" presentation:class="outline" presentation:user-transformed="true">
          <draw:text-box>
            <text:p text:style-name="P5"><text:span text:style-name="T4">Make sure you've got the </text:span><text:span text:style-name="T5"><text:a xlink:href="https://pyret.bootstrapworld.org/editor#shareurl=https://raw.githubusercontent.com/bootstrapworld/starter-files/fall2026/ai/Spell%20Checker%20Starter%20File.arr" xlink:type="simple">Spell Checker Starter File</text:a></text:span><text:span text:style-name="T4"><text:s/>open, and your Definitions Area includes </text:span></text:p>
            <text:p text:style-name="P6"><text:span text:style-name="T6">results = alt-words(</text:span><text:span text:style-name="T7">"plation"</text:span><text:span text:style-name="T6">, WORDS-L, </text:span><text:span text:style-name="T8">4</text:span><text:span text:style-name="T6">)</text:span><text:span text:style-name="T4">.</text:span></text:p>
            <text:p text:style-name="P6"><text:span text:style-name="T4">Our spell-checker gives us lots of data to play with, in the form of tables of suggested words and their edit distances. We know how to save that data using variable definitions, so that we can refer back to it without having to recalculate the whole table.</text:span></text:p>
            <text:p text:style-name="P6"><text:span text:style-name="T4">Can we do anything </text:span><text:span text:style-name="T9">interesting</text:span><text:span text:style-name="T4"> with that data?</text:span></text:p>
            <text:p text:style-name="P7"><text:span text:style-name="T10"/></text:p>
          </draw:text-box>
        </draw:frame>
        <draw:frame draw:name="Google Shape;307;p54" presentation:style-name="pr4"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308;p54" draw:style-name="gr2" draw:text-style-name="P11" draw:layer="layout" svg:width="7.733cm" svg:height="7.238cm" svg:x="17.019cm" svg:y="4.199cm">
          <draw:image xlink:href="Pictures/10000000000001F4000001D4AC8C2285E0F2F1DC.png" xlink:type="simple" xlink:show="embed" xlink:actuate="onLoad">
            <text:p/>
          </draw:image>
        </draw:frame>
        <presentation:notes draw:style-name="dp2">
          <draw:page-thumbnail draw:name="Google Shape;303;g3edfef7293b_0_4:notes" draw:style-name="gr1" draw:layer="layout" svg:width="16.932cm" svg:height="9.524cm" svg:x="1.059cm" svg:y="1.905cm" draw:page-number="2" presentation:class="page"/>
          <draw:frame draw:name="Google Shape;304;g3edfef7293b_0_4:notes" presentation:style-name="pr5" draw:text-style-name="P12" draw:layer="layout" svg:width="15.239cm" svg:height="11.429cm" svg:x="1.905cm" svg:y="12.065cm" presentation:class="notes" presentation:placeholder="true" presentation:user-transformed="true">
            <draw:text-box/>
          </draw:frame>
        </presentation:notes>
      </draw:page>
      <draw:page draw:name="Introducing Contracts" draw:style-name="dp1" draw:master-page-name="TITLE_5f_AND_5f_BODY_5f_2_5f_2">
        <draw:frame draw:name="Google Shape;313;p55" presentation:style-name="pr3" draw:text-style-name="P8" draw:layer="layout" svg:width="15.185cm" svg:height="9.489cm" svg:x="1.193cm" svg:y="4.199cm" presentation:class="outline" presentation:user-transformed="true">
          <draw:text-box>
            <text:p text:style-name="P5"><text:span text:style-name="T4"><text:s/></text:span><text:span text:style-name="T4">A spell-checker doesn't give us a table of 500 suggestions. Our cell phones don't tell us the edit distance for the suggestions they make. But just because it doesn't show us the edit distance doesn't mean it's not used! Your cell phone and spell checker uses the edit distance to help pick out the most-likely words to suggestion.</text:span></text:p>
            <text:p text:style-name="P6"><text:span text:style-name="T4">We want to take the output of </text:span><text:span text:style-name="T6">alt-words</text:span><text:span text:style-name="T4"> and </text:span><text:span text:style-name="T9">do something</text:span><text:span text:style-name="T4"> to it, just as spell checkers and cell phones do.</text:span></text:p>
            <text:p text:style-name="P7"><text:span text:style-name="T10"/></text:p>
          </draw:text-box>
        </draw:frame>
        <draw:frame draw:name="Google Shape;314;p55" presentation:style-name="pr4"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315;p55" draw:style-name="gr2" draw:text-style-name="P11" draw:layer="layout" svg:width="7.7cm" svg:height="7.238cm" svg:x="17.035cm" svg:y="4.199cm">
          <draw:image xlink:href="Pictures/10000000000001F4000001D6185C012D52EC78F2.png" xlink:type="simple" xlink:show="embed" xlink:actuate="onLoad">
            <text:p/>
          </draw:image>
        </draw:frame>
        <presentation:notes draw:style-name="dp2">
          <draw:page-thumbnail draw:name="Google Shape;310;g3edfef7293b_0_10:notes" draw:style-name="gr1" draw:layer="layout" svg:width="16.932cm" svg:height="9.524cm" svg:x="1.059cm" svg:y="1.905cm" draw:page-number="3" presentation:class="page"/>
          <draw:frame draw:name="Google Shape;311;g3edfef7293b_0_10:notes" presentation:style-name="pr6" draw:text-style-name="P12" draw:layer="layout" svg:width="15.239cm" svg:height="11.429cm" svg:x="1.905cm" svg:y="12.065cm" presentation:class="notes" presentation:placeholder="true" presentation:user-transformed="true">
            <draw:text-box/>
          </draw:frame>
        </presentation:notes>
      </draw:page>
      <draw:page draw:name="Introducing Contracts" draw:style-name="dp1" draw:master-page-name="TITLE_5f_AND_5f_BODY_5f_2_5f_1_5f_5">
        <draw:frame draw:name="Google Shape;320;p56" presentation:style-name="pr7"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321;p56" presentation:style-name="pr8" draw:text-style-name="P8" draw:layer="layout" svg:width="20.948cm" svg:height="9.489cm" svg:x="3.531cm" svg:y="2.786cm" presentation:class="outline" presentation:user-transformed="true">
          <draw:text-box>
            <text:p text:style-name="P5"><text:span text:style-name="T4">Turn to </text:span><text:span text:style-name="T5"><text:a xlink:href="https://bootstrapworld.org/materials/fall2026/en-us/lessons/programming-spelling-suggestions/pages/sorting-and-trimming.html" xlink:type="simple">Sorting and Trimming Tables</text:a></text:span><text:span text:style-name="T4"><text:s/>and complete the first section: </text:span><text:span text:style-name="T12">Sorting Results</text:span><text:span text:style-name="T4">.</text:span></text:p>
            <text:p text:style-name="P7"><text:span text:style-name="T10"/></text:p>
          </draw:text-box>
        </draw:frame>
        <presentation:notes draw:style-name="dp2">
          <draw:page-thumbnail draw:name="Google Shape;317;g3edfef7293b_0_16:notes" draw:style-name="gr1" draw:layer="layout" svg:width="16.932cm" svg:height="9.524cm" svg:x="1.059cm" svg:y="1.905cm" draw:page-number="4" presentation:class="page"/>
          <draw:frame draw:name="Google Shape;318;g3edfef7293b_0_16:notes" presentation:style-name="pr9" draw:text-style-name="P12" draw:layer="layout" svg:width="15.239cm" svg:height="11.429cm" svg:x="1.905cm" svg:y="12.065cm" presentation:class="notes" presentation:placeholder="true" presentation:user-transformed="true">
            <draw:text-box/>
          </draw:frame>
        </presentation:notes>
      </draw:page>
      <draw:page draw:name="Introducing Contracts" draw:style-name="dp1" draw:master-page-name="TITLE_5f_AND_5f_BODY_5f_2_5f_1">
        <draw:frame draw:name="Google Shape;326;p57" presentation:style-name="pr10"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327;p57" presentation:style-name="pr11" draw:text-style-name="P8" draw:layer="layout" svg:width="21.032cm" svg:height="9.489cm" svg:x="3.602cm" svg:y="2.707cm" presentation:class="outline" presentation:user-transformed="true">
          <draw:text-box>
            <text:list text:style-name="L5">
              <text:list-item>
                <text:p text:style-name="P13"><text:span text:style-name="T4">What did these </text:span><text:span text:style-name="T13">sort</text:span><text:span text:style-name="T4"> expressions do?</text:span></text:p>
              </text:list-item>
              <text:list-item>
                <text:p text:style-name="P13"><text:span text:style-name="T4">What does it mean that the Range of </text:span><text:span text:style-name="T13">sort</text:span><text:span text:style-name="T4"> is Table?</text:span></text:p>
              </text:list-item>
              <text:list-item>
                <text:p text:style-name="P13"><text:span text:style-name="T4">Type </text:span><text:span text:style-name="T6">results</text:span><text:span text:style-name="T4"> and hit "Enter". Did sorting our animals change the value of the table?</text:span></text:p>
              </text:list-item>
            </text:list>
            <text:p text:style-name="P7"><text:span text:style-name="T10"/></text:p>
          </draw:text-box>
        </draw:frame>
        <presentation:notes draw:style-name="dp2">
          <draw:page-thumbnail draw:name="Google Shape;323;g3edfef7293b_0_21:notes" draw:style-name="gr1" draw:layer="layout" svg:width="16.932cm" svg:height="9.524cm" svg:x="1.059cm" svg:y="1.905cm" draw:page-number="5" presentation:class="page"/>
          <draw:frame draw:name="Google Shape;324;g3edfef7293b_0_21:notes" presentation:style-name="pr12" draw:text-style-name="P4" draw:layer="layout" svg:width="15.239cm" svg:height="11.429cm" svg:x="1.905cm" svg:y="12.065cm" presentation:class="notes" presentation:user-transformed="true">
            <draw:text-box>
              <text:list text:style-name="L7">
                <text:list-item>
                  <text:p text:style-name="P14"><text:span text:style-name="T3">What did these </text:span><text:span text:style-name="T14">sort expressions do?</text:span></text:p>
                </text:list-item>
                <text:list-item>
                  <text:p text:style-name="P14"><text:span text:style-name="T15">They took in the results table, the edit-distance column, and true or false... producing a new table, sorted alphabetically    (ascending for true and descending for false)</text:span></text:p>
                </text:list-item>
                <text:list-item>
                  <text:p text:style-name="P14"><text:span text:style-name="T14">What does it mean that the Range of sort is Table?</text:span></text:p>
                </text:list-item>
                <text:list-item>
                  <text:p text:style-name="P14"><text:span text:style-name="T15">The function produces a new table.</text:span></text:p>
                </text:list-item>
                <text:list-item>
                  <text:p text:style-name="P14"><text:span text:style-name="T14">Type results and hit "Enter". Did sorting our animals change the value of the table?</text:span></text:p>
                </text:list-item>
                <text:list-item>
                  <text:p text:style-name="P14"><text:span text:style-name="T15">No. It made a new one.</text:span></text:p>
                </text:list-item>
              </text:list>
              <text:p text:style-name="P3"><text:span text:style-name="T16"/></text:p>
            </draw:text-box>
          </draw:frame>
        </presentation:notes>
      </draw:page>
      <draw:page draw:name="Introducing Contracts" draw:style-name="dp1" draw:master-page-name="TITLE_5f_AND_5f_BODY_5f_2_5f_1">
        <draw:frame draw:name="Google Shape;332;p58" presentation:style-name="pr10"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333;p58" presentation:style-name="pr11" draw:text-style-name="P8" draw:layer="layout" svg:width="21.032cm" svg:height="9.489cm" svg:x="3.602cm" svg:y="2.707cm" presentation:class="outline" presentation:user-transformed="true">
          <draw:text-box>
            <text:p text:style-name="P5"><text:span text:style-name="T4">Let's review what we've learned about Contracts. Every Contract has three parts:</text:span></text:p>
            <text:list text:style-name="L9">
              <text:list-item>
                <text:p text:style-name="P6"><text:span text:style-name="T12">Name</text:span><text:span text:style-name="T4"> -- the name of the function, which we type in whenever we want to use it</text:span></text:p>
              </text:list-item>
              <text:list-item>
                <text:p text:style-name="P5"><text:span text:style-name="T12">Domain</text:span><text:span text:style-name="T4"> -- the type(s) of data we give to the function</text:span></text:p>
              </text:list-item>
              <text:list-item>
                <text:p text:style-name="P5"><text:span text:style-name="T12">Range</text:span><text:span text:style-name="T4"> -- the type of data the function produces</text:span></text:p>
              </text:list-item>
            </text:list>
            <text:p text:style-name="P6"><text:span text:style-name="T4">📌 </text:span><text:span text:style-name="T4">Contracts are the </text:span><text:span text:style-name="T9">instruction manual</text:span><text:span text:style-name="T4"> for functions.</text:span></text:p>
            <text:p text:style-name="P7"><text:span text:style-name="T10"/></text:p>
          </draw:text-box>
        </draw:frame>
        <presentation:notes draw:style-name="dp2">
          <draw:page-thumbnail draw:name="Google Shape;329;g3edfef7293b_0_26:notes" draw:style-name="gr1" draw:layer="layout" svg:width="16.932cm" svg:height="9.524cm" svg:x="1.059cm" svg:y="1.905cm" draw:page-number="6" presentation:class="page"/>
          <draw:frame draw:name="Google Shape;330;g3edfef7293b_0_26:notes" presentation:style-name="pr13" draw:text-style-name="P12" draw:layer="layout" svg:width="15.239cm" svg:height="11.429cm" svg:x="1.905cm" svg:y="12.065cm" presentation:class="notes" presentation:placeholder="true" presentation:user-transformed="true">
            <draw:text-box/>
          </draw:frame>
        </presentation:notes>
      </draw:page>
      <draw:page draw:name="Introducing Contracts" draw:style-name="dp1" draw:master-page-name="TITLE_5f_AND_5f_BODY_5f_2_5f_1_5f_5">
        <draw:frame draw:name="Google Shape;338;p59" presentation:style-name="pr7"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339;p59" presentation:style-name="pr8" draw:text-style-name="P8" draw:layer="layout" svg:width="20.948cm" svg:height="9.489cm" svg:x="3.531cm" svg:y="2.786cm" presentation:class="outline" presentation:user-transformed="true">
          <draw:text-box>
            <text:p text:style-name="P5"><text:span text:style-name="T4">Let's explore the Contract for another function that works with Tables: </text:span><text:span text:style-name="T13">first-n-rows</text:span></text:p>
            <text:list text:style-name="L5">
              <text:list-item>
                <text:p text:style-name="P6"><text:span text:style-name="T4">Complete the second section of </text:span><text:span text:style-name="T5"><text:a xlink:href="https://bootstrapworld.org/materials/fall2026/en-us/lessons/programming-spelling-suggestions/pages/sorting-and-trimming.html" xlink:type="simple">Sorting and Trimming Tables</text:a></text:span><text:span text:style-name="T4">: </text:span><text:span text:style-name="T12">Trimming Results</text:span><text:span text:style-name="T4">.</text:span></text:p>
              </text:list-item>
            </text:list>
            <text:p text:style-name="P7"><text:span text:style-name="T10"/></text:p>
          </draw:text-box>
        </draw:frame>
        <presentation:notes draw:style-name="dp2">
          <draw:page-thumbnail draw:name="Google Shape;335;g3edfef7293b_0_31:notes" draw:style-name="gr1" draw:layer="layout" svg:width="16.932cm" svg:height="9.524cm" svg:x="1.059cm" svg:y="1.905cm" draw:page-number="7" presentation:class="page"/>
          <draw:frame draw:name="Google Shape;336;g3edfef7293b_0_31:notes" presentation:style-name="pr14" draw:text-style-name="P12" draw:layer="layout" svg:width="15.239cm" svg:height="11.429cm" svg:x="1.905cm" svg:y="12.065cm" presentation:class="notes" presentation:placeholder="true" presentation:user-transformed="true">
            <draw:text-box/>
          </draw:frame>
        </presentation:notes>
      </draw:page>
      <draw:page draw:name="Introducing Contracts" draw:style-name="dp1" draw:master-page-name="TITLE_5f_AND_5f_BODY_5f_2_5f_1">
        <draw:frame draw:name="Google Shape;344;p60" presentation:style-name="pr10"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345;p60" presentation:style-name="pr11" draw:text-style-name="P8" draw:layer="layout" svg:width="21.032cm" svg:height="9.489cm" svg:x="3.602cm" svg:y="2.707cm" presentation:class="outline" presentation:user-transformed="true">
          <draw:text-box>
            <text:p text:style-name="P5"><text:span text:style-name="T4">Pyret knows about more than just Numbers, String, Booleans, and Tables! It can also make </text:span><text:span text:style-name="T9">Images</text:span><text:span text:style-name="T4">.</text:span></text:p>
            <text:list text:style-name="L5">
              <text:list-item>
                <text:p text:style-name="P6"><text:span text:style-name="T4">Have some fun with </text:span><text:span text:style-name="T5"><text:a xlink:href="https://bootstrapworld.org/materials/fall2026/en-us/lessons/programming-spelling-suggestions/pages/image-contracts.html" xlink:type="simple">Contracts for Image-Producing Functions</text:a></text:span><text:span text:style-name="T4">.</text:span></text:p>
              </text:list-item>
            </text:list>
            <text:p text:style-name="P7"><text:span text:style-name="T10"/></text:p>
          </draw:text-box>
        </draw:frame>
        <presentation:notes draw:style-name="dp2">
          <draw:page-thumbnail draw:name="Google Shape;341;g3edfef7293b_0_36:notes" draw:style-name="gr1" draw:layer="layout" svg:width="16.932cm" svg:height="9.524cm" svg:x="1.059cm" svg:y="1.905cm" draw:page-number="8" presentation:class="page"/>
          <draw:frame draw:name="Google Shape;342;g3edfef7293b_0_36:notes" presentation:style-name="pr12" draw:text-style-name="P4" draw:layer="layout" svg:width="15.239cm" svg:height="11.429cm" svg:x="1.905cm" svg:y="12.065cm" presentation:class="notes" presentation:user-transformed="true">
            <draw:text-box>
              <text:p text:style-name="P3"><text:span text:style-name="T3">Supporting Diverse Learners</text:span></text:p>
              <text:list text:style-name="L7">
                <text:list-item>
                  <text:p text:style-name="P3"><text:span text:style-name="T2">Image exploration is a low threshold / high-ceiling activity that should be engaging to all students.</text:span></text:p>
                </text:list-item>
                <text:list-item>
                  <text:p text:style-name="P3"><text:span text:style-name="T2">Some students may find ALL of the contracts, but most will not!</text:span></text:p>
                </text:list-item>
                <text:list-item>
                  <text:p text:style-name="P3"><text:span text:style-name="T2">When the first student in your class has successfully used the text function, give directions about which functions to prioritize with the remaining time.</text:span></text:p>
                </text:list-item>
              </text:list>
              <text:p text:style-name="P3"><text:span text:style-name="T2">For a deeper dive into Image and Table contracts, have students work on pages from </text:span><text:span text:style-name="T17"><text:a xlink:href="https://bootstrapworld.org/materials/fall2026/en-us/lessons/contracts-strings-images/index.shtml" xlink:type="simple">Contracts for Strings and Images</text:a></text:span><text:span text:style-name="T18"><text:s/>and </text:span><text:span text:style-name="T17"><text:a xlink:href="https://bootstrapworld.org/materials/fall2026/en-us/lessons/contracts-tables/index.shtml" xlink:type="simple">Contracts for Tables and Rows</text:a></text:span><text:span text:style-name="T18">.</text:span></text:p>
              <text:p text:style-name="P3"><text:span text:style-name="T18">Do not try to keep your students in lock-step. What is important here is for </text:span><text:span text:style-name="T19">everyone to have the opportunity to explore.</text:span></text:p>
              <text:p text:style-name="P3"><text:span text:style-name="T18">Students do </text:span><text:span text:style-name="T20">not</text:span><text:span text:style-name="T18"> need to find all of the contracts on this page in order to complete the lesson or the following pages. If you have to prioritize, make sure students complete the first five (up to and include </text:span><text:span text:style-name="T16">text).</text:span></text:p>
              <text:p text:style-name="P3"><text:span text:style-name="T16"/></text:p>
            </draw:text-box>
          </draw:frame>
        </presentation:notes>
      </draw:page>
      <draw:page draw:name="Introducing Contracts" draw:style-name="dp1" draw:master-page-name="TITLE_5f_AND_5f_BODY_5f_2_5f_1_5f_1">
        <draw:frame draw:name="Google Shape;350;p61" presentation:style-name="pr15"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351;p61" presentation:style-name="pr16" draw:text-style-name="P8" draw:layer="layout" svg:width="21.327cm" svg:height="9.489cm" svg:x="3.26cm" svg:y="2.72cm" presentation:class="outline" presentation:user-transformed="true">
          <draw:text-box>
            <text:list text:style-name="L5">
              <text:list-item>
                <text:p text:style-name="P13"><text:span text:style-name="T13">first-n-rows</text:span><text:span text:style-name="T4"> and </text:span><text:span text:style-name="T6">last-n-rows</text:span><text:span text:style-name="T4"> have exactly the same Domain and Range, but do different things. So do </text:span><text:span text:style-name="T13">circle</text:span><text:span text:style-name="T4"> and </text:span><text:span text:style-name="T13">triangle</text:span><text:span text:style-name="T4">. How is it possible to have the same Domain </text:span><text:span text:style-name="T9">and</text:span><text:span text:style-name="T4"> Range, and behave so differently?</text:span></text:p>
              </text:list-item>
              <text:list-item>
                <text:p text:style-name="P13"><text:span text:style-name="T4">Why did </text:span><text:span text:style-name="T13">sort</text:span><text:span text:style-name="T4"> need more arguments in its Domain than either of the other two?</text:span></text:p>
              </text:list-item>
            </text:list>
            <text:p text:style-name="P7"><text:span text:style-name="T10"/></text:p>
          </draw:text-box>
        </draw:frame>
        <presentation:notes draw:style-name="dp2">
          <draw:page-thumbnail draw:name="Google Shape;347;g3edfef7293b_0_41:notes" draw:style-name="gr1" draw:layer="layout" svg:width="16.932cm" svg:height="9.524cm" svg:x="1.059cm" svg:y="1.905cm" draw:page-number="9" presentation:class="page"/>
          <draw:frame draw:name="Google Shape;348;g3edfef7293b_0_41:notes" presentation:style-name="pr17" draw:text-style-name="P4" draw:layer="layout" svg:width="15.239cm" svg:height="11.429cm" svg:x="1.905cm" svg:y="12.065cm" presentation:class="notes" presentation:user-transformed="true">
            <draw:text-box>
              <text:list text:style-name="L10">
                <text:list-item>
                  <text:p text:style-name="P14"><text:span text:style-name="T14">first-n-rows and last-n-rows have exactly the same Domain and Range, but do different things. So do circle and triangle. How is it possible to have the same Domain </text:span><text:span text:style-name="T21">and</text:span><text:span text:style-name="T14"> Range, and behave so differently?</text:span></text:p>
                </text:list-item>
              </text:list>
              <text:list text:style-name="L7">
                <text:list-item>
                  <text:p text:style-name="P14"><text:span text:style-name="T15">What a function </text:span><text:span text:style-name="T21">needs</text:span><text:span text:style-name="T15"> is not the same as what it </text:span><text:span text:style-name="T21">does</text:span><text:span text:style-name="T15">.</text:span></text:p>
                </text:list-item>
                <text:list-item>
                  <text:p text:style-name="P14"><text:span text:style-name="T14">Why did sort need more arguments in its Domain than either of the other two?</text:span></text:p>
                </text:list-item>
                <text:list-item>
                  <text:p text:style-name="P14"><text:span text:style-name="T15">It needed to know more things!</text:span></text:p>
                </text:list-item>
              </text:list>
              <text:p text:style-name="P3"><text:span text:style-name="T16"/></text:p>
            </draw:text-box>
          </draw:frame>
        </presentation:notes>
      </draw:page>
      <draw:page draw:name="Composing with Circles of Evaluation" draw:style-name="dp1" draw:master-page-name="TITLE_5f_AND_5f_BODY_5f_2">
        <draw:frame draw:name="Google Shape;356;p62" presentation:style-name="pr18" draw:text-style-name="P8" draw:layer="layout" svg:width="20.699cm" svg:height="9.489cm" svg:x="3.578cm" svg:y="2.786cm" presentation:class="outline" presentation:user-transformed="true">
          <draw:text-box>
            <text:list text:style-name="L5">
              <text:list-item>
                <text:p text:style-name="P13"><text:span text:style-name="T4">Your cell phone doesn't show you every possible suggestion: it only shows you the top 3-5.</text:span></text:p>
              </text:list-item>
              <text:list-item>
                <text:p text:style-name="P13"><text:span text:style-name="T4">How do you think the functions you've learned could be used to do the same thing?</text:span></text:p>
              </text:list-item>
              <text:list-item>
                <text:p text:style-name="P13"><text:span text:style-name="T4">Discuss with the other students at your table or nearby.</text:span></text:p>
              </text:list-item>
            </text:list>
            <text:p text:style-name="P7"><text:span text:style-name="T10"/></text:p>
          </draw:text-box>
        </draw:frame>
        <draw:frame draw:name="Google Shape;357;p62" presentation:style-name="pr19" draw:text-style-name="P10" draw:layer="layout" svg:width="21.908cm" svg:height="1.59cm" svg:x="3.356cm" svg:y="0.178cm" presentation:class="title" presentation:user-transformed="true">
          <draw:text-box>
            <text:p text:style-name="P9"><text:span text:style-name="T11">Composing with Circles of Evaluation</text:span></text:p>
          </draw:text-box>
        </draw:frame>
        <presentation:notes draw:style-name="dp2">
          <draw:page-thumbnail draw:name="Google Shape;353;g3edfef7293b_0_46:notes" draw:style-name="gr1" draw:layer="layout" svg:width="16.932cm" svg:height="9.524cm" svg:x="1.059cm" svg:y="1.905cm" draw:page-number="10" presentation:class="page"/>
          <draw:frame draw:name="Google Shape;354;g3edfef7293b_0_46:notes" presentation:style-name="pr20" draw:text-style-name="P4" draw:layer="layout" svg:width="15.239cm" svg:height="11.429cm" svg:x="1.905cm" svg:y="12.065cm" presentation:class="notes" presentation:user-transformed="true">
            <draw:text-box>
              <text:p text:style-name="P3"><text:span text:style-name="T2">Have students share their ideas</text:span></text:p>
              <text:p text:style-name="P3"><text:span text:style-name="T2"/></text:p>
            </draw:text-box>
          </draw:frame>
        </presentation:notes>
      </draw:page>
      <draw:page draw:name="Composing with Circles of Evaluation" draw:style-name="dp1" draw:master-page-name="TITLE_5f_AND_5f_BODY_5f_2">
        <draw:frame draw:name="Google Shape;362;p63" presentation:style-name="pr18" draw:text-style-name="P8" draw:layer="layout" svg:width="23.475cm" svg:height="9.489cm" svg:x="1.081cm" svg:y="4.265cm" presentation:class="outline" presentation:user-transformed="true">
          <draw:text-box>
            <text:p text:style-name="P5"><text:span text:style-name="T4">What if we wanted to sort </text:span><text:span text:style-name="T9">and</text:span><text:span text:style-name="T4"> trim our tables?</text:span></text:p>
            <text:list text:style-name="L5">
              <text:list-item>
                <text:p text:style-name="P6"><text:span text:style-name="T4">By looking at the Range, we know that </text:span><text:span text:style-name="T13">sort</text:span><text:span text:style-name="T4"> produces a Table</text:span></text:p>
              </text:list-item>
            </text:list>
            <text:p text:style-name="P6"><text:span text:style-name="T22">       </text:span><text:span text:style-name="T23"># sort :: (t :: Table, col :: String, ascending :: Boolean) -&gt; Table</text:span></text:p>
            <text:list text:continue-numbering="true" text:style-name="L5">
              <text:list-item>
                <text:p text:style-name="P6"><text:span text:style-name="T4">By looking at the Domain, we know that </text:span><text:span text:style-name="T13">first-n-rows</text:span><text:span text:style-name="T4"> </text:span><text:span text:style-name="T9">consumes</text:span><text:span text:style-name="T4"> a Table</text:span></text:p>
              </text:list-item>
            </text:list>
            <text:p text:style-name="P6"><text:span text:style-name="T22">       </text:span><text:span text:style-name="T23"># first-n-rows :: (t :: Table, num :: Number) -&gt; Table</text:span></text:p>
            <text:p text:style-name="P6"><text:span text:style-name="T9">But how could the </text:span><text:span text:style-name="T24">sort</text:span><text:span text:style-name="T9"> and </text:span><text:span text:style-name="T24">first-n-rows</text:span><text:span text:style-name="T9"> functions work together?</text:span></text:p>
            <text:p text:style-name="P7"><text:span text:style-name="T10"/></text:p>
          </draw:text-box>
        </draw:frame>
        <draw:frame draw:name="Google Shape;363;p63" presentation:style-name="pr19" draw:text-style-name="P10" draw:layer="layout" svg:width="21.908cm" svg:height="1.59cm" svg:x="3.356cm" svg:y="0.178cm" presentation:class="title" presentation:user-transformed="true">
          <draw:text-box>
            <text:p text:style-name="P9"><text:span text:style-name="T11">Composing with Circles of Evaluation</text:span></text:p>
          </draw:text-box>
        </draw:frame>
        <presentation:notes draw:style-name="dp2">
          <draw:page-thumbnail draw:name="Google Shape;359;g3edfef7293b_0_51:notes" draw:style-name="gr1" draw:layer="layout" svg:width="16.932cm" svg:height="9.524cm" svg:x="1.059cm" svg:y="1.905cm" draw:page-number="11" presentation:class="page"/>
          <draw:frame draw:name="Google Shape;360;g3edfef7293b_0_51:notes" presentation:style-name="pr21" draw:text-style-name="P12" draw:layer="layout" svg:width="15.239cm" svg:height="11.429cm" svg:x="1.905cm" svg:y="12.065cm" presentation:class="notes" presentation:placeholder="true" presentation:user-transformed="true">
            <draw:text-box/>
          </draw:frame>
        </presentation:notes>
      </draw:page>
      <draw:page draw:name="Composing with Circles of Evaluation" draw:style-name="dp1" draw:master-page-name="TITLE_5f_AND_5f_BODY_5f_2_5f_1">
        <draw:frame draw:name="Google Shape;368;p64" presentation:style-name="pr10" draw:text-style-name="P10" draw:layer="layout" svg:width="21.908cm" svg:height="1.59cm" svg:x="3.356cm" svg:y="0.178cm" presentation:class="title" presentation:user-transformed="true">
          <draw:text-box>
            <text:p text:style-name="P9"><text:span text:style-name="T11">Composing with Circles of Evaluation</text:span></text:p>
          </draw:text-box>
        </draw:frame>
        <draw:frame draw:name="Google Shape;369;p64" presentation:style-name="pr11" draw:text-style-name="P8" draw:layer="layout" svg:width="21.032cm" svg:height="9.489cm" svg:x="3.602cm" svg:y="2.707cm" presentation:class="outline" presentation:user-transformed="true">
          <draw:text-box>
            <text:p text:style-name="P5"><text:span text:style-name="T25">One way to organize our thoughts is to diagram what we want to do. </text:span><text:span text:style-name="T26">Circles of Evaluation</text:span><text:span text:style-name="T25"> help us think about what we want to do, without worrying about syntax like quotation marks, parentheses, etc. They let us use all our brains for </text:span><text:span text:style-name="T27">thinking</text:span><text:span text:style-name="T25">, before we use them for </text:span><text:span text:style-name="T27">coding</text:span><text:span text:style-name="T25">.</text:span></text:p>
            <text:p text:style-name="P6"><text:span text:style-name="T25">The rules are simple:</text:span></text:p>
            <text:p text:style-name="P6"><text:span text:style-name="T25">(1) Every Circle of Evaluation must have one -- and only one! -- function, written at the top.</text:span></text:p>
            <text:p text:style-name="P6"><text:span text:style-name="T25">(2) The arguments of the function are written left-to-right, in the middle of the Circle.</text:span></text:p>
            <text:list text:style-name="L11">
              <text:list-item>
                <text:p text:style-name="P6"><text:span text:style-name="T25">Values like Numbers, String, and Booleans are still written by themselves. It’s only when we want to </text:span><text:span text:style-name="T27">use a function</text:span><text:span text:style-name="T25"> that we need to draw a nested Circle.</text:span></text:p>
              </text:list-item>
            </text:list>
            <text:p text:style-name="P6"><text:span text:style-name="T25">(3) Circles can contain other Circles!</text:span></text:p>
            <text:p text:style-name="P7"><text:span text:style-name="T10"/></text:p>
          </draw:text-box>
        </draw:frame>
        <presentation:notes draw:style-name="dp2">
          <draw:page-thumbnail draw:name="Google Shape;365;g3edfef7293b_0_56:notes" draw:style-name="gr1" draw:layer="layout" svg:width="16.932cm" svg:height="9.524cm" svg:x="1.059cm" svg:y="1.905cm" draw:page-number="12" presentation:class="page"/>
          <draw:frame draw:name="Google Shape;366;g3edfef7293b_0_56:notes" presentation:style-name="pr22" draw:text-style-name="P12" draw:layer="layout" svg:width="15.239cm" svg:height="11.429cm" svg:x="1.905cm" svg:y="12.065cm" presentation:class="notes" presentation:placeholder="true" presentation:user-transformed="true">
            <draw:text-box/>
          </draw:frame>
        </presentation:notes>
      </draw:page>
      <draw:page draw:name="Composing with Circles of Evaluation" draw:style-name="dp1" draw:master-page-name="TITLE_5f_AND_5f_BODY_5f_2_5f_1">
        <draw:frame draw:name="Google Shape;374;p65" presentation:style-name="pr10" draw:text-style-name="P10" draw:layer="layout" svg:width="21.908cm" svg:height="1.59cm" svg:x="3.356cm" svg:y="0.178cm" presentation:class="title" presentation:user-transformed="true">
          <draw:text-box>
            <text:p text:style-name="P9"><text:span text:style-name="T11">Composing with Circles of Evaluation</text:span></text:p>
          </draw:text-box>
        </draw:frame>
        <draw:frame draw:name="Google Shape;375;p65" presentation:style-name="pr11" draw:text-style-name="P8" draw:layer="layout" svg:width="21.032cm" svg:height="9.489cm" svg:x="3.602cm" svg:y="2.707cm" presentation:class="outline" presentation:user-transformed="true">
          <draw:text-box>
            <text:list text:style-name="L5">
              <text:list-item>
                <text:p text:style-name="P13"><text:span text:style-name="T4">Suppose we want to see the top 5 results of </text:span><text:span text:style-name="T6">alt-words</text:span><text:span text:style-name="T4">, sorted by increasing edit-distance.</text:span></text:p>
              </text:list-item>
              <text:list-item>
                <text:p text:style-name="P13"><text:span text:style-name="T4">Turn to </text:span><text:span text:style-name="T5"><text:a xlink:href="https://bootstrapworld.org/materials/fall2026/en-us/lessons/programming-spelling-suggestions/pages/composing-coe.html" xlink:type="simple">Composing with Circles of Evaluation</text:a></text:span><text:span text:style-name="T4"><text:s/>and complete the Notice and Wonder section.</text:span></text:p>
              </text:list-item>
            </text:list>
            <text:p text:style-name="P7"><text:span text:style-name="T10"/></text:p>
          </draw:text-box>
        </draw:frame>
        <presentation:notes draw:style-name="dp2">
          <draw:page-thumbnail draw:name="Google Shape;371;g3edfef7293b_0_61:notes" draw:style-name="gr1" draw:layer="layout" svg:width="16.932cm" svg:height="9.524cm" svg:x="1.059cm" svg:y="1.905cm" draw:page-number="13" presentation:class="page"/>
          <draw:frame draw:name="Google Shape;372;g3edfef7293b_0_61:notes" presentation:style-name="pr23" draw:text-style-name="P12" draw:layer="layout" svg:width="15.239cm" svg:height="11.429cm" svg:x="1.905cm" svg:y="12.065cm" presentation:class="notes" presentation:placeholder="true" presentation:user-transformed="true">
            <draw:text-box/>
          </draw:frame>
        </presentation:notes>
      </draw:page>
      <draw:page draw:name="Composing with Circles of Evaluation" draw:style-name="dp1" draw:master-page-name="TITLE_5f_AND_5f_BODY_5f_2_5f_1">
        <draw:frame draw:name="Google Shape;380;p66" presentation:style-name="pr10" draw:text-style-name="P10" draw:layer="layout" svg:width="21.908cm" svg:height="1.59cm" svg:x="3.356cm" svg:y="0.178cm" presentation:class="title" presentation:user-transformed="true">
          <draw:text-box>
            <text:p text:style-name="P9"><text:span text:style-name="T11">Composing with Circles of Evaluation</text:span></text:p>
          </draw:text-box>
        </draw:frame>
        <draw:frame draw:name="Google Shape;381;p66" presentation:style-name="pr11" draw:text-style-name="P8" draw:layer="layout" svg:width="21.032cm" svg:height="9.489cm" svg:x="3.602cm" svg:y="2.707cm" presentation:class="outline" presentation:user-transformed="true">
          <draw:text-box>
            <text:p text:style-name="P5"><text:span text:style-name="T9">Circles of Evaluation let us see the structure.</text:span></text:p>
            <text:p text:style-name="P6"><text:span text:style-name="T4">What do you Notice? What do you Wonder?</text:span></text:p>
            <text:p text:style-name="P7"><text:span text:style-name="T10"/></text:p>
          </draw:text-box>
        </draw:frame>
        <draw:frame draw:name="Google Shape;382;p66" draw:style-name="gr2" draw:text-style-name="P11" draw:layer="layout" svg:width="23.124cm" svg:height="6.306cm" svg:x="1.138cm" svg:y="5.791cm">
          <draw:image xlink:href="Pictures/100000000000074E000001FED3F9C213CE87F15E.png" xlink:type="simple" xlink:show="embed" xlink:actuate="onLoad">
            <text:p/>
          </draw:image>
        </draw:frame>
        <presentation:notes draw:style-name="dp2">
          <draw:page-thumbnail draw:name="Google Shape;377;g3edfef7293b_0_66:notes" draw:style-name="gr1" draw:layer="layout" svg:width="16.932cm" svg:height="9.524cm" svg:x="1.059cm" svg:y="1.905cm" draw:page-number="14" presentation:class="page"/>
          <draw:frame draw:name="Google Shape;378;g3edfef7293b_0_66:notes" presentation:style-name="pr24" draw:text-style-name="P12" draw:layer="layout" svg:width="15.239cm" svg:height="11.429cm" svg:x="1.905cm" svg:y="12.065cm" presentation:class="notes" presentation:placeholder="true" presentation:user-transformed="true">
            <draw:text-box/>
          </draw:frame>
        </presentation:notes>
      </draw:page>
      <draw:page draw:name="Composing with Circles of Evaluation" draw:style-name="dp1" draw:master-page-name="TITLE_5f_AND_5f_BODY_5f_2_5f_1">
        <draw:frame draw:name="Google Shape;387;p67" presentation:style-name="pr10" draw:text-style-name="P10" draw:layer="layout" svg:width="21.908cm" svg:height="1.59cm" svg:x="3.356cm" svg:y="0.178cm" presentation:class="title" presentation:user-transformed="true">
          <draw:text-box>
            <text:p text:style-name="P9"><text:span text:style-name="T11">Composing with Circles of Evaluation</text:span></text:p>
          </draw:text-box>
        </draw:frame>
        <draw:frame draw:name="Google Shape;388;p67" presentation:style-name="pr11" draw:text-style-name="P8" draw:layer="layout" svg:width="21.032cm" svg:height="9.489cm" svg:x="3.602cm" svg:y="2.707cm" presentation:class="outline" presentation:user-transformed="true">
          <draw:text-box>
            <text:p text:style-name="P5"><text:span text:style-name="T4"/></text:p>
            <text:p text:style-name="P6"><text:span text:style-name="T4">To convert a Circle of Evaluation into code, we start at the outside and work our way in. After each function, we write a pair of parentheses, and then convert each argument inside the Circle.</text:span></text:p>
            <text:list text:style-name="L5">
              <text:list-item>
                <text:p text:style-name="P6"><text:span text:style-name="T4">Complete </text:span><text:span text:style-name="T5"><text:a xlink:href="https://bootstrapworld.org/materials/fall2026/en-us/lessons/programming-spelling-suggestions/pages/composing-coe.html" xlink:type="simple">Composing with Circles of Evaluation</text:a></text:span><text:span text:style-name="T4">.</text:span></text:p>
              </text:list-item>
            </text:list>
            <text:p text:style-name="P7"><text:span text:style-name="T10"/></text:p>
          </draw:text-box>
        </draw:frame>
        <draw:frame draw:name="Google Shape;389;p67" draw:style-name="gr2" draw:text-style-name="P11" draw:layer="layout" svg:width="24.259cm" svg:height="1.59cm" svg:x="0.749cm" svg:y="9.316cm">
          <draw:image xlink:href="Pictures/10000201000006320000006803744EA150FB94F1.png" xlink:type="simple" xlink:show="embed" xlink:actuate="onLoad">
            <text:p/>
          </draw:image>
        </draw:frame>
        <presentation:notes draw:style-name="dp2">
          <draw:page-thumbnail draw:name="Google Shape;384;g3edfef7293b_0_72:notes" draw:style-name="gr1" draw:layer="layout" svg:width="16.932cm" svg:height="9.524cm" svg:x="1.059cm" svg:y="1.905cm" draw:page-number="15" presentation:class="page"/>
          <draw:frame draw:name="Google Shape;385;g3edfef7293b_0_72:notes" presentation:style-name="pr12" draw:text-style-name="P4" draw:layer="layout" svg:width="15.239cm" svg:height="11.429cm" svg:x="1.905cm" svg:y="12.065cm" presentation:class="notes" presentation:user-transformed="true">
            <draw:text-box>
              <text:list text:style-name="L7">
                <text:list-item>
                  <text:p text:style-name="P14"><text:span text:style-name="T2">There are multiple solutions to the bottom half of this page! Press your students to come up with both.</text:span></text:p>
                </text:list-item>
                <text:list-item>
                  <text:p text:style-name="P14"><text:span text:style-name="T2">Both </text:span><text:span text:style-name="T17"><text:a xlink:href="https://bootstrapworld.org/materials/fall2026/en-us/lessons/contracts-strings-images/index.shtml" xlink:type="simple">Contracts for Strings and Images</text:a></text:span><text:span text:style-name="T18"><text:s/>and </text:span><text:span text:style-name="T17"><text:a xlink:href="https://bootstrapworld.org/materials/fall2026/en-us/lessons/contracts-tables/index.shtml" xlink:type="simple">Contracts for Tables and Rows</text:a></text:span><text:span text:style-name="T18"><text:s/>include worksheets to help students practice composing functions using the Circles of Evaluation.</text:span></text:p>
                </text:list-item>
                <text:list-item>
                  <text:p text:style-name="P14"><text:span text:style-name="T18">For a more project-based approach that's suitable for a CS or Math class, teach </text:span><text:span text:style-name="T17"><text:a xlink:href="https://bootstrapworld.org/materials/fall2026/en-us/lessons/transform-compose-images/index.shtml" xlink:type="simple">Transforming and Composing Images</text:a></text:span><text:span text:style-name="T18"><text:s/>and have students tackle </text:span><text:span text:style-name="T17"><text:a xlink:href="https://bootstrapworld.org/materials/fall2026/en-us/lessons/project-logo/index.shtml" xlink:type="simple">Project: Create Your Own Logo</text:a></text:span><text:span text:style-name="T18"><text:s/>or </text:span><text:span text:style-name="T17"><text:a xlink:href="https://bootstrapworld.org/materials/fall2026/en-us/lessons/project-flags/index.shtml" xlink:type="simple">Project: Make a Flag</text:a></text:span><text:span text:style-name="T18">.</text:span></text:p>
                </text:list-item>
              </text:list>
              <text:p text:style-name="P3"><text:span text:style-name="T18"/></text:p>
            </draw:text-box>
          </draw:frame>
        </presentation:notes>
      </draw:page>
      <draw:page draw:name="Composing with Circles of Evaluation" draw:style-name="dp1" draw:master-page-name="TITLE_5f_AND_5f_BODY_5f_2_5f_1_5f_1">
        <draw:frame draw:name="Google Shape;394;p68" presentation:style-name="pr15" draw:text-style-name="P10" draw:layer="layout" svg:width="21.908cm" svg:height="1.59cm" svg:x="3.356cm" svg:y="0.178cm" presentation:class="title" presentation:user-transformed="true">
          <draw:text-box>
            <text:p text:style-name="P9"><text:span text:style-name="T11">Composing with Circles of Evaluation</text:span></text:p>
          </draw:text-box>
        </draw:frame>
        <draw:frame draw:name="Google Shape;395;p68" presentation:style-name="pr16" draw:text-style-name="P8" draw:layer="layout" svg:width="21.327cm" svg:height="9.489cm" svg:x="3.26cm" svg:y="2.72cm" presentation:class="outline" presentation:user-transformed="true">
          <draw:text-box>
            <text:p text:style-name="P5"><text:span text:style-name="T4">Why might it be useful to separate the </text:span><text:span text:style-name="T9">thinking</text:span><text:span text:style-name="T4"> and </text:span><text:span text:style-name="T9">coding</text:span><text:span text:style-name="T4"> steps? Why not just do them at the same time, all the time?</text:span></text:p>
            <text:p text:style-name="P7"><text:span text:style-name="T10"/></text:p>
          </draw:text-box>
        </draw:frame>
        <presentation:notes draw:style-name="dp2">
          <draw:page-thumbnail draw:name="Google Shape;391;g3edfef7293b_0_78:notes" draw:style-name="gr1" draw:layer="layout" svg:width="16.932cm" svg:height="9.524cm" svg:x="1.059cm" svg:y="1.905cm" draw:page-number="16" presentation:class="page"/>
          <draw:frame draw:name="Google Shape;392;g3edfef7293b_0_78:notes" presentation:style-name="pr17" draw:text-style-name="P4" draw:layer="layout" svg:width="15.239cm" svg:height="11.429cm" svg:x="1.905cm" svg:y="12.065cm" presentation:class="notes" presentation:user-transformed="true">
            <draw:text-box>
              <text:list text:style-name="L7">
                <text:list-item>
                  <text:p text:style-name="P14"><text:span text:style-name="T3">Why might it be useful to separate the </text:span><text:span text:style-name="T28">thinking</text:span><text:span text:style-name="T3"> and </text:span><text:span text:style-name="T28">coding</text:span><text:span text:style-name="T3"> steps? Why not just do them at the same time, all the time?</text:span></text:p>
                </text:list-item>
              </text:list>
              <text:p text:style-name="P3"><text:span text:style-name="T2"/></text:p>
            </draw:text-box>
          </draw:frame>
        </presentation:notes>
      </draw:page>
      <draw:page draw:name="Data Visualization" draw:style-name="dp1" draw:master-page-name="TITLE_5f_AND_5f_BODY_5f_2">
        <draw:frame draw:name="Google Shape;400;p69" presentation:style-name="pr18" draw:text-style-name="P8" draw:layer="layout" svg:width="20.699cm" svg:height="9.489cm" svg:x="3.578cm" svg:y="2.786cm" presentation:class="outline" presentation:user-transformed="true">
          <draw:text-box>
            <text:p text:style-name="P5"><text:span text:style-name="T4">There were only a few suggestions with an </text:span><text:span text:style-name="T6">edit-distance</text:span><text:span text:style-name="T4"> of 1, but more with distances of 2, 3, and 4. As </text:span><text:span text:style-name="T6">edit-distance</text:span><text:span text:style-name="T4"> increases, the number of suggestions increases, too.</text:span></text:p>
            <text:list text:style-name="L5">
              <text:list-item>
                <text:p text:style-name="P6"><text:span text:style-name="T4">But does it increase by the same amount each time?</text:span></text:p>
              </text:list-item>
              <text:list-item>
                <text:p text:style-name="P5"><text:span text:style-name="T4">How could you communicate this growth to someone else, without making them scan the whole table?</text:span></text:p>
              </text:list-item>
            </text:list>
            <text:p text:style-name="P7"><text:span text:style-name="T10"/></text:p>
          </draw:text-box>
        </draw:frame>
        <draw:frame draw:name="Google Shape;401;p69" presentation:style-name="pr19" draw:text-style-name="P10" draw:layer="layout" svg:width="21.908cm" svg:height="1.59cm" svg:x="3.356cm" svg:y="0.178cm" presentation:class="title" presentation:user-transformed="true">
          <draw:text-box>
            <text:p text:style-name="P9"><text:span text:style-name="T11">Data Visualization</text:span></text:p>
          </draw:text-box>
        </draw:frame>
        <presentation:notes draw:style-name="dp2">
          <draw:page-thumbnail draw:name="Google Shape;397;g3edfef7293b_0_83:notes" draw:style-name="gr1" draw:layer="layout" svg:width="16.932cm" svg:height="9.524cm" svg:x="1.059cm" svg:y="1.905cm" draw:page-number="17" presentation:class="page"/>
          <draw:frame draw:name="Google Shape;398;g3edfef7293b_0_83:notes" presentation:style-name="pr20" draw:text-style-name="P4" draw:layer="layout" svg:width="15.239cm" svg:height="11.429cm" svg:x="1.905cm" svg:y="12.065cm" presentation:class="notes" presentation:user-transformed="true">
            <draw:text-box>
              <text:list text:style-name="L7">
                <text:list-item>
                  <text:p text:style-name="P14"><text:span text:style-name="T3">But does it increase by the same amount each time?</text:span></text:p>
                </text:list-item>
                <text:list-item>
                  <text:p text:style-name="P14"><text:span text:style-name="T29">No! It grows by larger amounts for each </text:span><text:span text:style-name="T30">edit-distance!</text:span></text:p>
                </text:list-item>
                <text:list-item>
                  <text:p text:style-name="P14"><text:span text:style-name="T30">It's almost exponentially larger</text:span></text:p>
                </text:list-item>
                <text:list-item>
                  <text:p text:style-name="P14"><text:span text:style-name="T31">How could you communicate this growth to someone else, without making them scan the whole table?</text:span></text:p>
                </text:list-item>
                <text:list-item>
                  <text:p text:style-name="P14"><text:span text:style-name="T30">You could count the number of suggestions for each edit-distance</text:span></text:p>
                </text:list-item>
                <text:list-item>
                  <text:p text:style-name="P14"><text:span text:style-name="T30">You could make a chart</text:span></text:p>
                </text:list-item>
              </text:list>
              <text:p text:style-name="P3"><text:span text:style-name="T32"/></text:p>
            </draw:text-box>
          </draw:frame>
        </presentation:notes>
      </draw:page>
      <draw:page draw:name="Data Visualization" draw:style-name="dp1" draw:master-page-name="TITLE_5f_AND_5f_BODY_5f_2_5f_1_5f_5">
        <draw:frame draw:name="Google Shape;406;p70" presentation:style-name="pr7" draw:text-style-name="P10" draw:layer="layout" svg:width="21.908cm" svg:height="1.59cm" svg:x="3.356cm" svg:y="0.178cm" presentation:class="title" presentation:user-transformed="true">
          <draw:text-box>
            <text:p text:style-name="P9"><text:span text:style-name="T11">Data Visualization</text:span></text:p>
          </draw:text-box>
        </draw:frame>
        <draw:frame draw:name="Google Shape;407;p70" presentation:style-name="pr8" draw:text-style-name="P8" draw:layer="layout" svg:width="20.948cm" svg:height="9.489cm" svg:x="3.531cm" svg:y="2.786cm" presentation:class="outline" presentation:user-transformed="true">
          <draw:text-box>
            <text:list text:style-name="L5">
              <text:list-item>
                <text:p text:style-name="P13"><text:span text:style-name="T4">Complete the first section of </text:span><text:span text:style-name="T5"><text:a xlink:href="https://bootstrapworld.org/materials/fall2026/en-us/lessons/programming-spelling-suggestions/pages/visualizing.html" xlink:type="simple">Data Visualization for Tables</text:a></text:span></text:p>
              </text:list-item>
            </text:list>
            <text:p text:style-name="P7"><text:span text:style-name="T10"/></text:p>
          </draw:text-box>
        </draw:frame>
        <presentation:notes draw:style-name="dp2">
          <draw:page-thumbnail draw:name="Google Shape;403;g3edfef7293b_0_88:notes" draw:style-name="gr1" draw:layer="layout" svg:width="16.932cm" svg:height="9.524cm" svg:x="1.059cm" svg:y="1.905cm" draw:page-number="18" presentation:class="page"/>
          <draw:frame draw:name="Google Shape;404;g3edfef7293b_0_88:notes" presentation:style-name="pr25" draw:text-style-name="P12" draw:layer="layout" svg:width="15.239cm" svg:height="11.429cm" svg:x="1.905cm" svg:y="12.065cm" presentation:class="notes" presentation:placeholder="true" presentation:user-transformed="true">
            <draw:text-box/>
          </draw:frame>
        </presentation:notes>
      </draw:page>
      <draw:page draw:name="Data Visualization" draw:style-name="dp1" draw:master-page-name="TITLE_5f_AND_5f_BODY_5f_2_5f_1">
        <draw:frame draw:name="Google Shape;412;p71" presentation:style-name="pr10" draw:text-style-name="P10" draw:layer="layout" svg:width="21.908cm" svg:height="1.59cm" svg:x="3.356cm" svg:y="0.178cm" presentation:class="title" presentation:user-transformed="true">
          <draw:text-box>
            <text:p text:style-name="P9"><text:span text:style-name="T11">Data Visualization</text:span></text:p>
          </draw:text-box>
        </draw:frame>
        <draw:frame draw:name="Google Shape;413;p71" presentation:style-name="pr11" draw:text-style-name="P8" draw:layer="layout" svg:width="21.032cm" svg:height="9.489cm" svg:x="3.602cm" svg:y="2.707cm" presentation:class="outline" presentation:user-transformed="true">
          <draw:text-box>
            <text:p text:style-name="P5"><text:span text:style-name="T4">The </text:span><text:span text:style-name="T13">count</text:span><text:span text:style-name="T4"> function produces a frequency table, showing how often a suggested word has an </text:span><text:span text:style-name="T6">edit-distance</text:span><text:span text:style-name="T4"> of 1, 2, 3, and so on.</text:span></text:p>
            <text:list text:style-name="L5">
              <text:list-item>
                <text:p text:style-name="P6"><text:span text:style-name="T4">How is our bar chart connected to our frequency table?</text:span></text:p>
              </text:list-item>
              <text:list-item>
                <text:p text:style-name="P5"><text:span text:style-name="T4">Could you make a bar chart of the </text:span><text:span text:style-name="T9">first 200 suggestions</text:span><text:span text:style-name="T4"> in your </text:span><text:span text:style-name="T6">results</text:span><text:span text:style-name="T4"> table?</text:span></text:p>
              </text:list-item>
            </text:list>
            <text:p text:style-name="P7"><text:span text:style-name="T10"/></text:p>
          </draw:text-box>
        </draw:frame>
        <presentation:notes draw:style-name="dp2">
          <draw:page-thumbnail draw:name="Google Shape;409;g3edfef7293b_0_93:notes" draw:style-name="gr1" draw:layer="layout" svg:width="16.932cm" svg:height="9.524cm" svg:x="1.059cm" svg:y="1.905cm" draw:page-number="19" presentation:class="page"/>
          <draw:frame draw:name="Google Shape;410;g3edfef7293b_0_93:notes" presentation:style-name="pr12" draw:text-style-name="P4" draw:layer="layout" svg:width="15.239cm" svg:height="11.429cm" svg:x="1.905cm" svg:y="12.065cm" presentation:class="notes" presentation:user-transformed="true">
            <draw:text-box>
              <text:list text:style-name="L7">
                <text:list-item>
                  <text:p text:style-name="P14"><text:span text:style-name="T3">How is our bar chart connected to our frequency table?</text:span></text:p>
                </text:list-item>
                <text:list-item>
                  <text:p text:style-name="P14"><text:span text:style-name="T29">The bars are the same height as the numbers in that table</text:span></text:p>
                </text:list-item>
                <text:list-item>
                  <text:p text:style-name="P14"><text:span text:style-name="T3">Could you make a bar chart of the </text:span><text:span text:style-name="T28">first 200 suggestions</text:span><text:span text:style-name="T3"> in your </text:span><text:span text:style-name="T31">results table?</text:span></text:p>
                </text:list-item>
                <text:list-item>
                  <text:p text:style-name="P14"><text:span text:style-name="T30">Yes! We could diagram it using the Circle of Evaluation, with one circle for trimming and another for the bar chart</text:span></text:p>
                </text:list-item>
              </text:list>
              <text:p text:style-name="P3"><text:span text:style-name="T32"/></text:p>
            </draw:text-box>
          </draw:frame>
        </presentation:notes>
      </draw:page>
      <draw:page draw:name="Data Visualization" draw:style-name="dp1" draw:master-page-name="TITLE_5f_AND_5f_BODY_5f_2_5f_1">
        <draw:frame draw:name="Google Shape;418;p72" presentation:style-name="pr10" draw:text-style-name="P10" draw:layer="layout" svg:width="21.908cm" svg:height="1.59cm" svg:x="3.356cm" svg:y="0.178cm" presentation:class="title" presentation:user-transformed="true">
          <draw:text-box>
            <text:p text:style-name="P9"><text:span text:style-name="T11">Data Visualization</text:span></text:p>
          </draw:text-box>
        </draw:frame>
        <draw:frame draw:name="Google Shape;419;p72" presentation:style-name="pr11" draw:text-style-name="P8" draw:layer="layout" svg:width="21.032cm" svg:height="9.489cm" svg:x="3.602cm" svg:y="2.707cm" presentation:class="outline" presentation:user-transformed="true">
          <draw:text-box>
            <text:p text:style-name="P5"><text:span text:style-name="T4">Here's the Circle of Evaluation for our bar chart, showing only the first 200 suggestions:</text:span></text:p>
            <text:p text:style-name="P6"><text:span text:style-name="T4"/></text:p>
            <text:p text:style-name="P6"><text:span text:style-name="T4"/></text:p>
            <text:p text:style-name="P6"><text:span text:style-name="T4"/></text:p>
            <text:p text:style-name="P6"><text:span text:style-name="T4">What will </text:span><text:span text:style-name="T9">this</text:span><text:span text:style-name="T4"> Circle of Evaluation do? </text:span></text:p>
            <text:p text:style-name="P7"><text:span text:style-name="T10"/></text:p>
          </draw:text-box>
        </draw:frame>
        <draw:frame draw:name="Google Shape;420;p72" draw:style-name="gr2" draw:text-style-name="P11" draw:layer="layout" svg:width="9.704cm" svg:height="3.403cm" svg:x="7.711cm" svg:y="4.248cm">
          <draw:image xlink:href="Pictures/10000201000001F0000000AE693991E4675B1B79.png" xlink:type="simple" xlink:show="embed" xlink:actuate="onLoad">
            <text:p/>
          </draw:image>
        </draw:frame>
        <draw:frame draw:name="Google Shape;421;p72" draw:style-name="gr2" draw:text-style-name="P11" draw:layer="layout" svg:width="15.551cm" svg:height="4.168cm" svg:x="4.924cm" svg:y="9.554cm">
          <draw:image xlink:href="Pictures/100002010000035A000000E6192C484CACC44C00.png" xlink:type="simple" xlink:show="embed" xlink:actuate="onLoad">
            <text:p/>
          </draw:image>
        </draw:frame>
        <presentation:notes draw:style-name="dp2">
          <draw:page-thumbnail draw:name="Google Shape;415;g3edfef7293b_0_98:notes" draw:style-name="gr1" draw:layer="layout" svg:width="16.932cm" svg:height="9.524cm" svg:x="1.059cm" svg:y="1.905cm" draw:page-number="20" presentation:class="page"/>
          <draw:frame draw:name="Google Shape;416;g3edfef7293b_0_98:notes" presentation:style-name="pr26" draw:text-style-name="P12" draw:layer="layout" svg:width="15.239cm" svg:height="11.429cm" svg:x="1.905cm" svg:y="12.065cm" presentation:class="notes" presentation:placeholder="true" presentation:user-transformed="true">
            <draw:text-box/>
          </draw:frame>
        </presentation:notes>
      </draw:page>
      <draw:page draw:name="Data Visualization" draw:style-name="dp1" draw:master-page-name="TITLE_5f_AND_5f_BODY_5f_2_5f_1_5f_4">
        <draw:frame draw:name="Google Shape;426;p73" presentation:style-name="pr27" draw:text-style-name="P10" draw:layer="layout" svg:width="21.908cm" svg:height="1.59cm" svg:x="3.356cm" svg:y="0.178cm" presentation:class="title" presentation:user-transformed="true">
          <draw:text-box>
            <text:p text:style-name="P9"><text:span text:style-name="T11">Data Visualization</text:span></text:p>
          </draw:text-box>
        </draw:frame>
        <draw:frame draw:name="Google Shape;427;p73" presentation:style-name="pr28" draw:text-style-name="P8" draw:layer="layout" svg:width="15.074cm" svg:height="9.489cm" svg:x="1.167cm" svg:y="4.269cm" presentation:class="outline" presentation:user-transformed="true">
          <draw:text-box>
            <text:p text:style-name="P5"><text:span text:style-name="T4">A cell phone or spell-checker doesn't show you rows and columns - </text:span><text:span text:style-name="T9">it just shows you the words!</text:span><text:span text:style-name="T4"> Once a spell checker gives us a table full of words and edit-distances....how do we get the words </text:span><text:span text:style-name="T9">out?</text:span></text:p>
            <text:list text:style-name="L5">
              <text:list-item>
                <text:p text:style-name="P6"><text:span text:style-name="T4">Complete </text:span><text:span text:style-name="T5"><text:a xlink:href="https://bootstrapworld.org/materials/fall2026/en-us/lessons/programming-spelling-suggestions/pages/visualizing.html" xlink:type="simple">Data Visualization for Tables</text:a></text:span></text:p>
              </text:list-item>
            </text:list>
            <text:p text:style-name="P7"><text:span text:style-name="T10"/></text:p>
          </draw:text-box>
        </draw:frame>
        <draw:frame draw:name="Google Shape;428;p73" draw:style-name="gr2" draw:text-style-name="P11" draw:layer="layout" svg:width="7.588cm" svg:height="7.102cm" svg:x="16.777cm" svg:y="4.858cm">
          <draw:image xlink:href="Pictures/10000000000001F4000001D47B2ED1637375ED90.png" xlink:type="simple" xlink:show="embed" xlink:actuate="onLoad">
            <text:p/>
          </draw:image>
        </draw:frame>
        <presentation:notes draw:style-name="dp2">
          <draw:page-thumbnail draw:name="Google Shape;423;g3edfef7293b_0_105:notes" draw:style-name="gr1" draw:layer="layout" svg:width="16.932cm" svg:height="9.524cm" svg:x="1.059cm" svg:y="1.905cm" draw:page-number="21" presentation:class="page"/>
          <draw:frame draw:name="Google Shape;424;g3edfef7293b_0_105:notes" presentation:style-name="pr29" draw:text-style-name="P4" draw:layer="layout" svg:width="15.239cm" svg:height="11.429cm" svg:x="1.905cm" svg:y="12.065cm" presentation:class="notes" presentation:user-transformed="true">
            <draw:text-box>
              <text:p text:style-name="P3"><text:span text:style-name="T2">This lesson is not intended to teacher students how to read or interpret data visualizations! If you're blending this material into a Data Science or Math class where various visualizations are part of your learning goals, we highly recommend exploring our </text:span><text:span text:style-name="T17"><text:a xlink:href="https://bootstrapworld.org/materials/fall2026/en-us/courses/data-science/index.shtml" xlink:type="simple">Data Science</text:a></text:span><text:span text:style-name="T18"><text:s/>course.</text:span></text:p>
              <text:p text:style-name="P3"><text:span text:style-name="T18"/></text:p>
            </draw:text-box>
          </draw:frame>
        </presentation:notes>
      </draw:page>
      <draw:page draw:name="Data Visualization" draw:style-name="dp1" draw:master-page-name="TITLE_5f_AND_5f_BODY_5f_2_5f_1">
        <draw:frame draw:name="Google Shape;433;p74" presentation:style-name="pr10" draw:text-style-name="P10" draw:layer="layout" svg:width="21.908cm" svg:height="1.59cm" svg:x="3.356cm" svg:y="0.178cm" presentation:class="title" presentation:user-transformed="true">
          <draw:text-box>
            <text:p text:style-name="P9"><text:span text:style-name="T11">Data Visualization</text:span></text:p>
          </draw:text-box>
        </draw:frame>
        <draw:frame draw:name="Google Shape;434;p74" presentation:style-name="pr11" draw:text-style-name="P8" draw:layer="layout" svg:width="21.032cm" svg:height="9.489cm" svg:x="3.602cm" svg:y="2.707cm" presentation:class="outline" presentation:user-transformed="true">
          <draw:text-box>
            <text:p text:style-name="P5"><text:span text:style-name="T33">Row accessors</text:span><text:span text:style-name="T4"> allow us to extract data from specific cells of our table by specifying the row number and column title.</text:span></text:p>
            <text:list text:style-name="L5">
              <text:list-item>
                <text:p text:style-name="P6"><text:span text:style-name="T4">What row number do we use to extract data from the first row of our table?</text:span></text:p>
              </text:list-item>
              <text:list-item>
                <text:p text:style-name="P5"><text:span text:style-name="T4">What code did you write to extract the 75th suggested word from the table?</text:span></text:p>
              </text:list-item>
              <text:list-item>
                <text:p text:style-name="P5"><text:span text:style-name="T4">What was the 75th suggested word?</text:span></text:p>
              </text:list-item>
            </text:list>
            <text:p text:style-name="P7"><text:span text:style-name="T10"/></text:p>
          </draw:text-box>
        </draw:frame>
        <presentation:notes draw:style-name="dp2">
          <draw:page-thumbnail draw:name="Google Shape;430;g3edfef7293b_0_111:notes" draw:style-name="gr1" draw:layer="layout" svg:width="16.932cm" svg:height="9.524cm" svg:x="1.059cm" svg:y="1.905cm" draw:page-number="22" presentation:class="page"/>
          <draw:frame draw:name="Google Shape;431;g3edfef7293b_0_111:notes" presentation:style-name="pr12" draw:text-style-name="P4" draw:layer="layout" svg:width="15.239cm" svg:height="11.429cm" svg:x="1.905cm" svg:y="12.065cm" presentation:class="notes" presentation:user-transformed="true">
            <draw:text-box>
              <text:list text:style-name="L7">
                <text:list-item>
                  <text:p text:style-name="P14"><text:span text:style-name="T3">What row number do we use to extract data from the first row of our table?</text:span></text:p>
                </text:list-item>
                <text:list-item>
                  <text:p text:style-name="P14"><text:span text:style-name="T29">0</text:span></text:p>
                </text:list-item>
                <text:list-item>
                  <text:p text:style-name="P14"><text:span text:style-name="T3">What code did you write to extract the 75th suggested word from the table?</text:span></text:p>
                </text:list-item>
              </text:list>
              <text:list text:style-name="L13">
                <text:list-item>
                  <text:p text:style-name="P14"><text:span text:style-name="T15">row-n(results, </text:span><text:span text:style-name="T34">74)[</text:span><text:span text:style-name="T35">"word"]</text:span></text:p>
                </text:list-item>
              </text:list>
              <text:list text:style-name="L14">
                <text:list-item>
                  <text:p text:style-name="P14"><text:span text:style-name="T36">What was the 75th suggested word?</text:span></text:p>
                </text:list-item>
                <text:list-item>
                  <text:p text:style-name="P14"><text:span text:style-name="T35">wield</text:span></text:p>
                </text:list-item>
              </text:list>
              <text:p text:style-name="P3"><text:span text:style-name="T37"/></text:p>
            </draw:text-box>
          </draw:frame>
        </presentation:notes>
      </draw:page>
      <draw:page draw:name="Data Visualization" draw:style-name="dp1" draw:master-page-name="TITLE_5f_AND_5f_BODY_5f_2_5f_1_5f_1">
        <draw:frame draw:name="Google Shape;439;p75" presentation:style-name="pr15" draw:text-style-name="P10" draw:layer="layout" svg:width="21.908cm" svg:height="1.59cm" svg:x="3.356cm" svg:y="0.178cm" presentation:class="title" presentation:user-transformed="true">
          <draw:text-box>
            <text:p text:style-name="P9"><text:span text:style-name="T11">Data Visualization</text:span></text:p>
          </draw:text-box>
        </draw:frame>
        <draw:frame draw:name="Google Shape;440;p75" presentation:style-name="pr16" draw:text-style-name="P8" draw:layer="layout" svg:width="21.327cm" svg:height="9.489cm" svg:x="3.26cm" svg:y="2.72cm" presentation:class="outline" presentation:user-transformed="true">
          <draw:text-box>
            <text:p text:style-name="P5"><text:span text:style-name="T4">Why would a spell checking app need to use Row Accessor functions?</text:span></text:p>
            <text:p text:style-name="P7"><text:span text:style-name="T10"/></text:p>
          </draw:text-box>
        </draw:frame>
        <presentation:notes draw:style-name="dp2">
          <draw:page-thumbnail draw:name="Google Shape;436;g3edfef7293b_0_116:notes" draw:style-name="gr1" draw:layer="layout" svg:width="16.932cm" svg:height="9.524cm" svg:x="1.059cm" svg:y="1.905cm" draw:page-number="23" presentation:class="page"/>
          <draw:frame draw:name="Google Shape;437;g3edfef7293b_0_116:notes" presentation:style-name="pr17" draw:text-style-name="P4" draw:layer="layout" svg:width="15.239cm" svg:height="11.429cm" svg:x="1.905cm" svg:y="12.065cm" presentation:class="notes" presentation:user-transformed="true">
            <draw:text-box>
              <text:list text:style-name="L7">
                <text:list-item>
                  <text:p text:style-name="P14"><text:span text:style-name="T3">Why would a spell checking app need to use Row Accessor functions?</text:span></text:p>
                </text:list-item>
                <text:list-item>
                  <text:p text:style-name="P14"><text:span text:style-name="T29">Because we want to suggest a word, not a whole row of a table!</text:span></text:p>
                </text:list-item>
                <text:list-item>
                  <text:p text:style-name="P14"><text:span text:style-name="T29">And we might want to take the edit-number into consideration when we make our suggestion.</text:span></text:p>
                </text:list-item>
              </text:list>
              <text:p text:style-name="P3"><text:span text:style-name="T2"/></text:p>
            </draw:text-box>
          </draw:frame>
        </presentation:notes>
      </draw:page>
      <draw:page draw:name="Programming with Spelling Suggestions" draw:style-name="dp1" draw:master-page-name="SECTION_5f_HEADER_5f_1_5f_2_5f_1">
        <draw:frame draw:name="Google Shape;445;p76" presentation:style-name="pr1" draw:text-style-name="P2" draw:layer="layout" svg:width="23.667cm" svg:height="2.003cm" svg:x="0.866cm" svg:y="0.428cm" presentation:class="title" presentation:user-transformed="true">
          <draw:text-box>
            <text:p text:style-name="P1"><text:span text:style-name="T1">Programming with Spelling Suggestions</text:span></text:p>
          </draw:text-box>
        </draw:frame>
        <presentation:notes draw:style-name="dp2">
          <draw:page-thumbnail draw:name="Google Shape;442;g3f41f0b3b82_0_0:notes" draw:style-name="gr1" draw:layer="layout" svg:width="16.932cm" svg:height="9.524cm" svg:x="1.059cm" svg:y="1.905cm" draw:page-number="24" presentation:class="page"/>
          <draw:frame draw:name="Google Shape;443;g3f41f0b3b82_0_0:notes" presentation:style-name="pr2" draw:text-style-name="P4" draw:layer="layout" svg:width="15.239cm" svg:height="11.429cm" svg:x="1.905cm" svg:y="12.065cm" presentation:class="notes" presentation:user-transformed="true">
            <draw:text-box>
              <text:p text:style-name="P3"><text:span text:style-name="T2">This is the </text:span><text:span text:style-name="T3">pyret</text:span><text:span text:style-name="T2"> version of this lesson. Make sure you are using the right software tool (WeScheme, Pyret, CODAP, etc...)</text:span></text:p>
              <text:p text:style-name="P3"><text:span text:style-name="T2">To learn more about how to use PearDeck, and how to view the embedded links on these slides without going into present mode visit https://help.peardeck.com/en</text:span></text:p>
              <text:p text:style-name="P3"><text:span text:style-name="T2"/></text:p>
            </draw:text-box>
          </draw:frame>
        </presentation:notes>
      </draw:page>
      <draw:page draw:name="Introducing Contracts" draw:style-name="dp1" draw:master-page-name="TITLE_5f_AND_5f_BODY_5f_2_5f_2">
        <draw:frame draw:name="Google Shape;450;p77" presentation:style-name="pr3" draw:text-style-name="P8" draw:layer="layout" svg:width="15.185cm" svg:height="9.489cm" svg:x="1.193cm" svg:y="4.199cm" presentation:class="outline" presentation:user-transformed="true">
          <draw:text-box>
            <text:p text:style-name="P5"><text:span text:style-name="T4"><text:s/></text:span><text:span text:style-name="T4">Make sure you've got the </text:span><text:span text:style-name="T5"><text:a xlink:href="https://pyret.bootstrapworld.org/editor#shareurl=https://raw.githubusercontent.com/bootstrapworld/starter-files/fall2026/ai/Spell%20Checker%20Starter%20File.arr" xlink:type="simple">Spell Checker Starter File</text:a></text:span><text:span text:style-name="T4"><text:s/>open, and your Definitions Area includes </text:span><text:span text:style-name="T6">results = alt-words(</text:span><text:span text:style-name="T7">"plation"</text:span><text:span text:style-name="T6">, WORDS-L, </text:span><text:span text:style-name="T8">4</text:span><text:span text:style-name="T6">)</text:span><text:span text:style-name="T4">.</text:span></text:p>
            <text:p text:style-name="P6"><text:span text:style-name="T4">Our spell-checker gives us lots of data to play with, in the form of tables of suggested words and their edit distances. We know how to save that data using variable definitions, so that we can refer back to it without having to recalculate the whole table.</text:span></text:p>
            <text:p text:style-name="P6"><text:span text:style-name="T4">Can we do anything </text:span><text:span text:style-name="T9">interesting</text:span><text:span text:style-name="T4"> with that data?</text:span></text:p>
            <text:p text:style-name="P7"><text:span text:style-name="T10"/></text:p>
          </draw:text-box>
        </draw:frame>
        <draw:frame draw:name="Google Shape;451;p77" presentation:style-name="pr4"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452;p77" draw:style-name="gr2" draw:text-style-name="P11" draw:layer="layout" svg:width="7.733cm" svg:height="7.238cm" svg:x="17.019cm" svg:y="4.199cm">
          <draw:image xlink:href="Pictures/10000000000001F4000001D46823DCB89CA4530C.png" xlink:type="simple" xlink:show="embed" xlink:actuate="onLoad">
            <text:p/>
          </draw:image>
        </draw:frame>
        <presentation:notes draw:style-name="dp2">
          <draw:page-thumbnail draw:name="Google Shape;447;g3f41f0b3b82_0_4:notes" draw:style-name="gr1" draw:layer="layout" svg:width="16.932cm" svg:height="9.524cm" svg:x="1.059cm" svg:y="1.905cm" draw:page-number="25" presentation:class="page"/>
          <draw:frame draw:name="Google Shape;448;g3f41f0b3b82_0_4:notes" presentation:style-name="pr30" draw:text-style-name="P12" draw:layer="layout" svg:width="15.239cm" svg:height="11.429cm" svg:x="1.905cm" svg:y="12.065cm" presentation:class="notes" presentation:placeholder="true" presentation:user-transformed="true">
            <draw:text-box/>
          </draw:frame>
        </presentation:notes>
      </draw:page>
      <draw:page draw:name="Introducing Contracts" draw:style-name="dp1" draw:master-page-name="TITLE_5f_AND_5f_BODY_5f_2_5f_2">
        <draw:frame draw:name="Google Shape;457;p78" presentation:style-name="pr3" draw:text-style-name="P8" draw:layer="layout" svg:width="15.185cm" svg:height="9.489cm" svg:x="1.193cm" svg:y="4.199cm" presentation:class="outline" presentation:user-transformed="true">
          <draw:text-box>
            <text:p text:style-name="P5"><text:span text:style-name="T4"><text:s/></text:span><text:span text:style-name="T4">A spell-checker doesn't give us a table of 500 suggestions. Our cell phones don't tell us the edit distance for the suggestions they make. But just because it doesn't show us the edit distance doesn't mean it's not used! Your cell phone and spell checker uses the edit distance to help pick out the most-likely words to suggestion.</text:span></text:p>
            <text:p text:style-name="P6"><text:span text:style-name="T4">We want to take the output of </text:span><text:span text:style-name="T6">alt-words</text:span><text:span text:style-name="T4"> and </text:span><text:span text:style-name="T9">do something</text:span><text:span text:style-name="T4"> to it, just as spell checkers and cell phones do.</text:span></text:p>
            <text:p text:style-name="P7"><text:span text:style-name="T10"/></text:p>
          </draw:text-box>
        </draw:frame>
        <draw:frame draw:name="Google Shape;458;p78" presentation:style-name="pr4"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459;p78" draw:style-name="gr2" draw:text-style-name="P11" draw:layer="layout" svg:width="7.733cm" svg:height="7.238cm" svg:x="17.019cm" svg:y="4.199cm">
          <draw:image xlink:href="Pictures/10000000000001F4000001D44AB5030E5647C5EC.png" xlink:type="simple" xlink:show="embed" xlink:actuate="onLoad">
            <text:p/>
          </draw:image>
        </draw:frame>
        <presentation:notes draw:style-name="dp2">
          <draw:page-thumbnail draw:name="Google Shape;454;g3f41f0b3b82_0_10:notes" draw:style-name="gr1" draw:layer="layout" svg:width="16.932cm" svg:height="9.524cm" svg:x="1.059cm" svg:y="1.905cm" draw:page-number="26" presentation:class="page"/>
          <draw:frame draw:name="Google Shape;455;g3f41f0b3b82_0_10:notes" presentation:style-name="pr31" draw:text-style-name="P12" draw:layer="layout" svg:width="15.239cm" svg:height="11.429cm" svg:x="1.905cm" svg:y="12.065cm" presentation:class="notes" presentation:placeholder="true" presentation:user-transformed="true">
            <draw:text-box/>
          </draw:frame>
        </presentation:notes>
      </draw:page>
      <draw:page draw:name="Introducing Contracts" draw:style-name="dp1" draw:master-page-name="TITLE_5f_AND_5f_BODY_5f_2_5f_1_5f_5">
        <draw:frame draw:name="Google Shape;464;p79" presentation:style-name="pr7"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465;p79" presentation:style-name="pr8" draw:text-style-name="P8" draw:layer="layout" svg:width="20.948cm" svg:height="9.489cm" svg:x="3.531cm" svg:y="2.786cm" presentation:class="outline" presentation:user-transformed="true">
          <draw:text-box>
            <text:p text:style-name="P5"><text:span text:style-name="T4">Turn to </text:span><text:span text:style-name="T5"><text:a xlink:href="https://bootstrapworld.org/materials/fall2026/en-us/lessons/programming-spelling-suggestions/pages/sorting-and-trimming.html" xlink:type="simple">Sorting and Trimming Tables</text:a></text:span><text:span text:style-name="T4"><text:s/>and complete the first section: </text:span><text:span text:style-name="T12">Sorting Results</text:span><text:span text:style-name="T4">.</text:span></text:p>
            <text:p text:style-name="P7"><text:span text:style-name="T10"/></text:p>
          </draw:text-box>
        </draw:frame>
        <presentation:notes draw:style-name="dp2">
          <draw:page-thumbnail draw:name="Google Shape;461;g3f41f0b3b82_0_16:notes" draw:style-name="gr1" draw:layer="layout" svg:width="16.932cm" svg:height="9.524cm" svg:x="1.059cm" svg:y="1.905cm" draw:page-number="27" presentation:class="page"/>
          <draw:frame draw:name="Google Shape;462;g3f41f0b3b82_0_16:notes" presentation:style-name="pr32" draw:text-style-name="P12" draw:layer="layout" svg:width="15.239cm" svg:height="11.429cm" svg:x="1.905cm" svg:y="12.065cm" presentation:class="notes" presentation:placeholder="true" presentation:user-transformed="true">
            <draw:text-box/>
          </draw:frame>
        </presentation:notes>
      </draw:page>
      <draw:page draw:name="Introducing Contracts" draw:style-name="dp1" draw:master-page-name="TITLE_5f_AND_5f_BODY_5f_2_5f_1">
        <draw:frame draw:name="Google Shape;470;p80" presentation:style-name="pr10"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471;p80" presentation:style-name="pr11" draw:text-style-name="P8" draw:layer="layout" svg:width="21.032cm" svg:height="9.489cm" svg:x="3.602cm" svg:y="2.707cm" presentation:class="outline" presentation:user-transformed="true">
          <draw:text-box>
            <text:list text:style-name="L5">
              <text:list-item>
                <text:p text:style-name="P13"><text:span text:style-name="T4">What did these </text:span><text:span text:style-name="T13">sort</text:span><text:span text:style-name="T4"> expressions do?</text:span></text:p>
              </text:list-item>
              <text:list-item>
                <text:p text:style-name="P13"><text:span text:style-name="T4">What does it mean that the Range of </text:span><text:span text:style-name="T13">sort</text:span><text:span text:style-name="T4"> is Table?</text:span></text:p>
              </text:list-item>
              <text:list-item>
                <text:p text:style-name="P13"><text:span text:style-name="T4">Type </text:span><text:span text:style-name="T6">results</text:span><text:span text:style-name="T4"> and hit "Enter". Did sorting our animals change the value of the table?</text:span></text:p>
              </text:list-item>
            </text:list>
            <text:p text:style-name="P7"><text:span text:style-name="T10"/></text:p>
          </draw:text-box>
        </draw:frame>
        <presentation:notes draw:style-name="dp2">
          <draw:page-thumbnail draw:name="Google Shape;467;g3f41f0b3b82_0_21:notes" draw:style-name="gr1" draw:layer="layout" svg:width="16.932cm" svg:height="9.524cm" svg:x="1.059cm" svg:y="1.905cm" draw:page-number="28" presentation:class="page"/>
          <draw:frame draw:name="Google Shape;468;g3f41f0b3b82_0_21:notes" presentation:style-name="pr12" draw:text-style-name="P4" draw:layer="layout" svg:width="15.239cm" svg:height="11.429cm" svg:x="1.905cm" svg:y="12.065cm" presentation:class="notes" presentation:user-transformed="true">
            <draw:text-box>
              <text:list text:style-name="L7">
                <text:list-item>
                  <text:p text:style-name="P14"><text:span text:style-name="T3">What did these </text:span><text:span text:style-name="T14">sort expressions do?</text:span></text:p>
                </text:list-item>
                <text:list-item>
                  <text:p text:style-name="P14"><text:span text:style-name="T15">They took in the results table, the edit-distance column, and true or false... producing a new table, sorted alphabetically    (ascending for true and descending for false)</text:span></text:p>
                </text:list-item>
                <text:list-item>
                  <text:p text:style-name="P14"><text:span text:style-name="T14">What does it mean that the Range of sort is Table?</text:span></text:p>
                </text:list-item>
                <text:list-item>
                  <text:p text:style-name="P14"><text:span text:style-name="T15">The function produces a new table.</text:span></text:p>
                </text:list-item>
                <text:list-item>
                  <text:p text:style-name="P14"><text:span text:style-name="T14">Type results and hit "Enter". Did sorting our animals change the value of the table?</text:span></text:p>
                </text:list-item>
                <text:list-item>
                  <text:p text:style-name="P14"><text:span text:style-name="T15">No. It made a new one.</text:span></text:p>
                </text:list-item>
              </text:list>
              <text:p text:style-name="P3"><text:span text:style-name="T16"/></text:p>
            </draw:text-box>
          </draw:frame>
        </presentation:notes>
      </draw:page>
      <draw:page draw:name="Introducing Contracts" draw:style-name="dp1" draw:master-page-name="TITLE_5f_AND_5f_BODY_5f_2_5f_1">
        <draw:frame draw:name="Google Shape;476;p81" presentation:style-name="pr10"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477;p81" presentation:style-name="pr11" draw:text-style-name="P8" draw:layer="layout" svg:width="21.032cm" svg:height="9.489cm" svg:x="3.602cm" svg:y="2.707cm" presentation:class="outline" presentation:user-transformed="true">
          <draw:text-box>
            <text:p text:style-name="P5"><text:span text:style-name="T4">Let's review what we've learned about Contracts. Every Contract has three parts:</text:span></text:p>
            <text:list text:style-name="L9">
              <text:list-item>
                <text:p text:style-name="P6"><text:span text:style-name="T12">Name</text:span><text:span text:style-name="T4"> -- the name of the function, which we type in whenever we want to use it</text:span></text:p>
              </text:list-item>
              <text:list-item>
                <text:p text:style-name="P5"><text:span text:style-name="T12">Domain</text:span><text:span text:style-name="T4"> -- the type(s) of data we give to the function</text:span></text:p>
              </text:list-item>
              <text:list-item>
                <text:p text:style-name="P5"><text:span text:style-name="T12">Range</text:span><text:span text:style-name="T4"> -- the type of data the function produces</text:span></text:p>
              </text:list-item>
            </text:list>
            <text:p text:style-name="P6"><text:span text:style-name="T4">📌 </text:span><text:span text:style-name="T4">Contracts are the </text:span><text:span text:style-name="T9">instruction manual</text:span><text:span text:style-name="T4"> for functions.</text:span></text:p>
            <text:p text:style-name="P7"><text:span text:style-name="T10"/></text:p>
          </draw:text-box>
        </draw:frame>
        <presentation:notes draw:style-name="dp2">
          <draw:page-thumbnail draw:name="Google Shape;473;g3f41f0b3b82_0_26:notes" draw:style-name="gr1" draw:layer="layout" svg:width="16.932cm" svg:height="9.524cm" svg:x="1.059cm" svg:y="1.905cm" draw:page-number="29" presentation:class="page"/>
          <draw:frame draw:name="Google Shape;474;g3f41f0b3b82_0_26:notes" presentation:style-name="pr33" draw:text-style-name="P12" draw:layer="layout" svg:width="15.239cm" svg:height="11.429cm" svg:x="1.905cm" svg:y="12.065cm" presentation:class="notes" presentation:placeholder="true" presentation:user-transformed="true">
            <draw:text-box/>
          </draw:frame>
        </presentation:notes>
      </draw:page>
      <draw:page draw:name="Introducing Contracts" draw:style-name="dp1" draw:master-page-name="TITLE_5f_AND_5f_BODY_5f_2_5f_1_5f_5">
        <draw:frame draw:name="Google Shape;482;p82" presentation:style-name="pr7"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483;p82" presentation:style-name="pr8" draw:text-style-name="P8" draw:layer="layout" svg:width="20.948cm" svg:height="9.489cm" svg:x="3.531cm" svg:y="2.786cm" presentation:class="outline" presentation:user-transformed="true">
          <draw:text-box>
            <text:p text:style-name="P5"><text:span text:style-name="T4">Let's explore the Contract for another function that works with Tables: </text:span><text:span text:style-name="T13">first-n-rows</text:span></text:p>
            <text:list text:style-name="L5">
              <text:list-item>
                <text:p text:style-name="P6"><text:span text:style-name="T4">Complete the second section of </text:span><text:span text:style-name="T5"><text:a xlink:href="https://bootstrapworld.org/materials/fall2026/en-us/lessons/programming-spelling-suggestions/pages/sorting-and-trimming.html" xlink:type="simple">Sorting and Trimming Tables</text:a></text:span><text:span text:style-name="T4">: </text:span><text:span text:style-name="T12">Trimming Results</text:span><text:span text:style-name="T4">.</text:span></text:p>
              </text:list-item>
            </text:list>
            <text:p text:style-name="P7"><text:span text:style-name="T10"/></text:p>
          </draw:text-box>
        </draw:frame>
        <presentation:notes draw:style-name="dp2">
          <draw:page-thumbnail draw:name="Google Shape;479;g3f41f0b3b82_0_31:notes" draw:style-name="gr1" draw:layer="layout" svg:width="16.932cm" svg:height="9.524cm" svg:x="1.059cm" svg:y="1.905cm" draw:page-number="30" presentation:class="page"/>
          <draw:frame draw:name="Google Shape;480;g3f41f0b3b82_0_31:notes" presentation:style-name="pr34" draw:text-style-name="P12" draw:layer="layout" svg:width="15.239cm" svg:height="11.429cm" svg:x="1.905cm" svg:y="12.065cm" presentation:class="notes" presentation:placeholder="true" presentation:user-transformed="true">
            <draw:text-box/>
          </draw:frame>
        </presentation:notes>
      </draw:page>
      <draw:page draw:name="Introducing Contracts" draw:style-name="dp1" draw:master-page-name="TITLE_5f_AND_5f_BODY_5f_2_5f_1">
        <draw:frame draw:name="Google Shape;488;p83" presentation:style-name="pr10"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489;p83" presentation:style-name="pr11" draw:text-style-name="P8" draw:layer="layout" svg:width="21.032cm" svg:height="9.489cm" svg:x="3.602cm" svg:y="2.707cm" presentation:class="outline" presentation:user-transformed="true">
          <draw:text-box>
            <text:p text:style-name="P5"><text:span text:style-name="T4">There were only a few suggestions with an </text:span><text:span text:style-name="T6">edit-distance</text:span><text:span text:style-name="T4"> of 1, but more with distances of 2, 3, and 4. As </text:span><text:span text:style-name="T6">edit-distance</text:span><text:span text:style-name="T4"> increases, the number of suggestions increases, too.</text:span></text:p>
            <text:list text:style-name="L5">
              <text:list-item>
                <text:p text:style-name="P6"><text:span text:style-name="T4">But does it increase by the same amount each time?</text:span></text:p>
              </text:list-item>
              <text:list-item>
                <text:p text:style-name="P5"><text:span text:style-name="T4">How could you communicate this growth to someone else, without making them scan the whole table?</text:span></text:p>
              </text:list-item>
            </text:list>
            <text:p text:style-name="P7"><text:span text:style-name="T10"/></text:p>
          </draw:text-box>
        </draw:frame>
        <presentation:notes draw:style-name="dp2">
          <draw:page-thumbnail draw:name="Google Shape;485;g3f41f0b3b82_0_36:notes" draw:style-name="gr1" draw:layer="layout" svg:width="16.932cm" svg:height="9.524cm" svg:x="1.059cm" svg:y="1.905cm" draw:page-number="31" presentation:class="page"/>
          <draw:frame draw:name="Google Shape;486;g3f41f0b3b82_0_36:notes" presentation:style-name="pr12" draw:text-style-name="P4" draw:layer="layout" svg:width="15.239cm" svg:height="11.429cm" svg:x="1.905cm" svg:y="12.065cm" presentation:class="notes" presentation:user-transformed="true">
            <draw:text-box>
              <text:list text:style-name="L7">
                <text:list-item>
                  <text:p text:style-name="P14"><text:span text:style-name="T3">But does it increase by the same amount each time?</text:span></text:p>
                </text:list-item>
                <text:list-item>
                  <text:p text:style-name="P14"><text:span text:style-name="T29">No! It grows by larger amounts for each </text:span><text:span text:style-name="T30">edit-distance!</text:span></text:p>
                </text:list-item>
                <text:list-item>
                  <text:p text:style-name="P14"><text:span text:style-name="T30">It's almost exponentially larger</text:span></text:p>
                </text:list-item>
                <text:list-item>
                  <text:p text:style-name="P14"><text:span text:style-name="T31">How could you communicate this growth to someone else, without making them scan the whole table?</text:span></text:p>
                </text:list-item>
                <text:list-item>
                  <text:p text:style-name="P14"><text:span text:style-name="T30">You could count the number of suggestions for each edit-distance</text:span></text:p>
                </text:list-item>
                <text:list-item>
                  <text:p text:style-name="P14"><text:span text:style-name="T30">You could make a chart</text:span></text:p>
                </text:list-item>
              </text:list>
              <text:p text:style-name="P3"><text:span text:style-name="T32"/></text:p>
            </draw:text-box>
          </draw:frame>
        </presentation:notes>
      </draw:page>
      <draw:page draw:name="Introducing Contracts" draw:style-name="dp1" draw:master-page-name="TITLE_5f_AND_5f_BODY_5f_2_5f_1_5f_5">
        <draw:frame draw:name="Google Shape;494;p84" presentation:style-name="pr7"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495;p84" presentation:style-name="pr8" draw:text-style-name="P8" draw:layer="layout" svg:width="20.948cm" svg:height="9.489cm" svg:x="3.531cm" svg:y="2.786cm" presentation:class="outline" presentation:user-transformed="true">
          <draw:text-box>
            <text:list text:style-name="L5">
              <text:list-item>
                <text:p text:style-name="P13"><text:span text:style-name="T4">Complete the first section of </text:span><text:span text:style-name="T5"><text:a xlink:href="https://bootstrapworld.org/materials/fall2026/en-us/lessons/programming-spelling-suggestions/pages/visualizing.html" xlink:type="simple">Data Visualization for Tables</text:a></text:span></text:p>
              </text:list-item>
            </text:list>
            <text:p text:style-name="P7"><text:span text:style-name="T10"/></text:p>
          </draw:text-box>
        </draw:frame>
        <presentation:notes draw:style-name="dp2">
          <draw:page-thumbnail draw:name="Google Shape;491;g3f41f0b3b82_0_41:notes" draw:style-name="gr1" draw:layer="layout" svg:width="16.932cm" svg:height="9.524cm" svg:x="1.059cm" svg:y="1.905cm" draw:page-number="32" presentation:class="page"/>
          <draw:frame draw:name="Google Shape;492;g3f41f0b3b82_0_41:notes" presentation:style-name="pr35" draw:text-style-name="P12" draw:layer="layout" svg:width="15.239cm" svg:height="11.429cm" svg:x="1.905cm" svg:y="12.065cm" presentation:class="notes" presentation:placeholder="true" presentation:user-transformed="true">
            <draw:text-box/>
          </draw:frame>
        </presentation:notes>
      </draw:page>
      <draw:page draw:name="Introducing Contracts" draw:style-name="dp1" draw:master-page-name="TITLE_5f_AND_5f_BODY_5f_2_5f_1">
        <draw:frame draw:name="Google Shape;500;p85" presentation:style-name="pr10"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501;p85" presentation:style-name="pr11" draw:text-style-name="P8" draw:layer="layout" svg:width="21.032cm" svg:height="9.489cm" svg:x="3.602cm" svg:y="2.707cm" presentation:class="outline" presentation:user-transformed="true">
          <draw:text-box>
            <text:p text:style-name="P5"><text:span text:style-name="T4">The </text:span><text:span text:style-name="T13">count</text:span><text:span text:style-name="T4"> function produces a frequency table, showing how often a suggested word has an </text:span><text:span text:style-name="T6">edit-distance</text:span><text:span text:style-name="T4"> of 1, 2, 3, and so on.</text:span></text:p>
            <text:p text:style-name="P6"><text:span text:style-name="T4">How is our bar chart connected to our frequency table?</text:span></text:p>
            <text:p text:style-name="P7"><text:span text:style-name="T10"/></text:p>
          </draw:text-box>
        </draw:frame>
        <presentation:notes draw:style-name="dp2">
          <draw:page-thumbnail draw:name="Google Shape;497;g3f41f0b3b82_0_46:notes" draw:style-name="gr1" draw:layer="layout" svg:width="16.932cm" svg:height="9.524cm" svg:x="1.059cm" svg:y="1.905cm" draw:page-number="33" presentation:class="page"/>
          <draw:frame draw:name="Google Shape;498;g3f41f0b3b82_0_46:notes" presentation:style-name="pr12" draw:text-style-name="P4" draw:layer="layout" svg:width="15.239cm" svg:height="11.429cm" svg:x="1.905cm" svg:y="12.065cm" presentation:class="notes" presentation:user-transformed="true">
            <draw:text-box>
              <text:list text:style-name="L7">
                <text:list-item>
                  <text:p text:style-name="P14"><text:span text:style-name="T3">How is our bar chart connected to our frequency table?</text:span></text:p>
                </text:list-item>
                <text:list-item>
                  <text:p text:style-name="P14"><text:span text:style-name="T29">The bars are the same height as the numbers in that table</text:span></text:p>
                </text:list-item>
              </text:list>
              <text:p text:style-name="P3"><text:span text:style-name="T2"/></text:p>
            </draw:text-box>
          </draw:frame>
        </presentation:notes>
      </draw:page>
      <draw:page draw:name="Introducing Contracts" draw:style-name="dp1" draw:master-page-name="TITLE_5f_AND_5f_BODY_5f_2_5f_1_5f_4">
        <draw:frame draw:name="Google Shape;506;p86" presentation:style-name="pr27"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507;p86" presentation:style-name="pr28" draw:text-style-name="P8" draw:layer="layout" svg:width="15.074cm" svg:height="9.489cm" svg:x="1.167cm" svg:y="4.269cm" presentation:class="outline" presentation:user-transformed="true">
          <draw:text-box>
            <text:p text:style-name="P5"><text:span text:style-name="T4">A cell phone or spell-checker doesn't show you rows and columns - </text:span><text:span text:style-name="T9">it just shows you the words!</text:span><text:span text:style-name="T4"> Once a spell checker gives us a table full of words and edit-distances....how do we get the words </text:span><text:span text:style-name="T9">out?</text:span></text:p>
            <text:list text:style-name="L5">
              <text:list-item>
                <text:p text:style-name="P6"><text:span text:style-name="T4">Complete </text:span><text:span text:style-name="T5"><text:a xlink:href="https://bootstrapworld.org/materials/fall2026/en-us/lessons/programming-spelling-suggestions/pages/visualizing.html" xlink:type="simple">Data Visualization for Tables</text:a></text:span></text:p>
              </text:list-item>
            </text:list>
            <text:p text:style-name="P7"><text:span text:style-name="T10"/></text:p>
          </draw:text-box>
        </draw:frame>
        <draw:frame draw:name="Google Shape;508;p86" draw:style-name="gr2" draw:text-style-name="P11" draw:layer="layout" svg:width="7.588cm" svg:height="7.102cm" svg:x="16.777cm" svg:y="4.858cm">
          <draw:image xlink:href="Pictures/10000000000001F4000001D46239A39D28DB40F8.png" xlink:type="simple" xlink:show="embed" xlink:actuate="onLoad">
            <text:p/>
          </draw:image>
        </draw:frame>
        <presentation:notes draw:style-name="dp2">
          <draw:page-thumbnail draw:name="Google Shape;503;g3f41f0b3b82_0_51:notes" draw:style-name="gr1" draw:layer="layout" svg:width="16.932cm" svg:height="9.524cm" svg:x="1.059cm" svg:y="1.905cm" draw:page-number="34" presentation:class="page"/>
          <draw:frame draw:name="Google Shape;504;g3f41f0b3b82_0_51:notes" presentation:style-name="pr29" draw:text-style-name="P4" draw:layer="layout" svg:width="15.239cm" svg:height="11.429cm" svg:x="1.905cm" svg:y="12.065cm" presentation:class="notes" presentation:user-transformed="true">
            <draw:text-box>
              <text:p text:style-name="P3"><text:span text:style-name="T2">This lesson is not intended to teacher students how to read or interpret data visualizations! If you're blending this material into a Data Science or Math class where various visualizations are part of your learning goals, we highly recommend exploring our </text:span><text:span text:style-name="T17"><text:a xlink:href="https://bootstrapworld.org/materials/fall2026/en-us/courses/data-science/index.shtml" xlink:type="simple">Data Science</text:a></text:span><text:span text:style-name="T18"><text:s/>course.</text:span></text:p>
              <text:p text:style-name="P3"><text:span text:style-name="T18"/></text:p>
            </draw:text-box>
          </draw:frame>
        </presentation:notes>
      </draw:page>
      <draw:page draw:name="Introducing Contracts" draw:style-name="dp1" draw:master-page-name="TITLE_5f_AND_5f_BODY_5f_2_5f_1">
        <draw:frame draw:name="Google Shape;513;p87" presentation:style-name="pr10"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514;p87" presentation:style-name="pr11" draw:text-style-name="P8" draw:layer="layout" svg:width="21.032cm" svg:height="9.489cm" svg:x="3.602cm" svg:y="2.707cm" presentation:class="outline" presentation:user-transformed="true">
          <draw:text-box>
            <text:p text:style-name="P5"><text:span text:style-name="T33">Row accessors</text:span><text:span text:style-name="T4"> allow us to extract data from specific cells of our table by specifying the row number and column title.</text:span></text:p>
            <text:list text:style-name="L5">
              <text:list-item>
                <text:p text:style-name="P6"><text:span text:style-name="T4">What row number do we use to extract data from the first row of our table?</text:span></text:p>
              </text:list-item>
              <text:list-item>
                <text:p text:style-name="P5"><text:span text:style-name="T4">What code did you write to extract the 75th suggested word from the table?</text:span></text:p>
              </text:list-item>
              <text:list-item>
                <text:p text:style-name="P5"><text:span text:style-name="T4">What was the 75th suggested word?</text:span></text:p>
              </text:list-item>
            </text:list>
            <text:p text:style-name="P7"><text:span text:style-name="T10"/></text:p>
          </draw:text-box>
        </draw:frame>
        <presentation:notes draw:style-name="dp2">
          <draw:page-thumbnail draw:name="Google Shape;510;g3f41f0b3b82_0_57:notes" draw:style-name="gr1" draw:layer="layout" svg:width="16.932cm" svg:height="9.524cm" svg:x="1.059cm" svg:y="1.905cm" draw:page-number="35" presentation:class="page"/>
          <draw:frame draw:name="Google Shape;511;g3f41f0b3b82_0_57:notes" presentation:style-name="pr12" draw:text-style-name="P4" draw:layer="layout" svg:width="15.239cm" svg:height="11.429cm" svg:x="1.905cm" svg:y="12.065cm" presentation:class="notes" presentation:user-transformed="true">
            <draw:text-box>
              <text:list text:style-name="L7">
                <text:list-item>
                  <text:p text:style-name="P14"><text:span text:style-name="T3">What row number do we use to extract data from the first row of our table?</text:span></text:p>
                </text:list-item>
                <text:list-item>
                  <text:p text:style-name="P14"><text:span text:style-name="T29">0</text:span></text:p>
                </text:list-item>
                <text:list-item>
                  <text:p text:style-name="P14"><text:span text:style-name="T3">What code did you write to extract the 75th suggested word from the table?</text:span></text:p>
                </text:list-item>
              </text:list>
              <text:list text:style-name="L13">
                <text:list-item>
                  <text:p text:style-name="P14"><text:span text:style-name="T15">row-n(results, </text:span><text:span text:style-name="T34">74)[</text:span><text:span text:style-name="T35">"word"]</text:span></text:p>
                </text:list-item>
              </text:list>
              <text:list text:style-name="L14">
                <text:list-item>
                  <text:p text:style-name="P14"><text:span text:style-name="T36">What was the 75th suggested word?</text:span></text:p>
                </text:list-item>
                <text:list-item>
                  <text:p text:style-name="P14"><text:span text:style-name="T35">wield</text:span></text:p>
                </text:list-item>
              </text:list>
              <text:p text:style-name="P3"><text:span text:style-name="T37"/></text:p>
            </draw:text-box>
          </draw:frame>
        </presentation:notes>
      </draw:page>
      <draw:page draw:name="Introducing Contracts" draw:style-name="dp1" draw:master-page-name="TITLE_5f_AND_5f_BODY_5f_2_5f_1_5f_1">
        <draw:frame draw:name="Google Shape;519;p88" presentation:style-name="pr15"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520;p88" presentation:style-name="pr16" draw:text-style-name="P8" draw:layer="layout" svg:width="21.327cm" svg:height="9.489cm" svg:x="3.26cm" svg:y="2.72cm" presentation:class="outline" presentation:user-transformed="true">
          <draw:text-box>
            <text:list text:style-name="L5">
              <text:list-item>
                <text:p text:style-name="P13"><text:span text:style-name="T13">first-n-rows</text:span><text:span text:style-name="T4"> and </text:span><text:span text:style-name="T6">last-n-rows</text:span><text:span text:style-name="T4"> have exactly the same Domain and Range, but do different things. So do </text:span><text:span text:style-name="T13">circle</text:span><text:span text:style-name="T4"> and </text:span><text:span text:style-name="T13">triangle</text:span><text:span text:style-name="T4">. How is it possible to have the same Domain </text:span><text:span text:style-name="T9">and</text:span><text:span text:style-name="T4"> Range, and behave so differently?</text:span></text:p>
              </text:list-item>
              <text:list-item>
                <text:p text:style-name="P13"><text:span text:style-name="T4">Why did </text:span><text:span text:style-name="T13">sort</text:span><text:span text:style-name="T4"> need more arguments in its Domain than either of the other two?</text:span></text:p>
              </text:list-item>
            </text:list>
            <text:p text:style-name="P7"><text:span text:style-name="T10"/></text:p>
          </draw:text-box>
        </draw:frame>
        <presentation:notes draw:style-name="dp2">
          <draw:page-thumbnail draw:name="Google Shape;516;g3f41f0b3b82_0_62:notes" draw:style-name="gr1" draw:layer="layout" svg:width="16.932cm" svg:height="9.524cm" svg:x="1.059cm" svg:y="1.905cm" draw:page-number="36" presentation:class="page"/>
          <draw:frame draw:name="Google Shape;517;g3f41f0b3b82_0_62:notes" presentation:style-name="pr17" draw:text-style-name="P4" draw:layer="layout" svg:width="15.239cm" svg:height="11.429cm" svg:x="1.905cm" svg:y="12.065cm" presentation:class="notes" presentation:user-transformed="true">
            <draw:text-box>
              <text:list text:style-name="L10">
                <text:list-item>
                  <text:p text:style-name="P14"><text:span text:style-name="T14">first-n-rows and last-n-rows have exactly the same Domain and Range, but do different things. So do circle and triangle. How is it possible to have the same Domain </text:span><text:span text:style-name="T21">and</text:span><text:span text:style-name="T14"> Range, and behave so differently?</text:span></text:p>
                </text:list-item>
              </text:list>
              <text:list text:style-name="L7">
                <text:list-item>
                  <text:p text:style-name="P14"><text:span text:style-name="T15">What a function </text:span><text:span text:style-name="T21">needs</text:span><text:span text:style-name="T15"> is not the same as what it </text:span><text:span text:style-name="T21">does</text:span><text:span text:style-name="T15">.</text:span></text:p>
                </text:list-item>
                <text:list-item>
                  <text:p text:style-name="P14"><text:span text:style-name="T14">Why did sort need more arguments in its Domain than either of the other two?</text:span></text:p>
                </text:list-item>
                <text:list-item>
                  <text:p text:style-name="P14"><text:span text:style-name="T15">It needed to know more things!</text:span></text:p>
                </text:list-item>
              </text:list>
              <text:p text:style-name="P3"><text:span text:style-name="T16"/></text:p>
            </draw:text-box>
          </draw:frame>
        </presentation:notes>
      </draw:page>
      <draw:page draw:name="Introducing Contracts" draw:style-name="dp1" draw:master-page-name="TITLE_5f_AND_5f_BODY_5f_2_5f_1_5f_1">
        <draw:frame draw:name="Google Shape;525;p89" presentation:style-name="pr15" draw:text-style-name="P10" draw:layer="layout" svg:width="21.908cm" svg:height="1.59cm" svg:x="3.356cm" svg:y="0.178cm" presentation:class="title" presentation:user-transformed="true">
          <draw:text-box>
            <text:p text:style-name="P9"><text:span text:style-name="T11">Introducing Contracts</text:span></text:p>
          </draw:text-box>
        </draw:frame>
        <draw:frame draw:name="Google Shape;526;p89" presentation:style-name="pr16" draw:text-style-name="P8" draw:layer="layout" svg:width="21.327cm" svg:height="9.489cm" svg:x="3.26cm" svg:y="2.72cm" presentation:class="outline" presentation:user-transformed="true">
          <draw:text-box>
            <text:p text:style-name="P5"><text:span text:style-name="T4">Why would a spell checking app need to use Row Accessor functions?</text:span></text:p>
            <text:p text:style-name="P7"><text:span text:style-name="T10"/></text:p>
          </draw:text-box>
        </draw:frame>
        <presentation:notes draw:style-name="dp2">
          <draw:page-thumbnail draw:name="Google Shape;522;g3f41f0b3b82_0_67:notes" draw:style-name="gr1" draw:layer="layout" svg:width="16.932cm" svg:height="9.524cm" svg:x="1.059cm" svg:y="1.905cm" draw:page-number="37" presentation:class="page"/>
          <draw:frame draw:name="Google Shape;523;g3f41f0b3b82_0_67:notes" presentation:style-name="pr17" draw:text-style-name="P4" draw:layer="layout" svg:width="15.239cm" svg:height="11.429cm" svg:x="1.905cm" svg:y="12.065cm" presentation:class="notes" presentation:user-transformed="true">
            <draw:text-box>
              <text:list text:style-name="L7">
                <text:list-item>
                  <text:p text:style-name="P14"><text:span text:style-name="T3">Why would a spell checking app need to use Row Accessor functions?</text:span></text:p>
                </text:list-item>
                <text:list-item>
                  <text:p text:style-name="P14"><text:span text:style-name="T29">Because we want to suggest a word, not a whole row of a table!</text:span></text:p>
                </text:list-item>
                <text:list-item>
                  <text:p text:style-name="P14"><text:span text:style-name="T29">And we might want to take the edit-number into consideration when we make our suggestion.</text:span></text:p>
                </text:list-item>
              </text:list>
              <text:p text:style-name="P3"><text:span text:style-name="T2"/></text:p>
            </draw:text-box>
          </draw:frame>
        </presentation:notes>
      </draw:page>
      <draw:page draw:name="Composing with Circles of Evaluation" draw:style-name="dp1" draw:master-page-name="TITLE_5f_AND_5f_BODY_5f_2">
        <draw:frame draw:name="Google Shape;531;p90" presentation:style-name="pr18" draw:text-style-name="P8" draw:layer="layout" svg:width="20.699cm" svg:height="9.489cm" svg:x="3.578cm" svg:y="2.786cm" presentation:class="outline" presentation:user-transformed="true">
          <draw:text-box>
            <text:p text:style-name="P5"><text:span text:style-name="T4">Your cell phone doesn't show you every possible suggestion:</text:span></text:p>
            <text:list text:style-name="L5">
              <text:list-item>
                <text:p text:style-name="P6"><text:span text:style-name="T4">It only shows you the top 3-5</text:span></text:p>
              </text:list-item>
              <text:list-item>
                <text:p text:style-name="P5"><text:span text:style-name="T4">It usually sorts them by edit-distance (smaller mistakes first)</text:span></text:p>
              </text:list-item>
            </text:list>
            <text:p text:style-name="P6"><text:span text:style-name="T4">How do you think the functions you've learned could be used to do the same thing? Discuss with the other students at your table or nearby.</text:span></text:p>
            <text:p text:style-name="P7"><text:span text:style-name="T10"/></text:p>
          </draw:text-box>
        </draw:frame>
        <draw:frame draw:name="Google Shape;532;p90" presentation:style-name="pr19" draw:text-style-name="P10" draw:layer="layout" svg:width="21.908cm" svg:height="1.59cm" svg:x="3.356cm" svg:y="0.178cm" presentation:class="title" presentation:user-transformed="true">
          <draw:text-box>
            <text:p text:style-name="P9"><text:span text:style-name="T11">Composing with Circles of Evaluation</text:span></text:p>
          </draw:text-box>
        </draw:frame>
        <presentation:notes draw:style-name="dp2">
          <draw:page-thumbnail draw:name="Google Shape;528;g3f41f0b3b82_0_72:notes" draw:style-name="gr1" draw:layer="layout" svg:width="16.932cm" svg:height="9.524cm" svg:x="1.059cm" svg:y="1.905cm" draw:page-number="38" presentation:class="page"/>
          <draw:frame draw:name="Google Shape;529;g3f41f0b3b82_0_72:notes" presentation:style-name="pr20" draw:text-style-name="P4" draw:layer="layout" svg:width="15.239cm" svg:height="11.429cm" svg:x="1.905cm" svg:y="12.065cm" presentation:class="notes" presentation:user-transformed="true">
            <draw:text-box>
              <text:p text:style-name="P3"><text:span text:style-name="T2">Have students share their ideas</text:span></text:p>
              <text:p text:style-name="P3"><text:span text:style-name="T2"/></text:p>
            </draw:text-box>
          </draw:frame>
        </presentation:notes>
      </draw:page>
      <draw:page draw:name="Composing with Circles of Evaluation" draw:style-name="dp1" draw:master-page-name="TITLE_5f_AND_5f_BODY_5f_2">
        <draw:frame draw:name="Google Shape;537;p91" presentation:style-name="pr18" draw:text-style-name="P8" draw:layer="layout" svg:width="20.699cm" svg:height="9.489cm" svg:x="3.578cm" svg:y="2.786cm" presentation:class="outline" presentation:user-transformed="true">
          <draw:text-box>
            <text:p text:style-name="P5"><text:span text:style-name="T4">What if we wanted to sort </text:span><text:span text:style-name="T9">and</text:span><text:span text:style-name="T4"> trim our tables?</text:span></text:p>
            <text:list text:style-name="L5">
              <text:list-item>
                <text:p text:style-name="P6"><text:span text:style-name="T4">By looking at the Range, we know that </text:span><text:span text:style-name="T13">sort</text:span><text:span text:style-name="T4"> produces a Table</text:span></text:p>
              </text:list-item>
            </text:list>
            <text:p text:style-name="P6"><text:span text:style-name="T4"/></text:p>
            <text:p text:style-name="P6"><text:span text:style-name="T4"/></text:p>
            <text:list text:continue-numbering="true" text:style-name="L5">
              <text:list-item>
                <text:p text:style-name="P6"><text:span text:style-name="T4">By looking at the Domain, we know that </text:span><text:span text:style-name="T13">first-n-rows</text:span><text:span text:style-name="T4"> </text:span><text:span text:style-name="T9">consumes</text:span><text:span text:style-name="T4"> a Table</text:span></text:p>
              </text:list-item>
            </text:list>
            <text:p text:style-name="P6"><text:span text:style-name="T4"/></text:p>
            <text:p text:style-name="P6"><text:span text:style-name="T4"/></text:p>
            <text:p text:style-name="P6"><text:span text:style-name="T9">But how could the </text:span><text:span text:style-name="T24">sort</text:span><text:span text:style-name="T9"> and </text:span><text:span text:style-name="T24">first-n-rows</text:span><text:span text:style-name="T9"> functions work together?</text:span></text:p>
            <text:p text:style-name="P7"><text:span text:style-name="T10"/></text:p>
          </draw:text-box>
        </draw:frame>
        <draw:frame draw:name="Google Shape;538;p91" presentation:style-name="pr19" draw:text-style-name="P10" draw:layer="layout" svg:width="21.908cm" svg:height="1.59cm" svg:x="3.356cm" svg:y="0.178cm" presentation:class="title" presentation:user-transformed="true">
          <draw:text-box>
            <text:p text:style-name="P9"><text:span text:style-name="T11">Composing with Circles of Evaluation</text:span></text:p>
          </draw:text-box>
        </draw:frame>
        <draw:frame draw:name="Google Shape;539;p91" draw:style-name="gr2" draw:text-style-name="P11" draw:layer="layout" svg:width="13.475cm" svg:height="1.59cm" svg:x="5.962cm" svg:y="5.321cm">
          <draw:image xlink:href="Pictures/10000201000002E100000057D842AD0043EA2D7E.png" xlink:type="simple" xlink:show="embed" xlink:actuate="onLoad">
            <text:p/>
          </draw:image>
        </draw:frame>
        <draw:frame draw:name="Google Shape;540;p91" draw:style-name="gr2" draw:text-style-name="P11" draw:layer="layout" svg:width="13.146cm" svg:height="1.59cm" svg:x="6.127cm" svg:y="9.586cm">
          <draw:image xlink:href="Pictures/10000201000002CF000000574CCA04CE4AE28230.png" xlink:type="simple" xlink:show="embed" xlink:actuate="onLoad">
            <text:p/>
          </draw:image>
        </draw:frame>
        <presentation:notes draw:style-name="dp2">
          <draw:page-thumbnail draw:name="Google Shape;534;g3f41f0b3b82_0_77:notes" draw:style-name="gr1" draw:layer="layout" svg:width="16.932cm" svg:height="9.524cm" svg:x="1.059cm" svg:y="1.905cm" draw:page-number="39" presentation:class="page"/>
          <draw:frame draw:name="Google Shape;535;g3f41f0b3b82_0_77:notes" presentation:style-name="pr36" draw:text-style-name="P12" draw:layer="layout" svg:width="15.239cm" svg:height="11.429cm" svg:x="1.905cm" svg:y="12.065cm" presentation:class="notes" presentation:placeholder="true" presentation:user-transformed="true">
            <draw:text-box/>
          </draw:frame>
        </presentation:notes>
      </draw:page>
      <draw:page draw:name="Composing with Circles of Evaluation" draw:style-name="dp1" draw:master-page-name="TITLE_5f_AND_5f_BODY_5f_2_5f_1">
        <draw:frame draw:name="Google Shape;545;p92" presentation:style-name="pr10" draw:text-style-name="P10" draw:layer="layout" svg:width="21.908cm" svg:height="1.59cm" svg:x="3.356cm" svg:y="0.178cm" presentation:class="title" presentation:user-transformed="true">
          <draw:text-box>
            <text:p text:style-name="P9"><text:span text:style-name="T11">Composing with Circles of Evaluation</text:span></text:p>
          </draw:text-box>
        </draw:frame>
        <draw:frame draw:name="Google Shape;546;p92" presentation:style-name="pr11" draw:text-style-name="P8" draw:layer="layout" svg:width="21.032cm" svg:height="9.489cm" svg:x="3.602cm" svg:y="2.707cm" presentation:class="outline" presentation:user-transformed="true">
          <draw:text-box>
            <text:p text:style-name="P5"><text:span text:style-name="T25">One way to organize our thoughts is to diagram what we want to do. </text:span><text:span text:style-name="T26">Circles of Evaluation</text:span><text:span text:style-name="T25"> help us think about what we want to do, without worrying about syntax like quotation marks, parentheses, etc. They let us use all our brains for </text:span><text:span text:style-name="T27">thinking</text:span><text:span text:style-name="T25">, before we use them for </text:span><text:span text:style-name="T27">coding</text:span><text:span text:style-name="T25">.</text:span></text:p>
            <text:p text:style-name="P6"><text:span text:style-name="T25">The rules are simple:</text:span></text:p>
            <text:p text:style-name="P6"><text:span text:style-name="T25">(1) Every Circle of Evaluation must have one -- and only one! -- function, written at the top.</text:span></text:p>
            <text:p text:style-name="P6"><text:span text:style-name="T25">(2) The arguments of the function are written left-to-right, in the middle of the Circle.</text:span></text:p>
            <text:list text:style-name="L11">
              <text:list-item>
                <text:p text:style-name="P6"><text:span text:style-name="T25">Values like Numbers, String, and Booleans are still written by themselves. It’s only when we want to </text:span><text:span text:style-name="T27">use a function</text:span><text:span text:style-name="T25"> that we need to draw a nested Circle.</text:span></text:p>
              </text:list-item>
            </text:list>
            <text:p text:style-name="P6"><text:span text:style-name="T25">(3) Circles can contain other Circles!</text:span></text:p>
            <text:p text:style-name="P7"><text:span text:style-name="T10"/></text:p>
          </draw:text-box>
        </draw:frame>
        <presentation:notes draw:style-name="dp2">
          <draw:page-thumbnail draw:name="Google Shape;542;g3f41f0b3b82_0_84:notes" draw:style-name="gr1" draw:layer="layout" svg:width="16.932cm" svg:height="9.524cm" svg:x="1.059cm" svg:y="1.905cm" draw:page-number="40" presentation:class="page"/>
          <draw:frame draw:name="Google Shape;543;g3f41f0b3b82_0_84:notes" presentation:style-name="pr37" draw:text-style-name="P12" draw:layer="layout" svg:width="15.239cm" svg:height="11.429cm" svg:x="1.905cm" svg:y="12.065cm" presentation:class="notes" presentation:placeholder="true" presentation:user-transformed="true">
            <draw:text-box/>
          </draw:frame>
        </presentation:notes>
      </draw:page>
      <draw:page draw:name="Composing with Circles of Evaluation" draw:style-name="dp1" draw:master-page-name="TITLE_5f_AND_5f_BODY_5f_2_5f_1">
        <draw:frame draw:name="Google Shape;551;p93" presentation:style-name="pr10" draw:text-style-name="P10" draw:layer="layout" svg:width="21.908cm" svg:height="1.59cm" svg:x="3.356cm" svg:y="0.178cm" presentation:class="title" presentation:user-transformed="true">
          <draw:text-box>
            <text:p text:style-name="P9"><text:span text:style-name="T11">Composing with Circles of Evaluation</text:span></text:p>
          </draw:text-box>
        </draw:frame>
        <draw:frame draw:name="Google Shape;552;p93" presentation:style-name="pr11" draw:text-style-name="P8" draw:layer="layout" svg:width="21.032cm" svg:height="9.489cm" svg:x="3.602cm" svg:y="2.707cm" presentation:class="outline" presentation:user-transformed="true">
          <draw:text-box>
            <text:list text:style-name="L5">
              <text:list-item>
                <text:p text:style-name="P13"><text:span text:style-name="T4">Suppose we want to see the top 5 results of </text:span><text:span text:style-name="T6">alt-words</text:span><text:span text:style-name="T4">, sorted by increasing edit-distance.</text:span></text:p>
              </text:list-item>
              <text:list-item>
                <text:p text:style-name="P13"><text:span text:style-name="T4">Turn to </text:span><text:span text:style-name="T5"><text:a xlink:href="https://bootstrapworld.org/materials/fall2026/en-us/lessons/programming-spelling-suggestions/pages/composing-coe.html" xlink:type="simple">Composing with Circles of Evaluation</text:a></text:span><text:span text:style-name="T4"><text:s/>and complete the Notice and Wonder section.</text:span></text:p>
              </text:list-item>
            </text:list>
            <text:p text:style-name="P7"><text:span text:style-name="T10"/></text:p>
          </draw:text-box>
        </draw:frame>
        <presentation:notes draw:style-name="dp2">
          <draw:page-thumbnail draw:name="Google Shape;548;g3f41f0b3b82_0_89:notes" draw:style-name="gr1" draw:layer="layout" svg:width="16.932cm" svg:height="9.524cm" svg:x="1.059cm" svg:y="1.905cm" draw:page-number="41" presentation:class="page"/>
          <draw:frame draw:name="Google Shape;549;g3f41f0b3b82_0_89:notes" presentation:style-name="pr38" draw:text-style-name="P12" draw:layer="layout" svg:width="15.239cm" svg:height="11.429cm" svg:x="1.905cm" svg:y="12.065cm" presentation:class="notes" presentation:placeholder="true" presentation:user-transformed="true">
            <draw:text-box/>
          </draw:frame>
        </presentation:notes>
      </draw:page>
      <draw:page draw:name="Composing with Circles of Evaluation" draw:style-name="dp1" draw:master-page-name="TITLE_5f_AND_5f_BODY_5f_2_5f_1">
        <draw:frame draw:name="Google Shape;557;p94" presentation:style-name="pr10" draw:text-style-name="P10" draw:layer="layout" svg:width="21.908cm" svg:height="1.59cm" svg:x="3.356cm" svg:y="0.178cm" presentation:class="title" presentation:user-transformed="true">
          <draw:text-box>
            <text:p text:style-name="P9"><text:span text:style-name="T11">Composing with Circles of Evaluation</text:span></text:p>
          </draw:text-box>
        </draw:frame>
        <draw:frame draw:name="Google Shape;558;p94" presentation:style-name="pr11" draw:text-style-name="P8" draw:layer="layout" svg:width="21.032cm" svg:height="9.489cm" svg:x="3.602cm" svg:y="2.707cm" presentation:class="outline" presentation:user-transformed="true">
          <draw:text-box>
            <text:p text:style-name="P5"><text:span text:style-name="T9">Circles of Evaluation let us see the structure.</text:span></text:p>
            <text:p text:style-name="P6"><text:span text:style-name="T4">What do you Notice? What do you Wonder?</text:span></text:p>
            <text:p text:style-name="P7"><text:span text:style-name="T10"/></text:p>
          </draw:text-box>
        </draw:frame>
        <draw:frame draw:name="Google Shape;559;p94" draw:style-name="gr2" draw:text-style-name="P11" draw:layer="layout" svg:width="21.155cm" svg:height="5.38cm" svg:x="2.562cm" svg:y="7.243cm">
          <draw:image xlink:href="Pictures/10000201000004F600000143EE623A988B856C1B.png" xlink:type="simple" xlink:show="embed" xlink:actuate="onLoad">
            <text:p/>
          </draw:image>
        </draw:frame>
        <presentation:notes draw:style-name="dp2">
          <draw:page-thumbnail draw:name="Google Shape;554;g3f41f0b3b82_0_94:notes" draw:style-name="gr1" draw:layer="layout" svg:width="16.932cm" svg:height="9.524cm" svg:x="1.059cm" svg:y="1.905cm" draw:page-number="42" presentation:class="page"/>
          <draw:frame draw:name="Google Shape;555;g3f41f0b3b82_0_94:notes" presentation:style-name="pr39" draw:text-style-name="P12" draw:layer="layout" svg:width="15.239cm" svg:height="11.429cm" svg:x="1.905cm" svg:y="12.065cm" presentation:class="notes" presentation:placeholder="true" presentation:user-transformed="true">
            <draw:text-box/>
          </draw:frame>
        </presentation:notes>
      </draw:page>
      <draw:page draw:name="Composing with Circles of Evaluation" draw:style-name="dp1" draw:master-page-name="TITLE_5f_AND_5f_BODY_5f_2_5f_1">
        <draw:frame draw:name="Google Shape;564;p95" presentation:style-name="pr10" draw:text-style-name="P10" draw:layer="layout" svg:width="21.908cm" svg:height="1.59cm" svg:x="3.356cm" svg:y="0.178cm" presentation:class="title" presentation:user-transformed="true">
          <draw:text-box>
            <text:p text:style-name="P9"><text:span text:style-name="T11">Composing with Circles of Evaluation</text:span></text:p>
          </draw:text-box>
        </draw:frame>
        <draw:frame draw:name="Google Shape;565;p95" presentation:style-name="pr11" draw:text-style-name="P8" draw:layer="layout" svg:width="21.032cm" svg:height="9.489cm" svg:x="3.602cm" svg:y="2.707cm" presentation:class="outline" presentation:user-transformed="true">
          <draw:text-box>
            <text:p text:style-name="P5"><text:span text:style-name="T4">To convert a Circle of Evaluation into code, we start at the outside and work our way in. After each function, we write a pair of parentheses, and then convert each argument inside the Circle.</text:span></text:p>
            <text:list text:style-name="L5">
              <text:list-item>
                <text:p text:style-name="P6"><text:span text:style-name="T4">Complete </text:span><text:span text:style-name="T5"><text:a xlink:href="https://bootstrapworld.org/materials/fall2026/en-us/lessons/programming-spelling-suggestions/pages/composing-coe.html" xlink:type="simple">Composing with Circles of Evaluation</text:a></text:span><text:span text:style-name="T4">.</text:span></text:p>
              </text:list-item>
            </text:list>
            <text:p text:style-name="P7"><text:span text:style-name="T10"/></text:p>
          </draw:text-box>
        </draw:frame>
        <draw:frame draw:name="Google Shape;566;p95" draw:style-name="gr2" draw:text-style-name="P11" draw:layer="layout" svg:width="21.155cm" svg:height="5.38cm" svg:x="2.562cm" svg:y="7.243cm">
          <draw:image xlink:href="Pictures/10000201000004F600000143EE623A988B856C1B.png" xlink:type="simple" xlink:show="embed" xlink:actuate="onLoad">
            <text:p/>
          </draw:image>
        </draw:frame>
        <presentation:notes draw:style-name="dp2">
          <draw:page-thumbnail draw:name="Google Shape;561;g3f41f0b3b82_0_100:notes" draw:style-name="gr1" draw:layer="layout" svg:width="16.932cm" svg:height="9.524cm" svg:x="1.059cm" svg:y="1.905cm" draw:page-number="43" presentation:class="page"/>
          <draw:frame draw:name="Google Shape;562;g3f41f0b3b82_0_100:notes" presentation:style-name="pr40" draw:text-style-name="P12" draw:layer="layout" svg:width="15.239cm" svg:height="11.429cm" svg:x="1.905cm" svg:y="12.065cm" presentation:class="notes" presentation:placeholder="true" presentation:user-transformed="true">
            <draw:text-box/>
          </draw:frame>
        </presentation:notes>
      </draw:page>
      <draw:page draw:name="Composing with Circles of Evaluation" draw:style-name="dp1" draw:master-page-name="TITLE_5f_AND_5f_BODY_5f_2_5f_1">
        <draw:frame draw:name="Google Shape;571;p96" presentation:style-name="pr10" draw:text-style-name="P10" draw:layer="layout" svg:width="21.908cm" svg:height="1.59cm" svg:x="3.356cm" svg:y="0.178cm" presentation:class="title" presentation:user-transformed="true">
          <draw:text-box>
            <text:p text:style-name="P9"><text:span text:style-name="T11">Composing with Circles of Evaluation</text:span></text:p>
          </draw:text-box>
        </draw:frame>
        <draw:frame draw:name="Google Shape;572;p96" presentation:style-name="pr11" draw:text-style-name="P8" draw:layer="layout" svg:width="21.032cm" svg:height="9.489cm" svg:x="3.602cm" svg:y="2.707cm" presentation:class="outline" presentation:user-transformed="true">
          <draw:text-box>
            <text:p text:style-name="P5"><text:span text:style-name="T4">Pyret knows about more than just Numbers, String, Booleans, and Tables! It can also make </text:span><text:span text:style-name="T9">Images</text:span><text:span text:style-name="T4">.</text:span></text:p>
            <text:list text:style-name="L5">
              <text:list-item>
                <text:p text:style-name="P6"><text:span text:style-name="T4">Have some fun with </text:span><text:span text:style-name="T5"><text:a xlink:href="https://bootstrapworld.org/materials/fall2026/en-us/lessons/programming-spelling-suggestions/pages/spellchecker-UI.html" xlink:type="simple">User Interface for our Spelling Checker</text:a></text:span><text:span text:style-name="T4">.</text:span></text:p>
              </text:list-item>
            </text:list>
            <text:p text:style-name="P7"><text:span text:style-name="T10"/></text:p>
          </draw:text-box>
        </draw:frame>
        <presentation:notes draw:style-name="dp2">
          <draw:page-thumbnail draw:name="Google Shape;568;g3f41f0b3b82_0_106:notes" draw:style-name="gr1" draw:layer="layout" svg:width="16.932cm" svg:height="9.524cm" svg:x="1.059cm" svg:y="1.905cm" draw:page-number="44" presentation:class="page"/>
          <draw:frame draw:name="Google Shape;569;g3f41f0b3b82_0_106:notes" presentation:style-name="pr12" draw:text-style-name="P4" draw:layer="layout" svg:width="15.239cm" svg:height="11.429cm" svg:x="1.905cm" svg:y="12.065cm" presentation:class="notes" presentation:user-transformed="true">
            <draw:text-box>
              <text:p text:style-name="P3"><text:span text:style-name="T3">Supporting Diverse Learners</text:span></text:p>
              <text:list text:style-name="L7">
                <text:list-item>
                  <text:p text:style-name="P3"><text:span text:style-name="T2">Image exploration is a low threshold / high-ceiling activity that should be engaging to all students.</text:span></text:p>
                </text:list-item>
                <text:list-item>
                  <text:p text:style-name="P3"><text:span text:style-name="T2">Some students may find ALL of the contracts, but most will not!</text:span></text:p>
                </text:list-item>
                <text:list-item>
                  <text:p text:style-name="P3"><text:span text:style-name="T2">When the first student in your class has successfully used the text function, give directions about which functions to prioritize with the remaining time.</text:span></text:p>
                </text:list-item>
              </text:list>
              <text:p text:style-name="P3"><text:span text:style-name="T2">For a deeper dive into Image and Table contracts, have students work on pages from </text:span><text:span text:style-name="T17"><text:a xlink:href="https://bootstrapworld.org/materials/fall2026/en-us/lessons/contracts-strings-images/index.shtml" xlink:type="simple">Contracts for Strings and Images</text:a></text:span><text:span text:style-name="T18"><text:s/>and </text:span><text:span text:style-name="T17"><text:a xlink:href="https://bootstrapworld.org/materials/fall2026/en-us/lessons/contracts-tables/index.shtml" xlink:type="simple">Contracts for Tables and Rows</text:a></text:span><text:span text:style-name="T18">.</text:span></text:p>
              <text:p text:style-name="P3"><text:span text:style-name="T18">Do not try to keep your students in lock-step. What is important here is for </text:span><text:span text:style-name="T19">everyone to have the opportunity to explore.</text:span></text:p>
              <text:p text:style-name="P3"><text:span text:style-name="T18">Students do </text:span><text:span text:style-name="T20">not</text:span><text:span text:style-name="T18"> need to find all of the contracts on this page in order to complete the lesson or the following pages. If you have to prioritize, make sure students complete the first five (up to and include </text:span><text:span text:style-name="T16">text).</text:span></text:p>
              <text:list text:continue-numbering="true" text:style-name="L7">
                <text:list-item>
                  <text:p text:style-name="P3"><text:span text:style-name="T16">Both </text:span><text:span text:style-name="T38"><text:a xlink:href="https://bootstrapworld.org/materials/fall2026/en-us/lessons/contracts-strings-images/index.shtml" xlink:type="simple">Contracts for Strings and Images</text:a></text:span><text:span text:style-name="T39"><text:s/>and </text:span><text:span text:style-name="T38"><text:a xlink:href="https://bootstrapworld.org/materials/fall2026/en-us/lessons/contracts-tables/index.shtml" xlink:type="simple">Contracts for Tables and Rows</text:a></text:span><text:span text:style-name="T39"><text:s/>include worksheets to help students practice composing functions using the Circles of Evaluation.</text:span></text:p>
                </text:list-item>
                <text:list-item>
                  <text:p text:style-name="P3"><text:span text:style-name="T39">For a more project-based approach that's suitable for a CS or Math class, teach </text:span><text:span text:style-name="T38"><text:a xlink:href="https://bootstrapworld.org/materials/fall2026/en-us/lessons/transform-compose-images/index.shtml" xlink:type="simple">Transforming and Composing Images</text:a></text:span><text:span text:style-name="T39"><text:s/>and have students tackle </text:span><text:span text:style-name="T38"><text:a xlink:href="https://bootstrapworld.org/materials/fall2026/en-us/lessons/project-logo/index.shtml" xlink:type="simple">Project: Create Your Own Logo</text:a></text:span><text:span text:style-name="T39"><text:s/>or </text:span><text:span text:style-name="T38"><text:a xlink:href="https://bootstrapworld.org/materials/fall2026/en-us/lessons/project-flags/index.shtml" xlink:type="simple">Project: Make a Flag</text:a></text:span><text:span text:style-name="T39">.</text:span></text:p>
                </text:list-item>
              </text:list>
              <text:p text:style-name="P3"><text:span text:style-name="T39"/></text:p>
            </draw:text-box>
          </draw:frame>
        </presentation:notes>
      </draw:page>
      <draw:page draw:name="Composing with Circles of Evaluation" draw:style-name="dp1" draw:master-page-name="TITLE_5f_AND_5f_BODY_5f_2_5f_1_5f_1">
        <draw:frame draw:name="Google Shape;577;p97" presentation:style-name="pr15" draw:text-style-name="P10" draw:layer="layout" svg:width="21.908cm" svg:height="1.59cm" svg:x="3.356cm" svg:y="0.178cm" presentation:class="title" presentation:user-transformed="true">
          <draw:text-box>
            <text:p text:style-name="P9"><text:span text:style-name="T11">Composing with Circles of Evaluation</text:span></text:p>
          </draw:text-box>
        </draw:frame>
        <draw:frame draw:name="Google Shape;578;p97" presentation:style-name="pr16" draw:text-style-name="P8" draw:layer="layout" svg:width="21.327cm" svg:height="9.489cm" svg:x="3.26cm" svg:y="2.72cm" presentation:class="outline" presentation:user-transformed="true">
          <draw:text-box>
            <text:p text:style-name="P5"><text:span text:style-name="T4">Why might it be useful to separate the </text:span><text:span text:style-name="T9">thinking</text:span><text:span text:style-name="T4"> and </text:span><text:span text:style-name="T9">coding</text:span><text:span text:style-name="T4"> steps? Why not just do them at the same time, all the time?</text:span></text:p>
            <text:p text:style-name="P7"><text:span text:style-name="T10"/></text:p>
          </draw:text-box>
        </draw:frame>
        <presentation:notes draw:style-name="dp2">
          <draw:page-thumbnail draw:name="Google Shape;574;g3f41f0b3b82_0_111:notes" draw:style-name="gr1" draw:layer="layout" svg:width="16.932cm" svg:height="9.524cm" svg:x="1.059cm" svg:y="1.905cm" draw:page-number="45" presentation:class="page"/>
          <draw:frame draw:name="Google Shape;575;g3f41f0b3b82_0_111:notes" presentation:style-name="pr17" draw:text-style-name="P4" draw:layer="layout" svg:width="15.239cm" svg:height="11.429cm" svg:x="1.905cm" svg:y="12.065cm" presentation:class="notes" presentation:user-transformed="true">
            <draw:text-box>
              <text:list text:style-name="L7">
                <text:list-item>
                  <text:p text:style-name="P14"><text:span text:style-name="T3">Why might it be useful to separate the </text:span><text:span text:style-name="T28">thinking</text:span><text:span text:style-name="T3"> and </text:span><text:span text:style-name="T28">coding</text:span><text:span text:style-name="T3"> steps? Why not just do them at the same time, all the time?</text:span></text:p>
                </text:list-item>
              </text:list>
              <text:p text:style-name="P3"><text:span text:style-name="T2"/></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entury Gothic" svg:font-family="'Century Gothic'"/>
    <style:font-face style:name="Courier Prime" svg:font-family="'Courier Prim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5f_HEADER_5f_1_5f_2_5f_1-background" style:display-name="SECTION_HEADER_1_2_1-background" style:family="presentation">
      <style:graphic-properties draw:stroke="none" draw:fill="solid" draw:fill-color="#ffffff"/>
      <style:text-properties style:letter-kerning="true"/>
    </style:style>
    <style:style style:name="SECTION_5f_HEADER_5f_1_5f_2_5f_1-backgroundobjects" style:display-name="SECTION_HEADER_1_2_1-backgroundobjects" style:family="presentation">
      <style:graphic-properties draw:textarea-horizontal-align="justify" draw:shadow="hidden" draw:shadow-offset-x="0.2cm" draw:shadow-offset-y="0.2cm" draw:shadow-color="#808080"/>
      <style:text-properties style:letter-kerning="true"/>
    </style:style>
    <style:style style:name="SECTION_5f_HEADER_5f_1_5f_2_5f_1-notes" style:display-name="SECTION_HEADER_1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1_5f_2_5f_1-outline1" style:display-name="SECTION_HEADER_1_2_1-outline1" style:family="presentation">
      <style:graphic-properties draw:stroke="none" draw:fill="none" draw:auto-grow-height="false" draw:fit-to-size="shrink-to-fit" style:shrink-to-fit="true">
        <text:list-style style:name="SECTION_5f_HEADER_5f_1_5f_2_5f_1-outline1" style:display-name="SECTION_HEADER_1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_5f_2_5f_1-outline2" style:display-name="SECTION_HEADER_1_2_1-outline2" style:family="presentation" style:parent-style-name="SECTION_5f_HEADER_5f_1_5f_2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2_5f_1-outline3" style:display-name="SECTION_HEADER_1_2_1-outline3" style:family="presentation" style:parent-style-name="SECTION_5f_HEADER_5f_1_5f_2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2_5f_1-outline4" style:display-name="SECTION_HEADER_1_2_1-outline4" style:family="presentation" style:parent-style-name="SECTION_5f_HEADER_5f_1_5f_2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2_5f_1-outline5" style:display-name="SECTION_HEADER_1_2_1-outline5" style:family="presentation" style:parent-style-name="SECTION_5f_HEADER_5f_1_5f_2_5f_1-outline4">
      <style:paragraph-properties fo:margin-top="0.1cm" fo:margin-bottom="0cm"/>
      <style:text-properties fo:font-size="20pt" style:font-size-asian="20pt" style:font-size-complex="20pt"/>
    </style:style>
    <style:style style:name="SECTION_5f_HEADER_5f_1_5f_2_5f_1-outline6" style:display-name="SECTION_HEADER_1_2_1-outline6" style:family="presentation" style:parent-style-name="SECTION_5f_HEADER_5f_1_5f_2_5f_1-outline5">
      <style:paragraph-properties fo:margin-top="0.1cm" fo:margin-bottom="0cm"/>
      <style:text-properties fo:font-size="20pt" style:font-size-asian="20pt" style:font-size-complex="20pt"/>
    </style:style>
    <style:style style:name="SECTION_5f_HEADER_5f_1_5f_2_5f_1-outline7" style:display-name="SECTION_HEADER_1_2_1-outline7" style:family="presentation" style:parent-style-name="SECTION_5f_HEADER_5f_1_5f_2_5f_1-outline6">
      <style:paragraph-properties fo:margin-top="0.1cm" fo:margin-bottom="0cm"/>
      <style:text-properties fo:font-size="20pt" style:font-size-asian="20pt" style:font-size-complex="20pt"/>
    </style:style>
    <style:style style:name="SECTION_5f_HEADER_5f_1_5f_2_5f_1-outline8" style:display-name="SECTION_HEADER_1_2_1-outline8" style:family="presentation" style:parent-style-name="SECTION_5f_HEADER_5f_1_5f_2_5f_1-outline7">
      <style:paragraph-properties fo:margin-top="0.1cm" fo:margin-bottom="0cm"/>
      <style:text-properties fo:font-size="20pt" style:font-size-asian="20pt" style:font-size-complex="20pt"/>
    </style:style>
    <style:style style:name="SECTION_5f_HEADER_5f_1_5f_2_5f_1-outline9" style:display-name="SECTION_HEADER_1_2_1-outline9" style:family="presentation" style:parent-style-name="SECTION_5f_HEADER_5f_1_5f_2_5f_1-outline8">
      <style:paragraph-properties fo:margin-top="0.1cm" fo:margin-bottom="0cm"/>
      <style:text-properties fo:font-size="20pt" style:font-size-asian="20pt" style:font-size-complex="20pt"/>
    </style:style>
    <style:style style:name="SECTION_5f_HEADER_5f_1_5f_2_5f_1-subtitle" style:display-name="SECTION_HEADER_1_2_1-subtitle" style:family="presentation">
      <style:graphic-properties draw:stroke="none" draw:fill="none" draw:textarea-vertical-align="middle">
        <text:list-style style:name="SECTION_5f_HEADER_5f_1_5f_2_5f_1-subtitle" style:display-name="SECTION_HEADER_1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1_5f_2_5f_1-title" style:display-name="SECTION_HEADER_1_2_1-title" style:family="presentation">
      <style:graphic-properties draw:stroke="none" draw:fill="none" draw:textarea-vertical-align="middle">
        <text:list-style style:name="SECTION_5f_HEADER_5f_1_5f_2_5f_1-title" style:display-name="SECTION_HEADER_1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2-background" style:display-name="TITLE_AND_BODY_2_2-background" style:family="presentation">
      <style:graphic-properties draw:stroke="none" draw:fill="solid" draw:fill-color="#ffffff"/>
      <style:text-properties style:letter-kerning="true"/>
    </style:style>
    <style:style style:name="TITLE_5f_AND_5f_BODY_5f_2_5f_2-backgroundobjects" style:display-name="TITLE_AND_BODY_2_2-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2_5f_2-notes" style:display-name="TITLE_AND_BODY_2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2_5f_2-outline1" style:display-name="TITLE_AND_BODY_2_2-outline1" style:family="presentation">
      <style:graphic-properties draw:stroke="none" draw:fill="none" draw:auto-grow-height="false" draw:fit-to-size="shrink-to-fit" style:shrink-to-fit="true">
        <text:list-style style:name="TITLE_5f_AND_5f_BODY_5f_2_5f_2-outline1" style:display-name="TITLE_AND_BODY_2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2-outline2" style:display-name="TITLE_AND_BODY_2_2-outline2" style:family="presentation" style:parent-style-name="TITLE_5f_AND_5f_BODY_5f_2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2-outline3" style:display-name="TITLE_AND_BODY_2_2-outline3" style:family="presentation" style:parent-style-name="TITLE_5f_AND_5f_BODY_5f_2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2-outline4" style:display-name="TITLE_AND_BODY_2_2-outline4" style:family="presentation" style:parent-style-name="TITLE_5f_AND_5f_BODY_5f_2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2-outline5" style:display-name="TITLE_AND_BODY_2_2-outline5" style:family="presentation" style:parent-style-name="TITLE_5f_AND_5f_BODY_5f_2_5f_2-outline4">
      <style:paragraph-properties fo:margin-top="0.1cm" fo:margin-bottom="0cm"/>
      <style:text-properties fo:font-size="20pt" style:font-size-asian="20pt" style:font-size-complex="20pt"/>
    </style:style>
    <style:style style:name="TITLE_5f_AND_5f_BODY_5f_2_5f_2-outline6" style:display-name="TITLE_AND_BODY_2_2-outline6" style:family="presentation" style:parent-style-name="TITLE_5f_AND_5f_BODY_5f_2_5f_2-outline5">
      <style:paragraph-properties fo:margin-top="0.1cm" fo:margin-bottom="0cm"/>
      <style:text-properties fo:font-size="20pt" style:font-size-asian="20pt" style:font-size-complex="20pt"/>
    </style:style>
    <style:style style:name="TITLE_5f_AND_5f_BODY_5f_2_5f_2-outline7" style:display-name="TITLE_AND_BODY_2_2-outline7" style:family="presentation" style:parent-style-name="TITLE_5f_AND_5f_BODY_5f_2_5f_2-outline6">
      <style:paragraph-properties fo:margin-top="0.1cm" fo:margin-bottom="0cm"/>
      <style:text-properties fo:font-size="20pt" style:font-size-asian="20pt" style:font-size-complex="20pt"/>
    </style:style>
    <style:style style:name="TITLE_5f_AND_5f_BODY_5f_2_5f_2-outline8" style:display-name="TITLE_AND_BODY_2_2-outline8" style:family="presentation" style:parent-style-name="TITLE_5f_AND_5f_BODY_5f_2_5f_2-outline7">
      <style:paragraph-properties fo:margin-top="0.1cm" fo:margin-bottom="0cm"/>
      <style:text-properties fo:font-size="20pt" style:font-size-asian="20pt" style:font-size-complex="20pt"/>
    </style:style>
    <style:style style:name="TITLE_5f_AND_5f_BODY_5f_2_5f_2-outline9" style:display-name="TITLE_AND_BODY_2_2-outline9" style:family="presentation" style:parent-style-name="TITLE_5f_AND_5f_BODY_5f_2_5f_2-outline8">
      <style:paragraph-properties fo:margin-top="0.1cm" fo:margin-bottom="0cm"/>
      <style:text-properties fo:font-size="20pt" style:font-size-asian="20pt" style:font-size-complex="20pt"/>
    </style:style>
    <style:style style:name="TITLE_5f_AND_5f_BODY_5f_2_5f_2-subtitle" style:display-name="TITLE_AND_BODY_2_2-subtitle" style:family="presentation">
      <style:graphic-properties draw:stroke="none" draw:fill="none" draw:textarea-vertical-align="middle">
        <text:list-style style:name="TITLE_5f_AND_5f_BODY_5f_2_5f_2-subtitle" style:display-name="TITLE_AND_BODY_2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2_5f_2-title" style:display-name="TITLE_AND_BODY_2_2-title" style:family="presentation">
      <style:graphic-properties draw:stroke="none" draw:fill="none" draw:textarea-vertical-align="middle">
        <text:list-style style:name="TITLE_5f_AND_5f_BODY_5f_2_5f_2-title" style:display-name="TITLE_AND_BODY_2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1_5f_5-background" style:display-name="TITLE_AND_BODY_2_1_5-background" style:family="presentation">
      <style:graphic-properties draw:stroke="none" draw:fill="solid" draw:fill-color="#ffffff"/>
      <style:text-properties style:letter-kerning="true"/>
    </style:style>
    <style:style style:name="TITLE_5f_AND_5f_BODY_5f_2_5f_1_5f_5-backgroundobjects" style:display-name="TITLE_AND_BODY_2_1_5-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2_5f_1_5f_5-notes" style:display-name="TITLE_AND_BODY_2_1_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2_5f_1_5f_5-outline1" style:display-name="TITLE_AND_BODY_2_1_5-outline1" style:family="presentation">
      <style:graphic-properties draw:stroke="none" draw:fill="none" draw:auto-grow-height="false" draw:fit-to-size="shrink-to-fit" style:shrink-to-fit="true">
        <text:list-style style:name="TITLE_5f_AND_5f_BODY_5f_2_5f_1_5f_5-outline1" style:display-name="TITLE_AND_BODY_2_1_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1_5f_5-outline2" style:display-name="TITLE_AND_BODY_2_1_5-outline2" style:family="presentation" style:parent-style-name="TITLE_5f_AND_5f_BODY_5f_2_5f_1_5f_5-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_5f_5-outline3" style:display-name="TITLE_AND_BODY_2_1_5-outline3" style:family="presentation" style:parent-style-name="TITLE_5f_AND_5f_BODY_5f_2_5f_1_5f_5-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_5f_5-outline4" style:display-name="TITLE_AND_BODY_2_1_5-outline4" style:family="presentation" style:parent-style-name="TITLE_5f_AND_5f_BODY_5f_2_5f_1_5f_5-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_5f_5-outline5" style:display-name="TITLE_AND_BODY_2_1_5-outline5" style:family="presentation" style:parent-style-name="TITLE_5f_AND_5f_BODY_5f_2_5f_1_5f_5-outline4">
      <style:paragraph-properties fo:margin-top="0.1cm" fo:margin-bottom="0cm"/>
      <style:text-properties fo:font-size="20pt" style:font-size-asian="20pt" style:font-size-complex="20pt"/>
    </style:style>
    <style:style style:name="TITLE_5f_AND_5f_BODY_5f_2_5f_1_5f_5-outline6" style:display-name="TITLE_AND_BODY_2_1_5-outline6" style:family="presentation" style:parent-style-name="TITLE_5f_AND_5f_BODY_5f_2_5f_1_5f_5-outline5">
      <style:paragraph-properties fo:margin-top="0.1cm" fo:margin-bottom="0cm"/>
      <style:text-properties fo:font-size="20pt" style:font-size-asian="20pt" style:font-size-complex="20pt"/>
    </style:style>
    <style:style style:name="TITLE_5f_AND_5f_BODY_5f_2_5f_1_5f_5-outline7" style:display-name="TITLE_AND_BODY_2_1_5-outline7" style:family="presentation" style:parent-style-name="TITLE_5f_AND_5f_BODY_5f_2_5f_1_5f_5-outline6">
      <style:paragraph-properties fo:margin-top="0.1cm" fo:margin-bottom="0cm"/>
      <style:text-properties fo:font-size="20pt" style:font-size-asian="20pt" style:font-size-complex="20pt"/>
    </style:style>
    <style:style style:name="TITLE_5f_AND_5f_BODY_5f_2_5f_1_5f_5-outline8" style:display-name="TITLE_AND_BODY_2_1_5-outline8" style:family="presentation" style:parent-style-name="TITLE_5f_AND_5f_BODY_5f_2_5f_1_5f_5-outline7">
      <style:paragraph-properties fo:margin-top="0.1cm" fo:margin-bottom="0cm"/>
      <style:text-properties fo:font-size="20pt" style:font-size-asian="20pt" style:font-size-complex="20pt"/>
    </style:style>
    <style:style style:name="TITLE_5f_AND_5f_BODY_5f_2_5f_1_5f_5-outline9" style:display-name="TITLE_AND_BODY_2_1_5-outline9" style:family="presentation" style:parent-style-name="TITLE_5f_AND_5f_BODY_5f_2_5f_1_5f_5-outline8">
      <style:paragraph-properties fo:margin-top="0.1cm" fo:margin-bottom="0cm"/>
      <style:text-properties fo:font-size="20pt" style:font-size-asian="20pt" style:font-size-complex="20pt"/>
    </style:style>
    <style:style style:name="TITLE_5f_AND_5f_BODY_5f_2_5f_1_5f_5-subtitle" style:display-name="TITLE_AND_BODY_2_1_5-subtitle" style:family="presentation">
      <style:graphic-properties draw:stroke="none" draw:fill="none" draw:textarea-vertical-align="middle">
        <text:list-style style:name="TITLE_5f_AND_5f_BODY_5f_2_5f_1_5f_5-subtitle" style:display-name="TITLE_AND_BODY_2_1_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2_5f_1_5f_5-title" style:display-name="TITLE_AND_BODY_2_1_5-title" style:family="presentation">
      <style:graphic-properties draw:stroke="none" draw:fill="none" draw:textarea-vertical-align="middle">
        <text:list-style style:name="TITLE_5f_AND_5f_BODY_5f_2_5f_1_5f_5-title" style:display-name="TITLE_AND_BODY_2_1_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1-background" style:display-name="TITLE_AND_BODY_2_1-background" style:family="presentation">
      <style:graphic-properties draw:stroke="none" draw:fill="solid" draw:fill-color="#ffffff"/>
      <style:text-properties style:letter-kerning="true"/>
    </style:style>
    <style:style style:name="TITLE_5f_AND_5f_BODY_5f_2_5f_1-backgroundobjects" style:display-name="TITLE_AND_BODY_2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2_5f_1-notes" style:display-name="TITLE_AND_BODY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2_5f_1-outline1" style:display-name="TITLE_AND_BODY_2_1-outline1" style:family="presentation">
      <style:graphic-properties draw:stroke="none" draw:fill="none" draw:auto-grow-height="false" draw:fit-to-size="shrink-to-fit" style:shrink-to-fit="true">
        <text:list-style style:name="TITLE_5f_AND_5f_BODY_5f_2_5f_1-outline1" style:display-name="TITLE_AND_BODY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1-outline2" style:display-name="TITLE_AND_BODY_2_1-outline2" style:family="presentation" style:parent-style-name="TITLE_5f_AND_5f_BODY_5f_2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outline3" style:display-name="TITLE_AND_BODY_2_1-outline3" style:family="presentation" style:parent-style-name="TITLE_5f_AND_5f_BODY_5f_2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outline4" style:display-name="TITLE_AND_BODY_2_1-outline4" style:family="presentation" style:parent-style-name="TITLE_5f_AND_5f_BODY_5f_2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outline5" style:display-name="TITLE_AND_BODY_2_1-outline5" style:family="presentation" style:parent-style-name="TITLE_5f_AND_5f_BODY_5f_2_5f_1-outline4">
      <style:paragraph-properties fo:margin-top="0.1cm" fo:margin-bottom="0cm"/>
      <style:text-properties fo:font-size="20pt" style:font-size-asian="20pt" style:font-size-complex="20pt"/>
    </style:style>
    <style:style style:name="TITLE_5f_AND_5f_BODY_5f_2_5f_1-outline6" style:display-name="TITLE_AND_BODY_2_1-outline6" style:family="presentation" style:parent-style-name="TITLE_5f_AND_5f_BODY_5f_2_5f_1-outline5">
      <style:paragraph-properties fo:margin-top="0.1cm" fo:margin-bottom="0cm"/>
      <style:text-properties fo:font-size="20pt" style:font-size-asian="20pt" style:font-size-complex="20pt"/>
    </style:style>
    <style:style style:name="TITLE_5f_AND_5f_BODY_5f_2_5f_1-outline7" style:display-name="TITLE_AND_BODY_2_1-outline7" style:family="presentation" style:parent-style-name="TITLE_5f_AND_5f_BODY_5f_2_5f_1-outline6">
      <style:paragraph-properties fo:margin-top="0.1cm" fo:margin-bottom="0cm"/>
      <style:text-properties fo:font-size="20pt" style:font-size-asian="20pt" style:font-size-complex="20pt"/>
    </style:style>
    <style:style style:name="TITLE_5f_AND_5f_BODY_5f_2_5f_1-outline8" style:display-name="TITLE_AND_BODY_2_1-outline8" style:family="presentation" style:parent-style-name="TITLE_5f_AND_5f_BODY_5f_2_5f_1-outline7">
      <style:paragraph-properties fo:margin-top="0.1cm" fo:margin-bottom="0cm"/>
      <style:text-properties fo:font-size="20pt" style:font-size-asian="20pt" style:font-size-complex="20pt"/>
    </style:style>
    <style:style style:name="TITLE_5f_AND_5f_BODY_5f_2_5f_1-outline9" style:display-name="TITLE_AND_BODY_2_1-outline9" style:family="presentation" style:parent-style-name="TITLE_5f_AND_5f_BODY_5f_2_5f_1-outline8">
      <style:paragraph-properties fo:margin-top="0.1cm" fo:margin-bottom="0cm"/>
      <style:text-properties fo:font-size="20pt" style:font-size-asian="20pt" style:font-size-complex="20pt"/>
    </style:style>
    <style:style style:name="TITLE_5f_AND_5f_BODY_5f_2_5f_1-subtitle" style:display-name="TITLE_AND_BODY_2_1-subtitle" style:family="presentation">
      <style:graphic-properties draw:stroke="none" draw:fill="none" draw:textarea-vertical-align="middle">
        <text:list-style style:name="TITLE_5f_AND_5f_BODY_5f_2_5f_1-subtitle" style:display-name="TITLE_AND_BODY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2_5f_1-title" style:display-name="TITLE_AND_BODY_2_1-title" style:family="presentation">
      <style:graphic-properties draw:stroke="none" draw:fill="none" draw:textarea-vertical-align="middle">
        <text:list-style style:name="TITLE_5f_AND_5f_BODY_5f_2_5f_1-title" style:display-name="TITLE_AND_BODY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1_5f_1-background" style:display-name="TITLE_AND_BODY_2_1_1-background" style:family="presentation">
      <style:graphic-properties draw:stroke="none" draw:fill="solid" draw:fill-color="#ffffff"/>
      <style:text-properties style:letter-kerning="true"/>
    </style:style>
    <style:style style:name="TITLE_5f_AND_5f_BODY_5f_2_5f_1_5f_1-backgroundobjects" style:display-name="TITLE_AND_BODY_2_1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2_5f_1_5f_1-notes" style:display-name="TITLE_AND_BODY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2_5f_1_5f_1-outline1" style:display-name="TITLE_AND_BODY_2_1_1-outline1" style:family="presentation">
      <style:graphic-properties draw:stroke="none" draw:fill="none" draw:auto-grow-height="false" draw:fit-to-size="shrink-to-fit" style:shrink-to-fit="true">
        <text:list-style style:name="TITLE_5f_AND_5f_BODY_5f_2_5f_1_5f_1-outline1" style:display-name="TITLE_AND_BODY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1_5f_1-outline2" style:display-name="TITLE_AND_BODY_2_1_1-outline2" style:family="presentation" style:parent-style-name="TITLE_5f_AND_5f_BODY_5f_2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_5f_1-outline3" style:display-name="TITLE_AND_BODY_2_1_1-outline3" style:family="presentation" style:parent-style-name="TITLE_5f_AND_5f_BODY_5f_2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_5f_1-outline4" style:display-name="TITLE_AND_BODY_2_1_1-outline4" style:family="presentation" style:parent-style-name="TITLE_5f_AND_5f_BODY_5f_2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_5f_1-outline5" style:display-name="TITLE_AND_BODY_2_1_1-outline5" style:family="presentation" style:parent-style-name="TITLE_5f_AND_5f_BODY_5f_2_5f_1_5f_1-outline4">
      <style:paragraph-properties fo:margin-top="0.1cm" fo:margin-bottom="0cm"/>
      <style:text-properties fo:font-size="20pt" style:font-size-asian="20pt" style:font-size-complex="20pt"/>
    </style:style>
    <style:style style:name="TITLE_5f_AND_5f_BODY_5f_2_5f_1_5f_1-outline6" style:display-name="TITLE_AND_BODY_2_1_1-outline6" style:family="presentation" style:parent-style-name="TITLE_5f_AND_5f_BODY_5f_2_5f_1_5f_1-outline5">
      <style:paragraph-properties fo:margin-top="0.1cm" fo:margin-bottom="0cm"/>
      <style:text-properties fo:font-size="20pt" style:font-size-asian="20pt" style:font-size-complex="20pt"/>
    </style:style>
    <style:style style:name="TITLE_5f_AND_5f_BODY_5f_2_5f_1_5f_1-outline7" style:display-name="TITLE_AND_BODY_2_1_1-outline7" style:family="presentation" style:parent-style-name="TITLE_5f_AND_5f_BODY_5f_2_5f_1_5f_1-outline6">
      <style:paragraph-properties fo:margin-top="0.1cm" fo:margin-bottom="0cm"/>
      <style:text-properties fo:font-size="20pt" style:font-size-asian="20pt" style:font-size-complex="20pt"/>
    </style:style>
    <style:style style:name="TITLE_5f_AND_5f_BODY_5f_2_5f_1_5f_1-outline8" style:display-name="TITLE_AND_BODY_2_1_1-outline8" style:family="presentation" style:parent-style-name="TITLE_5f_AND_5f_BODY_5f_2_5f_1_5f_1-outline7">
      <style:paragraph-properties fo:margin-top="0.1cm" fo:margin-bottom="0cm"/>
      <style:text-properties fo:font-size="20pt" style:font-size-asian="20pt" style:font-size-complex="20pt"/>
    </style:style>
    <style:style style:name="TITLE_5f_AND_5f_BODY_5f_2_5f_1_5f_1-outline9" style:display-name="TITLE_AND_BODY_2_1_1-outline9" style:family="presentation" style:parent-style-name="TITLE_5f_AND_5f_BODY_5f_2_5f_1_5f_1-outline8">
      <style:paragraph-properties fo:margin-top="0.1cm" fo:margin-bottom="0cm"/>
      <style:text-properties fo:font-size="20pt" style:font-size-asian="20pt" style:font-size-complex="20pt"/>
    </style:style>
    <style:style style:name="TITLE_5f_AND_5f_BODY_5f_2_5f_1_5f_1-subtitle" style:display-name="TITLE_AND_BODY_2_1_1-subtitle" style:family="presentation">
      <style:graphic-properties draw:stroke="none" draw:fill="none" draw:textarea-vertical-align="middle">
        <text:list-style style:name="TITLE_5f_AND_5f_BODY_5f_2_5f_1_5f_1-subtitle" style:display-name="TITLE_AND_BODY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2_5f_1_5f_1-title" style:display-name="TITLE_AND_BODY_2_1_1-title" style:family="presentation">
      <style:graphic-properties draw:stroke="none" draw:fill="none" draw:textarea-vertical-align="middle">
        <text:list-style style:name="TITLE_5f_AND_5f_BODY_5f_2_5f_1_5f_1-title" style:display-name="TITLE_AND_BODY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background" style:display-name="TITLE_AND_BODY_2-background" style:family="presentation">
      <style:graphic-properties draw:stroke="none" draw:fill="solid" draw:fill-color="#ffffff"/>
      <style:text-properties style:letter-kerning="true"/>
    </style:style>
    <style:style style:name="TITLE_5f_AND_5f_BODY_5f_2-backgroundobjects" style:display-name="TITLE_AND_BODY_2-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2-notes" style:display-name="TITLE_AND_BODY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2-outline1" style:display-name="TITLE_AND_BODY_2-outline1" style:family="presentation">
      <style:graphic-properties draw:stroke="none" draw:fill="none" draw:auto-grow-height="false" draw:fit-to-size="shrink-to-fit" style:shrink-to-fit="true">
        <text:list-style style:name="TITLE_5f_AND_5f_BODY_5f_2-outline1" style:display-name="TITLE_AND_BODY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outline2" style:display-name="TITLE_AND_BODY_2-outline2" style:family="presentation" style:parent-style-name="TITLE_5f_AND_5f_BODY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outline3" style:display-name="TITLE_AND_BODY_2-outline3" style:family="presentation" style:parent-style-name="TITLE_5f_AND_5f_BODY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outline4" style:display-name="TITLE_AND_BODY_2-outline4" style:family="presentation" style:parent-style-name="TITLE_5f_AND_5f_BODY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outline5" style:display-name="TITLE_AND_BODY_2-outline5" style:family="presentation" style:parent-style-name="TITLE_5f_AND_5f_BODY_5f_2-outline4">
      <style:paragraph-properties fo:margin-top="0.1cm" fo:margin-bottom="0cm"/>
      <style:text-properties fo:font-size="20pt" style:font-size-asian="20pt" style:font-size-complex="20pt"/>
    </style:style>
    <style:style style:name="TITLE_5f_AND_5f_BODY_5f_2-outline6" style:display-name="TITLE_AND_BODY_2-outline6" style:family="presentation" style:parent-style-name="TITLE_5f_AND_5f_BODY_5f_2-outline5">
      <style:paragraph-properties fo:margin-top="0.1cm" fo:margin-bottom="0cm"/>
      <style:text-properties fo:font-size="20pt" style:font-size-asian="20pt" style:font-size-complex="20pt"/>
    </style:style>
    <style:style style:name="TITLE_5f_AND_5f_BODY_5f_2-outline7" style:display-name="TITLE_AND_BODY_2-outline7" style:family="presentation" style:parent-style-name="TITLE_5f_AND_5f_BODY_5f_2-outline6">
      <style:paragraph-properties fo:margin-top="0.1cm" fo:margin-bottom="0cm"/>
      <style:text-properties fo:font-size="20pt" style:font-size-asian="20pt" style:font-size-complex="20pt"/>
    </style:style>
    <style:style style:name="TITLE_5f_AND_5f_BODY_5f_2-outline8" style:display-name="TITLE_AND_BODY_2-outline8" style:family="presentation" style:parent-style-name="TITLE_5f_AND_5f_BODY_5f_2-outline7">
      <style:paragraph-properties fo:margin-top="0.1cm" fo:margin-bottom="0cm"/>
      <style:text-properties fo:font-size="20pt" style:font-size-asian="20pt" style:font-size-complex="20pt"/>
    </style:style>
    <style:style style:name="TITLE_5f_AND_5f_BODY_5f_2-outline9" style:display-name="TITLE_AND_BODY_2-outline9" style:family="presentation" style:parent-style-name="TITLE_5f_AND_5f_BODY_5f_2-outline8">
      <style:paragraph-properties fo:margin-top="0.1cm" fo:margin-bottom="0cm"/>
      <style:text-properties fo:font-size="20pt" style:font-size-asian="20pt" style:font-size-complex="20pt"/>
    </style:style>
    <style:style style:name="TITLE_5f_AND_5f_BODY_5f_2-subtitle" style:display-name="TITLE_AND_BODY_2-subtitle" style:family="presentation">
      <style:graphic-properties draw:stroke="none" draw:fill="none" draw:textarea-vertical-align="middle">
        <text:list-style style:name="TITLE_5f_AND_5f_BODY_5f_2-subtitle" style:display-name="TITLE_AND_BODY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2-title" style:display-name="TITLE_AND_BODY_2-title" style:family="presentation">
      <style:graphic-properties draw:stroke="none" draw:fill="none" draw:textarea-vertical-align="middle">
        <text:list-style style:name="TITLE_5f_AND_5f_BODY_5f_2-title" style:display-name="TITLE_AND_BODY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1_5f_4-background" style:display-name="TITLE_AND_BODY_2_1_4-background" style:family="presentation">
      <style:graphic-properties draw:stroke="none" draw:fill="solid" draw:fill-color="#ffffff"/>
      <style:text-properties style:letter-kerning="true"/>
    </style:style>
    <style:style style:name="TITLE_5f_AND_5f_BODY_5f_2_5f_1_5f_4-backgroundobjects" style:display-name="TITLE_AND_BODY_2_1_4-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2_5f_1_5f_4-notes" style:display-name="TITLE_AND_BODY_2_1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2_5f_1_5f_4-outline1" style:display-name="TITLE_AND_BODY_2_1_4-outline1" style:family="presentation">
      <style:graphic-properties draw:stroke="none" draw:fill="none" draw:auto-grow-height="false" draw:fit-to-size="shrink-to-fit" style:shrink-to-fit="true">
        <text:list-style style:name="TITLE_5f_AND_5f_BODY_5f_2_5f_1_5f_4-outline1" style:display-name="TITLE_AND_BODY_2_1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_5f_1_5f_4-outline2" style:display-name="TITLE_AND_BODY_2_1_4-outline2" style:family="presentation" style:parent-style-name="TITLE_5f_AND_5f_BODY_5f_2_5f_1_5f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_5f_4-outline3" style:display-name="TITLE_AND_BODY_2_1_4-outline3" style:family="presentation" style:parent-style-name="TITLE_5f_AND_5f_BODY_5f_2_5f_1_5f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_5f_4-outline4" style:display-name="TITLE_AND_BODY_2_1_4-outline4" style:family="presentation" style:parent-style-name="TITLE_5f_AND_5f_BODY_5f_2_5f_1_5f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_5f_1_5f_4-outline5" style:display-name="TITLE_AND_BODY_2_1_4-outline5" style:family="presentation" style:parent-style-name="TITLE_5f_AND_5f_BODY_5f_2_5f_1_5f_4-outline4">
      <style:paragraph-properties fo:margin-top="0.1cm" fo:margin-bottom="0cm"/>
      <style:text-properties fo:font-size="20pt" style:font-size-asian="20pt" style:font-size-complex="20pt"/>
    </style:style>
    <style:style style:name="TITLE_5f_AND_5f_BODY_5f_2_5f_1_5f_4-outline6" style:display-name="TITLE_AND_BODY_2_1_4-outline6" style:family="presentation" style:parent-style-name="TITLE_5f_AND_5f_BODY_5f_2_5f_1_5f_4-outline5">
      <style:paragraph-properties fo:margin-top="0.1cm" fo:margin-bottom="0cm"/>
      <style:text-properties fo:font-size="20pt" style:font-size-asian="20pt" style:font-size-complex="20pt"/>
    </style:style>
    <style:style style:name="TITLE_5f_AND_5f_BODY_5f_2_5f_1_5f_4-outline7" style:display-name="TITLE_AND_BODY_2_1_4-outline7" style:family="presentation" style:parent-style-name="TITLE_5f_AND_5f_BODY_5f_2_5f_1_5f_4-outline6">
      <style:paragraph-properties fo:margin-top="0.1cm" fo:margin-bottom="0cm"/>
      <style:text-properties fo:font-size="20pt" style:font-size-asian="20pt" style:font-size-complex="20pt"/>
    </style:style>
    <style:style style:name="TITLE_5f_AND_5f_BODY_5f_2_5f_1_5f_4-outline8" style:display-name="TITLE_AND_BODY_2_1_4-outline8" style:family="presentation" style:parent-style-name="TITLE_5f_AND_5f_BODY_5f_2_5f_1_5f_4-outline7">
      <style:paragraph-properties fo:margin-top="0.1cm" fo:margin-bottom="0cm"/>
      <style:text-properties fo:font-size="20pt" style:font-size-asian="20pt" style:font-size-complex="20pt"/>
    </style:style>
    <style:style style:name="TITLE_5f_AND_5f_BODY_5f_2_5f_1_5f_4-outline9" style:display-name="TITLE_AND_BODY_2_1_4-outline9" style:family="presentation" style:parent-style-name="TITLE_5f_AND_5f_BODY_5f_2_5f_1_5f_4-outline8">
      <style:paragraph-properties fo:margin-top="0.1cm" fo:margin-bottom="0cm"/>
      <style:text-properties fo:font-size="20pt" style:font-size-asian="20pt" style:font-size-complex="20pt"/>
    </style:style>
    <style:style style:name="TITLE_5f_AND_5f_BODY_5f_2_5f_1_5f_4-subtitle" style:display-name="TITLE_AND_BODY_2_1_4-subtitle" style:family="presentation">
      <style:graphic-properties draw:stroke="none" draw:fill="none" draw:textarea-vertical-align="middle">
        <text:list-style style:name="TITLE_5f_AND_5f_BODY_5f_2_5f_1_5f_4-subtitle" style:display-name="TITLE_AND_BODY_2_1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2_5f_1_5f_4-title" style:display-name="TITLE_AND_BODY_2_1_4-title" style:family="presentation">
      <style:graphic-properties draw:stroke="none" draw:fill="none" draw:textarea-vertical-align="middle">
        <text:list-style style:name="TITLE_5f_AND_5f_BODY_5f_2_5f_1_5f_4-title" style:display-name="TITLE_AND_BODY_2_1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558cm, 0cm, 6.722cm, 0cm)" draw:image-opacity="100%" style:mirror="none"/>
    </style:style>
    <style:style style:name="Mpr1" style:family="presentation" style:parent-style-name="SECTION_5f_HEADER_5f_1_5f_2_5f_1-backgroundobjects">
      <style:graphic-properties draw:stroke="none" draw:fill="none" draw:fill-color="#ffffff" draw:auto-grow-height="false" fo:min-height="1.485cm"/>
    </style:style>
    <style:style style:name="Mpr2" style:family="presentation" style:parent-style-name="SECTION_5f_HEADER_5f_1_5f_2_5f_1-backgroundobjects">
      <style:graphic-properties draw:stroke="none" draw:fill="none" draw:fill-color="#ffffff" draw:textarea-vertical-align="bottom" draw:auto-grow-height="false" fo:min-height="1.485cm"/>
    </style:style>
    <style:style style:name="Mpr3" style:family="presentation" style:parent-style-name="TITLE_5f_AND_5f_BODY_5f_2_5f_2-backgroundobjects">
      <style:graphic-properties draw:stroke="none" draw:fill="none" draw:fill-color="#ffffff" draw:auto-grow-height="false" fo:min-height="1.27cm"/>
    </style:style>
    <style:style style:name="Mpr4" style:family="presentation" style:parent-style-name="TITLE_5f_AND_5f_BODY_5f_2_5f_2-backgroundobjects">
      <style:graphic-properties draw:stroke="none" draw:fill="none" draw:fill-color="#ffffff" draw:textarea-vertical-align="bottom" draw:auto-grow-height="false" fo:min-height="1.27cm"/>
    </style:style>
    <style:style style:name="Mpr5" style:family="presentation" style:parent-style-name="TITLE_5f_AND_5f_BODY_5f_2_5f_1_5f_5-backgroundobjects">
      <style:graphic-properties draw:stroke="none" draw:fill="none" draw:fill-color="#ffffff" draw:auto-grow-height="false" fo:min-height="1.27cm"/>
    </style:style>
    <style:style style:name="Mpr6" style:family="presentation" style:parent-style-name="TITLE_5f_AND_5f_BODY_5f_2_5f_1_5f_5-backgroundobjects">
      <style:graphic-properties draw:stroke="none" draw:fill="none" draw:fill-color="#ffffff" draw:textarea-vertical-align="bottom" draw:auto-grow-height="false" fo:min-height="1.27cm"/>
    </style:style>
    <style:style style:name="Mpr7" style:family="presentation" style:parent-style-name="TITLE_5f_AND_5f_BODY_5f_2_5f_1-backgroundobjects">
      <style:graphic-properties draw:stroke="none" draw:fill="none" draw:fill-color="#ffffff" draw:auto-grow-height="false" fo:min-height="1.27cm"/>
    </style:style>
    <style:style style:name="Mpr8" style:family="presentation" style:parent-style-name="TITLE_5f_AND_5f_BODY_5f_2_5f_1-backgroundobjects">
      <style:graphic-properties draw:stroke="none" draw:fill="none" draw:fill-color="#ffffff" draw:textarea-vertical-align="bottom" draw:auto-grow-height="false" fo:min-height="1.27cm"/>
    </style:style>
    <style:style style:name="Mpr9" style:family="presentation" style:parent-style-name="TITLE_5f_AND_5f_BODY_5f_2_5f_1_5f_1-backgroundobjects">
      <style:graphic-properties draw:stroke="none" draw:fill="none" draw:fill-color="#ffffff" draw:auto-grow-height="false" fo:min-height="1.27cm"/>
    </style:style>
    <style:style style:name="Mpr10" style:family="presentation" style:parent-style-name="TITLE_5f_AND_5f_BODY_5f_2_5f_1_5f_1-backgroundobjects">
      <style:graphic-properties draw:stroke="none" draw:fill="none" draw:fill-color="#ffffff" draw:textarea-vertical-align="bottom" draw:auto-grow-height="false" fo:min-height="1.27cm"/>
    </style:style>
    <style:style style:name="Mpr11" style:family="presentation" style:parent-style-name="TITLE_5f_AND_5f_BODY_5f_2-backgroundobjects">
      <style:graphic-properties draw:stroke="none" draw:fill="none" draw:fill-color="#ffffff" draw:auto-grow-height="false" fo:min-height="1.27cm"/>
    </style:style>
    <style:style style:name="Mpr12" style:family="presentation" style:parent-style-name="TITLE_5f_AND_5f_BODY_5f_2-backgroundobjects">
      <style:graphic-properties draw:stroke="none" draw:fill="none" draw:fill-color="#ffffff" draw:textarea-vertical-align="bottom" draw:auto-grow-height="false" fo:min-height="1.27cm"/>
    </style:style>
    <style:style style:name="Mpr13" style:family="presentation" style:parent-style-name="TITLE_5f_AND_5f_BODY_5f_2_5f_1_5f_4-backgroundobjects">
      <style:graphic-properties draw:stroke="none" draw:fill="none" draw:fill-color="#ffffff" draw:auto-grow-height="false" fo:min-height="1.27cm"/>
    </style:style>
    <style:style style:name="Mpr14" style:family="presentation" style:parent-style-name="TITLE_5f_AND_5f_BODY_5f_2_5f_1_5f_4-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solid" draw:fill-color="#000000"/>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normal" style:font-name-asian="Century Gothic" style:font-size-asian="18pt" style:font-style-asian="normal" style:font-weight-asian="normal" style:font-name-complex="Century Gothic"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ECTION_5f_HEADER_5f_1_5f_2_5f_1" style:display-name="SECTION_HEADER_1_2_1" style:page-layout-name="PM1" draw:style-name="Mdp1">
      <draw:frame draw:name="Google Shape;30;p5" draw:style-name="Mgr3" draw:text-style-name="MP5" draw:layer="backgroundobjects" svg:width="10.134cm" svg:height="9.81cm" svg:x="7.632cm" svg:y="2.843cm">
        <draw:image xlink:href="Pictures/10000201000001F4000001E4CF0195E221BD501B.png" xlink:type="simple" xlink:show="embed" xlink:actuate="onLoad">
          <text:p/>
        </draw:image>
      </draw:frame>
      <draw:frame draw:name="Google Shape;31;p5" presentation:style-name="SECTION_5f_HEADER_5f_1_5f_2_5f_1-title" draw:layer="backgroundobjects" svg:width="23.667cm" svg:height="2.003cm" svg:x="0.866cm" svg:y="0.428cm" presentation:class="title" presentation:placeholder="true" presentation:user-transformed="true">
        <draw:text-box/>
      </draw:frame>
      <draw:frame draw:name="Google Shape;32;p5" draw:style-name="Mgr3" draw:text-style-name="MP5" draw:layer="backgroundobjects" svg:width="0.766cm" svg:height="0.766cm" svg:x="16.824cm" svg:y="13.157cm">
        <draw:image xlink:href="Pictures/10000201000000B4000000B46027ED32C11D68DD.png" xlink:type="simple" xlink:show="embed" xlink:actuate="onLoad">
          <text:p/>
        </draw:image>
      </draw:frame>
      <draw:frame draw:name="Google Shape;33;p5" draw:style-name="Mgr3" draw:text-style-name="MP5" draw:layer="backgroundobjects" svg:width="0.766cm" svg:height="0.766cm" svg:x="15.907cm" svg:y="13.157cm">
        <draw:image xlink:href="Pictures/1000020100000084000000841A7D57659B0061C4.png" xlink:type="simple" xlink:show="embed" xlink:actuate="onLoad">
          <text:p/>
        </draw:image>
      </draw:frame>
      <draw:frame draw:name="Google Shape;34;p5" draw:style-name="Mgr3" draw:text-style-name="MP5" draw:layer="backgroundobjects" svg:width="1.346cm" svg:height="1.009cm" svg:x="17.576cm" svg:y="13.066cm">
        <draw:image xlink:href="Pictures/10000201000001900000012CE2A20F5209AEEEE6.png" xlink:type="simple" xlink:show="embed" xlink:actuate="onLoad">
          <text:p/>
        </draw:image>
      </draw:frame>
      <draw:custom-shape draw:name="Google Shape;35;p5" draw:style-name="Mgr4" draw:text-style-name="MP7" draw:layer="backgroundobjects" svg:width="6.772cm" svg:height="1.009cm" svg:x="18.575cm" svg:y="12.904cm">
        <text:p text:style-name="MP6"><text:span text:style-name="MT1">@Bootstrap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ECTION_5f_HEADER_5f_1_5f_2_5f_1-outline1" draw:layer="backgroundobjects" svg:width="22.859cm" svg:height="8.286cm" svg:x="1.27cm" svg:y="3.343cm" presentation:class="outline" presentation:placeholder="true">
        <draw:text-box/>
      </draw:frame>
      <presentation:notes style:page-layout-name="PM2">
        <draw:page-thumbnail presentation:style-name="SECTION_5f_HEADER_5f_1_5f_2_5f_1-title" draw:layer="backgroundobjects" svg:width="19.798cm" svg:height="11.136cm" svg:x="0.6cm" svg:y="2.257cm" presentation:class="page"/>
        <draw:frame presentation:style-name="SECTION_5f_HEADER_5f_1_5f_2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_5f_2_5f_2" style:display-name="TITLE_AND_BODY_2_2" style:page-layout-name="PM1" draw:style-name="Mdp1">
      <draw:frame draw:name="Google Shape;118;p18" presentation:style-name="TITLE_5f_AND_5f_BODY_5f_2_5f_2-outline1" draw:layer="backgroundobjects" svg:width="15.185cm" svg:height="9.489cm" svg:x="1.193cm" svg:y="4.199cm" presentation:class="outline" presentation:placeholder="true" presentation:user-transformed="true">
        <draw:text-box/>
      </draw:frame>
      <draw:frame draw:name="Google Shape;119;p18" presentation:style-name="TITLE_5f_AND_5f_BODY_5f_2_5f_2-outline1" draw:layer="backgroundobjects" svg:width="8.307cm" svg:height="7.238cm" svg:x="16.732cm" svg:y="4.199cm" presentation:class="outline" presentation:placeholder="true" presentation:user-transformed="true">
        <draw:text-box/>
      </draw:frame>
      <draw:custom-shape draw:name="Google Shape;120;p18" draw:style-name="Mgr5" draw:text-style-name="MP8" draw:layer="backgroundobjects" svg:width="25.452cm" svg:height="2.178cm" svg:x="-0.022cm" svg:y="-0.002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p18" presentation:style-name="TITLE_5f_AND_5f_BODY_5f_2_5f_2-title" draw:layer="backgroundobjects" svg:width="21.908cm" svg:height="1.59cm" svg:x="3.356cm" svg:y="0.178cm" presentation:class="title" presentation:placeholder="true" presentation:user-transformed="true">
        <draw:text-box/>
      </draw:frame>
      <draw:frame draw:name="Google Shape;122;p18" draw:style-name="Mgr3" draw:text-style-name="MP5" draw:layer="backgroundobjects" svg:width="3.604cm" svg:height="3.604cm" svg:x="0.234cm" svg:y="0.215cm">
        <draw:image xlink:href="Pictures/100002010000020000000200E34C0A2E787C9B97.png" xlink:type="simple" xlink:show="embed" xlink:actuate="onLoad">
          <text:p/>
        </draw:image>
      </draw:frame>
      <presentation:notes style:page-layout-name="PM2">
        <draw:page-thumbnail presentation:style-name="TITLE_5f_AND_5f_BODY_5f_2_5f_2-title" draw:layer="backgroundobjects" svg:width="16.931cm" svg:height="9.524cm" svg:x="1.059cm" svg:y="1.93cm" presentation:class="page"/>
        <draw:frame presentation:style-name="TITLE_5f_AND_5f_BODY_5f_2_5f_2-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2_5f_1_5f_5" style:display-name="TITLE_AND_BODY_2_1_5" style:page-layout-name="PM1" draw:style-name="Mdp1">
      <draw:custom-shape draw:name="Google Shape;155;p24" draw:style-name="Mgr5" draw:text-style-name="MP8" draw:layer="backgroundobjects" svg:width="25.421cm" svg:height="2.178cm" svg:x="-0.001cm" svg:y="-0.002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6;p24" presentation:style-name="TITLE_5f_AND_5f_BODY_5f_2_5f_1_5f_5-title" draw:layer="backgroundobjects" svg:width="21.908cm" svg:height="1.59cm" svg:x="3.356cm" svg:y="0.178cm" presentation:class="title" presentation:placeholder="true" presentation:user-transformed="true">
        <draw:text-box/>
      </draw:frame>
      <draw:frame draw:name="Google Shape;157;p24" presentation:style-name="TITLE_5f_AND_5f_BODY_5f_2_5f_1_5f_5-outline1" draw:layer="backgroundobjects" svg:width="20.948cm" svg:height="9.489cm" svg:x="3.531cm" svg:y="2.786cm" presentation:class="outline" presentation:placeholder="true" presentation:user-transformed="true">
        <draw:text-box/>
      </draw:frame>
      <draw:frame draw:name="Google Shape;158;p24" draw:style-name="Mgr3" draw:text-style-name="MP5" draw:layer="backgroundobjects" svg:width="3.699cm" svg:height="3.699cm" svg:x="0.113cm" svg:y="0.216cm">
        <draw:image xlink:href="Pictures/100002010000020000000200F43894A2E5981DCE.png" xlink:type="simple" xlink:show="embed" xlink:actuate="onLoad">
          <text:p/>
        </draw:image>
      </draw:frame>
      <draw:frame draw:name="Google Shape;159;p24" draw:style-name="Mgr6" draw:text-style-name="MP5" draw:layer="backgroundobjects" svg:width="3.114cm" svg:height="1.93cm" svg:x="0.041cm" svg:y="7.263cm">
        <draw:image xlink:href="Pictures/1000020100000438000004385DCD94D9D292316F.png" xlink:type="simple" xlink:show="embed" xlink:actuate="onLoad">
          <text:p/>
        </draw:image>
      </draw:frame>
      <presentation:notes style:page-layout-name="PM2">
        <draw:page-thumbnail presentation:style-name="TITLE_5f_AND_5f_BODY_5f_2_5f_1_5f_5-title" draw:layer="backgroundobjects" svg:width="16.931cm" svg:height="9.524cm" svg:x="1.059cm" svg:y="1.93cm" presentation:class="page"/>
        <draw:frame presentation:style-name="TITLE_5f_AND_5f_BODY_5f_2_5f_1_5f_5-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2_5f_1" style:display-name="TITLE_AND_BODY_2_1" style:page-layout-name="PM1" draw:style-name="Mdp1">
      <draw:custom-shape draw:name="Google Shape;144;p22" draw:style-name="Mgr5" draw:text-style-name="MP8" draw:layer="backgroundobjects" svg:width="25.421cm" svg:height="2.178cm" svg:x="-0.001cm" svg:y="-0.002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p22" draw:style-name="Mgr3" draw:text-style-name="MP5" draw:layer="backgroundobjects" svg:width="3.699cm" svg:height="3.699cm" svg:x="0.113cm" svg:y="0.216cm">
        <draw:image xlink:href="Pictures/100002010000020000000200F43894A2E5981DCE.png" xlink:type="simple" xlink:show="embed" xlink:actuate="onLoad">
          <text:p/>
        </draw:image>
      </draw:frame>
      <draw:frame draw:name="Google Shape;146;p22" presentation:style-name="TITLE_5f_AND_5f_BODY_5f_2_5f_1-title" draw:layer="backgroundobjects" svg:width="21.908cm" svg:height="1.59cm" svg:x="3.356cm" svg:y="0.178cm" presentation:class="title" presentation:placeholder="true" presentation:user-transformed="true">
        <draw:text-box/>
      </draw:frame>
      <draw:frame draw:name="Google Shape;147;p22" presentation:style-name="TITLE_5f_AND_5f_BODY_5f_2_5f_1-outline1" draw:layer="backgroundobjects" svg:width="21.032cm" svg:height="9.489cm" svg:x="3.602cm" svg:y="2.707cm" presentation:class="outline" presentation:placeholder="true" presentation:user-transformed="true">
        <draw:text-box/>
      </draw:frame>
      <presentation:notes style:page-layout-name="PM2">
        <draw:page-thumbnail presentation:style-name="TITLE_5f_AND_5f_BODY_5f_2_5f_1-title" draw:layer="backgroundobjects" svg:width="16.931cm" svg:height="9.524cm" svg:x="1.059cm" svg:y="1.93cm" presentation:class="page"/>
        <draw:frame presentation:style-name="TITLE_5f_AND_5f_BODY_5f_2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2_5f_1_5f_1" style:display-name="TITLE_AND_BODY_2_1_1" style:page-layout-name="PM1" draw:style-name="Mdp1">
      <draw:custom-shape draw:name="Google Shape;213;p33" draw:style-name="Mgr5" draw:text-style-name="MP8" draw:layer="backgroundobjects" svg:width="25.421cm" svg:height="2.178cm" svg:x="-0.001cm" svg:y="-0.002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4;p33" draw:style-name="Mgr3" draw:text-style-name="MP5" draw:layer="backgroundobjects" svg:width="2.955cm" svg:height="2.955cm" svg:x="0.304cm" svg:y="0.405cm">
        <draw:image xlink:href="Pictures/100002010000020000000200C380900152203F0B.png" xlink:type="simple" xlink:show="embed" xlink:actuate="onLoad">
          <text:p/>
        </draw:image>
      </draw:frame>
      <draw:frame draw:name="Google Shape;215;p33" presentation:style-name="TITLE_5f_AND_5f_BODY_5f_2_5f_1_5f_1-title" draw:layer="backgroundobjects" svg:width="21.908cm" svg:height="1.59cm" svg:x="3.356cm" svg:y="0.178cm" presentation:class="title" presentation:placeholder="true" presentation:user-transformed="true">
        <draw:text-box/>
      </draw:frame>
      <draw:frame draw:name="Google Shape;216;p33" presentation:style-name="TITLE_5f_AND_5f_BODY_5f_2_5f_1_5f_1-outline1" draw:layer="backgroundobjects" svg:width="21.327cm" svg:height="9.489cm" svg:x="3.26cm" svg:y="2.72cm" presentation:class="outline" presentation:placeholder="true" presentation:user-transformed="true">
        <draw:text-box/>
      </draw:frame>
      <presentation:notes style:page-layout-name="PM2">
        <draw:page-thumbnail presentation:style-name="TITLE_5f_AND_5f_BODY_5f_2_5f_1_5f_1-title" draw:layer="backgroundobjects" svg:width="16.931cm" svg:height="9.524cm" svg:x="1.059cm" svg:y="1.93cm" presentation:class="page"/>
        <draw:frame presentation:style-name="TITLE_5f_AND_5f_BODY_5f_2_5f_1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2" style:display-name="TITLE_AND_BODY_2" style:page-layout-name="PM1" draw:style-name="Mdp1">
      <draw:frame draw:name="Google Shape;101;p15" presentation:style-name="TITLE_5f_AND_5f_BODY_5f_2-outline1" draw:layer="backgroundobjects" svg:width="20.699cm" svg:height="9.489cm" svg:x="3.578cm" svg:y="2.786cm" presentation:class="outline" presentation:placeholder="true" presentation:user-transformed="true">
        <draw:text-box/>
      </draw:frame>
      <draw:custom-shape draw:name="Google Shape;102;p15" draw:style-name="Mgr5" draw:text-style-name="MP8" draw:layer="backgroundobjects" svg:width="25.452cm" svg:height="2.178cm" svg:x="-0.022cm" svg:y="-0.002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3;p15" presentation:style-name="TITLE_5f_AND_5f_BODY_5f_2-title" draw:layer="backgroundobjects" svg:width="21.908cm" svg:height="1.59cm" svg:x="3.356cm" svg:y="0.178cm" presentation:class="title" presentation:placeholder="true" presentation:user-transformed="true">
        <draw:text-box/>
      </draw:frame>
      <draw:frame draw:name="Google Shape;104;p15" draw:style-name="Mgr3" draw:text-style-name="MP5" draw:layer="backgroundobjects" svg:width="3.604cm" svg:height="3.604cm" svg:x="0.234cm" svg:y="0.215cm">
        <draw:image xlink:href="Pictures/100002010000020000000200E34C0A2E787C9B97.png" xlink:type="simple" xlink:show="embed" xlink:actuate="onLoad">
          <text:p/>
        </draw:image>
      </draw:frame>
      <presentation:notes style:page-layout-name="PM2">
        <draw:page-thumbnail presentation:style-name="TITLE_5f_AND_5f_BODY_5f_2-title" draw:layer="backgroundobjects" svg:width="16.931cm" svg:height="9.524cm" svg:x="1.059cm" svg:y="1.93cm" presentation:class="page"/>
        <draw:frame presentation:style-name="TITLE_5f_AND_5f_BODY_5f_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2_5f_1_5f_4" style:display-name="TITLE_AND_BODY_2_1_4" style:page-layout-name="PM1" draw:style-name="Mdp1">
      <draw:custom-shape draw:name="Google Shape;167;p26" draw:style-name="Mgr5" draw:text-style-name="MP8" draw:layer="backgroundobjects" svg:width="25.421cm" svg:height="2.178cm" svg:x="-0.001cm" svg:y="-0.002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8;p26" presentation:style-name="TITLE_5f_AND_5f_BODY_5f_2_5f_1_5f_4-title" draw:layer="backgroundobjects" svg:width="21.908cm" svg:height="1.59cm" svg:x="3.356cm" svg:y="0.178cm" presentation:class="title" presentation:placeholder="true" presentation:user-transformed="true">
        <draw:text-box/>
      </draw:frame>
      <draw:frame draw:name="Google Shape;169;p26" presentation:style-name="TITLE_5f_AND_5f_BODY_5f_2_5f_1_5f_4-outline1" draw:layer="backgroundobjects" svg:width="15.074cm" svg:height="9.489cm" svg:x="1.167cm" svg:y="4.269cm" presentation:class="outline" presentation:placeholder="true" presentation:user-transformed="true">
        <draw:text-box/>
      </draw:frame>
      <draw:frame draw:name="Google Shape;170;p26" presentation:style-name="TITLE_5f_AND_5f_BODY_5f_2_5f_1_5f_4-outline1" draw:layer="backgroundobjects" svg:width="8.151cm" svg:height="7.102cm" svg:x="16.496cm" svg:y="4.858cm" presentation:class="outline" presentation:placeholder="true" presentation:user-transformed="true">
        <draw:text-box/>
      </draw:frame>
      <draw:frame draw:name="Google Shape;171;p26" draw:style-name="Mgr3" draw:text-style-name="MP5" draw:layer="backgroundobjects" svg:width="3.699cm" svg:height="3.699cm" svg:x="0.113cm" svg:y="0.216cm">
        <draw:image xlink:href="Pictures/100002010000020000000200F43894A2E5981DCE.png" xlink:type="simple" xlink:show="embed" xlink:actuate="onLoad">
          <text:p/>
        </draw:image>
      </draw:frame>
      <presentation:notes style:page-layout-name="PM2">
        <draw:page-thumbnail presentation:style-name="TITLE_5f_AND_5f_BODY_5f_2_5f_1_5f_4-title" draw:layer="backgroundobjects" svg:width="16.931cm" svg:height="9.524cm" svg:x="1.059cm" svg:y="1.93cm" presentation:class="page"/>
        <draw:frame presentation:style-name="TITLE_5f_AND_5f_BODY_5f_2_5f_1_5f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78"/>
    <meta:generator>LibreOfficeDev/6.0.5.2$Linux_X86_64 LibreOffice_project/</meta:generator>
  </office:meta>
</office:document-meta>
</file>